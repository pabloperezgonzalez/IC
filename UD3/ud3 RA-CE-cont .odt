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90000050023BF5C1E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6" style:family="table">
      <style:table-properties style:width="17.58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6.A" style:family="table-column">
      <style:table-column-properties style:column-width="0.794cm"/>
    </style:style>
    <style:style style:name="Tabla16.B" style:family="table-column">
      <style:table-column-properties style:column-width="16.792cm"/>
    </style:style>
    <style:style style:name="Tabla16.1" style:family="table-row">
      <style:table-row-properties fo:background-color="transparent">
        <style:background-image/>
      </style:table-row-properties>
    </style:style>
    <style:style style:name="Tabla16.A1" style:family="table-cell">
      <style:table-cell-properties fo:background-color="#77bc65" fo:padding="0.097cm" fo:border="0.5pt solid #000000">
        <style:background-image/>
      </style:table-cell-properties>
    </style:style>
    <style:style style:name="Tabla16.2" style:family="table-row">
      <style:table-row-properties fo:background-color="transparent" fo:keep-together="auto">
        <style:background-image/>
      </style:table-row-properties>
    </style:style>
    <style:style style:name="Tabla16.A2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6.A3" style:family="table-cell">
      <style:table-cell-properties fo:background-color="#77bc6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6.A4" style:family="table-cell">
      <style:table-cell-properties fo:padding="0.097cm" fo:border-left="0.5pt solid #000000" fo:border-right="none" fo:border-top="none" fo:border-bottom="0.5pt solid #000000"/>
    </style:style>
    <style:style style:name="Tabla16.B4" style:family="table-cell">
      <style:table-cell-properties fo:padding="0.097cm" fo:border-left="0.5pt solid #000000" fo:border-right="0.5pt solid #000000" fo:border-top="none" fo:border-bottom="0.5pt solid #000000"/>
    </style:style>
    <style:style style:name="Tabla16.A5" style:family="table-cell">
      <style:table-cell-properties fo:padding="0.097cm" fo:border-left="0.5pt solid #000000" fo:border-right="none" fo:border-top="none" fo:border-bottom="0.5pt solid #000000"/>
    </style:style>
    <style:style style:name="Tabla16.B5" style:family="table-cell">
      <style:table-cell-properties fo:padding="0.097cm" fo:border-left="0.5pt solid #000000" fo:border-right="0.5pt solid #000000" fo:border-top="none" fo:border-bottom="0.5pt solid #000000"/>
    </style:style>
    <style:style style:name="Tabla16.A6" style:family="table-cell">
      <style:table-cell-properties fo:padding="0.097cm" fo:border-left="0.5pt solid #000000" fo:border-right="none" fo:border-top="none" fo:border-bottom="0.5pt solid #000000"/>
    </style:style>
    <style:style style:name="Tabla16.B6" style:family="table-cell">
      <style:table-cell-properties fo:padding="0.097cm" fo:border-left="0.5pt solid #000000" fo:border-right="0.5pt solid #000000" fo:border-top="none" fo:border-bottom="0.5pt solid #000000"/>
    </style:style>
    <style:style style:name="Tabla16.A7" style:family="table-cell">
      <style:table-cell-properties fo:padding="0.097cm" fo:border-left="0.5pt solid #000000" fo:border-right="none" fo:border-top="none" fo:border-bottom="0.5pt solid #000000"/>
    </style:style>
    <style:style style:name="Tabla16.B7" style:family="table-cell">
      <style:table-cell-properties fo:padding="0.097cm" fo:border-left="0.5pt solid #000000" fo:border-right="0.5pt solid #000000" fo:border-top="none" fo:border-bottom="0.5pt solid #000000"/>
    </style:style>
    <style:style style:name="Tabla16.A8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200%" fo:text-align="justify" style:justify-single-word="false" fo:text-indent="0cm" style:auto-text-indent="false" style:shadow="none"/>
      <style:text-properties fo:color="#000000" loext:opacity="100%" style:text-line-through-style="none" style:text-line-through-type="none" style:font-name="Arial1" fo:font-size="12pt" fo:language="es" fo:country="ES" style:text-underline-style="none" fo:font-weight="normal" officeooo:rsid="012a49b9" officeooo:paragraph-rsid="00120bc8" style:font-size-asian="12pt" style:font-weight-asian="normal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200%" fo:text-align="justify" style:justify-single-word="false" fo:text-indent="0cm" style:auto-text-indent="false" style:shadow="none"/>
      <style:text-properties fo:color="#000000" loext:opacity="100%" style:text-line-through-style="none" style:text-line-through-type="none" style:font-name="Arial1" fo:font-size="12pt" fo:language="es" fo:country="ES" style:text-underline-style="none" fo:font-weight="normal" officeooo:rsid="0123055d" officeooo:paragraph-rsid="001447dc" style:font-size-asian="12pt" style:font-weight-asian="normal" style:font-size-complex="12p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hadow="none"/>
      <style:text-properties fo:color="#ffffff" loext:opacity="100%" style:text-line-through-style="none" style:text-line-through-type="none" style:font-name="Arial1" fo:font-size="12pt" fo:language="es" fo:country="ES" style:text-underline-style="none" fo:font-weight="normal" officeooo:rsid="01bb72c9" officeooo:paragraph-rsid="001447dc" style:font-size-asian="12pt" style:font-weight-asian="normal" style:font-size-complex="12pt"/>
    </style:style>
    <style:style style:name="P4" style:family="paragraph" style:parent-style-name="Pa12">
      <loext:graphic-properties draw:fill="none"/>
      <style:paragraph-properties fo:margin-left="1.27cm" fo:margin-right="0cm" fo:margin-top="0cm" fo:margin-bottom="0cm" style:contextual-spacing="false" fo:line-height="100%" fo:text-align="justify" style:justify-single-word="false" fo:text-indent="0cm" style:auto-text-indent="false" fo:background-color="transparent" style:shadow="none"/>
      <style:text-properties fo:font-variant="normal" fo:text-transform="none" fo:color="#000000" loext:opacity="100%" style:text-line-through-style="none" style:text-line-through-type="none" style:font-name="Arial1" fo:font-size="12pt" fo:letter-spacing="normal" fo:language="es" fo:country="ES" fo:font-style="normal" style:text-underline-style="none" fo:font-weight="normal" officeooo:rsid="01289979" officeooo:paragraph-rsid="001447dc" style:text-blinking="false" style:font-name-asian="NSimSun" style:font-size-asian="12pt" style:font-weight-asian="normal" style:font-name-complex="Lucida Sans" style:font-size-complex="12pt" style:font-weight-complex="bold" loext:shadow="none"/>
    </style:style>
    <style:style style:name="P5" style:family="paragraph" style:parent-style-name="Pa6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1" fo:font-size="12pt" fo:language="es" fo:country="ES" fo:font-weight="normal" officeooo:rsid="026508d8" officeooo:paragraph-rsid="001447dc" style:font-size-asian="12pt" style:font-weight-asian="normal" style:font-size-complex="12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font-name="Arial1" fo:font-size="12pt" fo:letter-spacing="normal" fo:language="es" fo:country="ES" fo:font-style="normal" style:text-underline-style="none" fo:font-weight="normal" officeooo:rsid="01289979" officeooo:paragraph-rsid="001447dc" style:text-blinking="false" style:font-name-asian="NSimSun" style:font-size-asian="12pt" style:font-weight-asian="normal" style:font-name-complex="Lucida Sans" style:font-size-complex="12pt" style:font-weight-complex="bold" loext:shadow="none"/>
    </style:style>
    <style:style style:name="P7" style:family="paragraph" style:parent-style-name="Pa6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text-line-through-style="none" style:text-line-through-type="none" style:font-name="Arial1" fo:font-size="12pt" fo:language="es" fo:country="ES" style:text-underline-style="none" fo:font-weight="normal" officeooo:rsid="026508d8" officeooo:paragraph-rsid="001447dc" style:font-size-asian="12pt" style:font-weight-asian="normal" style:font-size-complex="12pt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200%" fo:text-align="start" style:justify-single-word="false" fo:text-indent="0cm" style:auto-text-indent="false" style:shadow="none"/>
      <style:text-properties fo:color="#000000" loext:opacity="100%" style:text-line-through-style="none" style:text-line-through-type="none" style:font-name="Arial1" fo:font-size="12pt" fo:language="es" fo:country="ES" style:text-underline-style="solid" style:text-underline-width="auto" style:text-underline-color="font-color" fo:font-weight="normal" officeooo:rsid="02829701" officeooo:paragraph-rsid="001447dc" style:font-size-asian="12pt" style:font-weight-asian="normal" style:font-size-complex="12pt"/>
    </style:style>
    <style:style style:name="P9" style:family="paragraph" style:parent-style-name="Pa20">
      <style:paragraph-properties fo:margin-top="0cm" fo:margin-bottom="0cm" style:contextual-spacing="false" fo:line-height="100%" fo:text-align="justify" style:justify-single-word="false" style:shadow="none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3afdb9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Pa18" style:list-style-name="L1" style:master-page-name="">
      <loext:graphic-properties draw:fill="none"/>
      <style:paragraph-properties fo:line-height="100%" fo:text-align="justify" style:justify-single-word="false" style:page-number="auto" fo:background-color="transparent">
        <style:tab-stops>
          <style:tab-stop style:position="1.192cm"/>
        </style:tab-stops>
      </style:paragraph-properties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3afdb9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Pa18" style:list-style-name="L1">
      <loext:graphic-properties draw:fill="none"/>
      <style:paragraph-properties fo:line-height="100%" fo:text-align="justify" style:justify-single-word="false" fo:background-color="transparent">
        <style:tab-stops>
          <style:tab-stop style:position="1.192cm"/>
        </style:tab-stops>
      </style:paragraph-properties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3afdb9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Pa18" style:list-style-name="L1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>
        <style:tab-stops>
          <style:tab-stop style:position="1.192cm"/>
        </style:tab-stops>
      </style:paragraph-properties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3afdb9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Pa20">
      <style:paragraph-properties fo:line-height="100%" fo:text-align="justify" style:justify-single-word="false"/>
      <style:text-properties style:font-name="Calibri" fo:font-size="10pt" fo:language="es" fo:country="ES" officeooo:paragraph-rsid="003afdb9" style:font-size-asian="10pt" style:font-size-complex="10pt"/>
    </style:style>
    <style:style style:name="P14" style:family="paragraph" style:parent-style-name="Standard" style:list-style-name="L2">
      <style:paragraph-properties fo:line-height="100%" fo:text-align="justify" style:justify-single-word="false"/>
      <style:text-properties style:font-name="Calibri" fo:font-size="10pt" fo:language="es" fo:country="ES" officeooo:paragraph-rsid="003afdb9" style:font-size-asian="10pt" style:font-size-complex="10pt"/>
    </style:style>
    <style:style style:name="P15" style:family="paragraph" style:parent-style-name="Pa18" style:list-style-name="L2">
      <style:paragraph-properties fo:line-height="100%" fo:text-align="justify" style:justify-single-word="false"/>
      <style:text-properties style:font-name="Calibri" fo:font-size="10pt" fo:language="es" fo:country="ES" officeooo:paragraph-rsid="003afdb9" style:font-size-asian="10pt" style:font-size-complex="10pt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 style:shadow="none"/>
      <style:text-properties style:font-name="Calibri" fo:font-size="10pt" fo:font-weight="bold" officeooo:paragraph-rsid="003afdb9" style:font-size-asian="10pt" style:font-weight-asian="bold" style:font-size-complex="10pt" style:font-weight-complex="bold"/>
    </style:style>
    <style:style style:name="P17" style:family="paragraph" style:parent-style-name="Pa18" style:list-style-name="L3" style:master-page-name="">
      <loext:graphic-properties draw:fill="none"/>
      <style:paragraph-properties fo:line-height="100%" fo:text-align="justify" style:justify-single-word="false" style:page-number="auto" fo:background-color="transparent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bold" officeooo:rsid="0015ed1a" officeooo:paragraph-rsid="003afdb9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Pa18" style:list-style-name="L3">
      <loext:graphic-properties draw:fill="none"/>
      <style:paragraph-properties fo:line-height="100%" fo:text-align="justify" style:justify-single-word="false" fo:background-color="transparent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bold" officeooo:rsid="0015ed1a" officeooo:paragraph-rsid="003afdb9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Pa18" style:list-style-name="L3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bold" officeooo:rsid="0015ed1a" officeooo:paragraph-rsid="003afdb9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Pa20">
      <style:paragraph-properties fo:line-height="100%" fo:text-align="justify" style:justify-single-word="false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3afdb9" style:font-size-asian="10pt" style:font-style-asian="normal" style:font-weight-asian="normal" style:font-size-complex="10pt" style:font-style-complex="normal"/>
    </style:style>
    <style:style style:name="P21" style:family="paragraph" style:parent-style-name="Pa18" style:list-style-name="L4" style:master-page-name="">
      <loext:graphic-properties draw:fill="none"/>
      <style:paragraph-properties fo:line-height="100%" fo:text-align="justify" style:justify-single-word="false" style:page-number="auto" fo:background-color="transparent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3afdb9" style:font-size-asian="10pt" style:font-style-asian="normal" style:font-weight-asian="normal" style:font-size-complex="10pt" style:font-style-complex="normal"/>
    </style:style>
    <style:style style:name="P22" style:family="paragraph" style:parent-style-name="Pa18" style:list-style-name="L4">
      <loext:graphic-properties draw:fill="none"/>
      <style:paragraph-properties fo:line-height="100%" fo:text-align="justify" style:justify-single-word="false" fo:background-color="transparent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3afdb9" style:font-size-asian="10pt" style:font-style-asian="normal" style:font-weight-asian="normal" style:font-size-complex="10pt" style:font-style-complex="normal"/>
    </style:style>
    <style:style style:name="P23" style:family="paragraph" style:parent-style-name="Pa18" style:list-style-name="L4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3afdb9" style:font-size-asian="10pt" style:font-style-asian="normal" style:font-weight-asian="normal" style:font-size-complex="10pt" style:font-style-complex="normal"/>
    </style:style>
    <style:style style:name="P24" style:family="paragraph" style:parent-style-name="Pa20" style:master-page-name="">
      <style:paragraph-properties fo:line-height="100%" fo:text-align="justify" style:justify-single-word="false" style:page-number="auto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3afdb9" style:font-size-asian="10pt" style:font-style-asian="normal" style:font-weight-asian="normal" style:font-size-complex="10pt" style:font-style-complex="normal"/>
    </style:style>
    <style:style style:name="P25" style:family="paragraph" style:parent-style-name="Pa18" style:list-style-name="L5" style:master-page-name="">
      <loext:graphic-properties draw:fill="none"/>
      <style:paragraph-properties fo:line-height="100%" fo:text-align="justify" style:justify-single-word="false" style:page-number="auto" fo:background-color="transparent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3afdb9" style:font-size-asian="10pt" style:font-style-asian="normal" style:font-weight-asian="normal" style:font-size-complex="10pt" style:font-style-complex="normal"/>
    </style:style>
    <style:style style:name="P26" style:family="paragraph" style:parent-style-name="Pa18" style:list-style-name="L5">
      <loext:graphic-properties draw:fill="none"/>
      <style:paragraph-properties fo:line-height="100%" fo:text-align="justify" style:justify-single-word="false" fo:background-color="transparent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3afdb9" style:font-size-asian="10pt" style:font-style-asian="normal" style:font-weight-asian="normal" style:font-size-complex="10pt" style:font-style-complex="normal"/>
    </style:style>
    <style:style style:name="P27" style:family="paragraph" style:parent-style-name="Standard" style:list-style-name="L5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3afdb9" style:font-size-asian="10pt" style:font-style-asian="normal" style:font-weight-asian="normal" style:font-size-complex="10pt" style:font-style-complex="normal"/>
    </style:style>
    <style:style style:name="P28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shadow="none"/>
      <style:text-properties fo:color="#000000" loext:opacity="100%" style:text-line-through-style="none" style:text-line-through-type="none" style:font-name="Arial1" fo:font-size="12pt" fo:language="es" fo:country="ES" style:text-underline-style="none" fo:font-weight="normal" officeooo:rsid="012a49b9" officeooo:paragraph-rsid="001447dc" style:font-size-asian="12pt" style:font-weight-asian="normal" style:font-size-complex="12pt"/>
    </style:style>
    <style:style style:name="P29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shadow="none"/>
      <style:text-properties fo:color="#000000" loext:opacity="100%" style:text-line-through-style="none" style:text-line-through-type="none" style:font-name="Arial1" fo:font-size="12pt" fo:language="es" fo:country="ES" style:text-underline-style="none" fo:font-weight="normal" officeooo:rsid="0038502c" officeooo:paragraph-rsid="0038502c" style:font-size-asian="12pt" style:font-weight-asian="normal" style:font-size-complex="12pt"/>
    </style:style>
    <style:style style:name="P30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shadow="none"/>
      <style:text-properties fo:color="#000000" loext:opacity="100%" style:text-line-through-style="none" style:text-line-through-type="none" style:font-name="Arial1" fo:font-size="12pt" fo:language="es" fo:country="ES" style:text-underline-style="none" fo:font-weight="normal" officeooo:rsid="0018f623" officeooo:paragraph-rsid="0018f623" style:font-size-asian="12pt" style:font-weight-asian="normal" style:font-size-complex="12pt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shadow="none"/>
      <style:text-properties fo:color="#000000" loext:opacity="100%" style:text-line-through-style="none" style:text-line-through-type="none" style:font-name="Arial1" fo:font-size="12pt" fo:language="es" fo:country="ES" style:text-underline-style="none" fo:font-weight="normal" officeooo:rsid="001f59d3" officeooo:paragraph-rsid="001f59d3" style:font-size-asian="12pt" style:font-weight-asian="normal" style:font-size-complex="12pt"/>
    </style:style>
    <style:style style:name="P32" style:family="paragraph" style:parent-style-name="Text_20_body">
      <style:paragraph-properties fo:margin-top="0cm" fo:margin-bottom="0cm" style:contextual-spacing="false"/>
    </style:style>
    <style:style style:name="P33" style:family="paragraph" style:parent-style-name="Standard">
      <style:text-properties officeooo:rsid="0038a127" officeooo:paragraph-rsid="00395ea5"/>
    </style:style>
    <style:style style:name="P34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shadow="none"/>
      <style:text-properties fo:color="#000000" loext:opacity="100%" style:text-line-through-style="none" style:text-line-through-type="none" style:font-name="Arial1" fo:font-size="12pt" fo:language="es" fo:country="ES" style:text-underline-style="none" fo:font-weight="normal" officeooo:rsid="00395ea5" officeooo:paragraph-rsid="00395ea5" style:font-size-asian="12pt" style:font-weight-asian="normal" style:font-size-complex="12pt"/>
    </style:style>
    <style:style style:name="P35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shadow="none"/>
      <style:text-properties fo:color="#000000" loext:opacity="100%" style:text-line-through-style="none" style:text-line-through-type="none" style:font-name="Arial1" fo:font-size="12pt" fo:language="es" fo:country="ES" style:text-underline-style="none" fo:font-weight="normal" officeooo:rsid="0018f623" officeooo:paragraph-rsid="00395ea5" style:font-size-asian="12pt" style:font-weight-asian="normal" style:font-size-complex="12pt"/>
    </style:style>
    <style:style style:name="P36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shadow="none"/>
      <style:text-properties fo:color="#000000" loext:opacity="100%" style:text-line-through-style="none" style:text-line-through-type="none" style:font-name="Arial1" fo:font-size="12pt" fo:language="es" fo:country="ES" style:text-underline-style="none" fo:font-weight="normal" officeooo:rsid="001d8935" officeooo:paragraph-rsid="001d8935" style:font-size-asian="12pt" style:font-weight-asian="normal" style:font-size-complex="12pt"/>
    </style:style>
    <style:style style:name="P37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shadow="none"/>
      <style:text-properties fo:color="#000000" loext:opacity="100%" style:text-line-through-style="none" style:text-line-through-type="none" style:font-name="Arial1" fo:font-size="12pt" fo:language="es" fo:country="ES" style:text-underline-style="none" fo:font-weight="normal" officeooo:rsid="00219952" officeooo:paragraph-rsid="00219952" style:font-size-asian="12pt" style:font-weight-asian="normal" style:font-size-complex="12pt"/>
    </style:style>
    <style:style style:name="P38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shadow="none"/>
      <style:text-properties fo:color="#000000" loext:opacity="100%" style:text-line-through-style="none" style:text-line-through-type="none" style:font-name="Arial1" fo:font-size="12pt" fo:language="es" fo:country="ES" style:text-underline-style="none" fo:font-weight="normal" officeooo:rsid="002ad2c0" officeooo:paragraph-rsid="002ad2c0" style:font-size-asian="12pt" style:font-weight-asian="normal" style:font-size-complex="12pt"/>
    </style:style>
    <style:style style:name="P39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shadow="none"/>
      <style:text-properties fo:color="#000000" loext:opacity="100%" style:text-line-through-style="none" style:text-line-through-type="none" style:font-name="Arial1" fo:font-size="12pt" fo:language="es" fo:country="ES" style:text-underline-style="none" fo:font-weight="normal" officeooo:rsid="00268be7" officeooo:paragraph-rsid="00268be7" style:font-size-asian="12pt" style:font-weight-asian="normal" style:font-size-complex="12pt"/>
    </style:style>
    <style:style style:name="P40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page" style:shadow="none"/>
      <style:text-properties fo:color="#000000" loext:opacity="100%" style:text-line-through-style="none" style:text-line-through-type="none" style:font-name="Arial1" fo:font-size="12pt" fo:language="es" fo:country="ES" style:text-underline-style="none" fo:font-weight="normal" officeooo:rsid="00268be7" officeooo:paragraph-rsid="00268be7" style:font-size-asian="12pt" style:font-weight-asian="normal" style:font-size-complex="12pt"/>
    </style:style>
    <style:style style:name="P41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shadow="none"/>
      <style:text-properties fo:color="#000000" loext:opacity="100%" style:text-line-through-style="none" style:text-line-through-type="none" style:font-name="Arial1" fo:font-size="12pt" fo:language="es" fo:country="ES" style:text-underline-style="none" fo:font-weight="normal" officeooo:rsid="0035872c" officeooo:paragraph-rsid="0035872c" style:font-size-asian="12pt" style:font-weight-asian="normal" style:font-size-complex="12pt"/>
    </style:style>
    <style:style style:name="P42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shadow="none"/>
      <style:text-properties fo:color="#000000" loext:opacity="100%" style:text-line-through-style="none" style:text-line-through-type="none" style:font-name="Arial1" fo:font-size="12pt" fo:language="es" fo:country="ES" style:text-underline-style="none" fo:font-weight="normal" officeooo:rsid="0035872c" officeooo:paragraph-rsid="0035872c" style:font-size-asian="12pt" style:font-weight-asian="normal" style:font-size-complex="12pt"/>
    </style:style>
    <style:style style:name="P43" style:family="paragraph" style:parent-style-name="Text_20_body" style:list-style-name="L6"/>
    <style:style style:name="P44" style:family="paragraph" style:parent-style-name="Text_20_body" style:list-style-name="L6">
      <style:paragraph-properties fo:margin-top="0cm" fo:margin-bottom="0cm" style:contextual-spacing="false"/>
    </style:style>
    <style:style style:name="P45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shadow="none"/>
      <style:text-properties fo:color="#000000" loext:opacity="100%" style:text-line-through-style="none" style:text-line-through-type="none" style:font-name="Arial1" fo:font-size="12pt" fo:language="es" fo:country="ES" style:text-underline-style="none" fo:font-weight="normal" officeooo:rsid="0035872c" officeooo:paragraph-rsid="003f3b4c" style:font-size-asian="12pt" style:font-weight-asian="normal" style:font-size-complex="12pt"/>
    </style:style>
    <style:style style:name="P46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shadow="none"/>
      <style:text-properties fo:color="#000000" loext:opacity="100%" style:text-line-through-style="none" style:text-line-through-type="none" style:font-name="Arial1" fo:font-size="12pt" fo:language="es" fo:country="ES" style:text-underline-style="none" fo:font-weight="normal" officeooo:rsid="00360d00" officeooo:paragraph-rsid="00360d00" style:font-size-asian="12pt" style:font-weight-asian="normal" style:font-size-complex="12pt"/>
    </style:style>
    <style:style style:name="P47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shadow="none"/>
      <style:text-properties fo:color="#000000" loext:opacity="100%" style:text-line-through-style="none" style:text-line-through-type="none" style:font-name="Arial1" fo:font-size="12pt" fo:language="es" fo:country="ES" style:text-underline-style="none" fo:font-weight="normal" officeooo:rsid="003b5755" officeooo:paragraph-rsid="003b5755" style:font-size-asian="12pt" style:font-weight-asian="normal" style:font-size-complex="12pt"/>
    </style:style>
    <style:style style:name="P48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shadow="none"/>
      <style:text-properties fo:color="#000000" loext:opacity="100%" style:text-line-through-style="none" style:text-line-through-type="none" style:font-name="Arial1" fo:font-size="12pt" fo:language="es" fo:country="ES" style:text-underline-style="none" fo:font-weight="bold" officeooo:rsid="003b5755" officeooo:paragraph-rsid="003b5755" style:font-size-asian="12pt" style:font-weight-asian="bold" style:font-size-complex="12pt" style:font-weight-complex="bold"/>
    </style:style>
    <style:style style:name="P49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shadow="none"/>
      <style:text-properties fo:color="#000000" loext:opacity="100%" style:text-line-through-style="none" style:text-line-through-type="none" style:font-name="Arial1" fo:font-size="12pt" fo:language="es" fo:country="ES" style:text-underline-style="none" fo:font-weight="normal" officeooo:rsid="003b5755" officeooo:paragraph-rsid="003b5755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shadow="none"/>
      <style:text-properties fo:color="#000000" loext:opacity="100%" style:text-line-through-style="none" style:text-line-through-type="none" style:font-name="Arial1" fo:font-size="12pt" fo:language="es" fo:country="ES" style:text-underline-style="none" fo:font-weight="normal" officeooo:rsid="0043ad51" officeooo:paragraph-rsid="0043ad51" style:font-size-asian="12pt" style:font-weight-asian="normal" style:font-size-complex="12pt"/>
    </style:style>
    <style:style style:name="P51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shadow="none"/>
      <style:text-properties fo:color="#000000" loext:opacity="100%" style:text-line-through-style="none" style:text-line-through-type="none" style:font-name="Arial1" fo:font-size="12pt" fo:language="es" fo:country="ES" style:text-underline-style="none" fo:font-weight="normal" officeooo:rsid="0041ef15" officeooo:paragraph-rsid="0041ef15" style:font-size-asian="12pt" style:font-weight-asian="normal" style:font-size-complex="12pt"/>
    </style:style>
    <style:style style:name="P52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shadow="none"/>
      <style:text-properties fo:color="#000000" loext:opacity="100%" style:text-line-through-style="none" style:text-line-through-type="none" style:font-name="Arial1" fo:font-size="12pt" fo:language="es" fo:country="ES" style:text-underline-style="none" fo:font-weight="normal" officeooo:rsid="003f3b4c" officeooo:paragraph-rsid="003f3b4c" style:font-size-asian="12pt" style:font-weight-asian="normal" style:font-size-complex="12pt"/>
    </style:style>
    <style:style style:name="P53" style:family="paragraph" style:parent-style-name="Text_20_body">
      <style:text-properties officeooo:paragraph-rsid="003f3b4c"/>
    </style:style>
    <style:style style:name="P54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shadow="none"/>
      <style:text-properties fo:color="#000000" loext:opacity="100%" style:text-line-through-style="none" style:text-line-through-type="none" style:font-name="Arial1" fo:font-size="12pt" fo:language="es" fo:country="ES" style:text-underline-style="none" fo:font-weight="normal" officeooo:rsid="004659bf" officeooo:paragraph-rsid="004659bf" style:font-size-asian="12pt" style:font-weight-asian="normal" style:font-size-complex="12pt"/>
    </style:style>
    <style:style style:name="T1" style:family="text">
      <style:text-properties officeooo:rsid="003b914b"/>
    </style:style>
    <style:style style:name="T2" style:family="text">
      <style:text-properties officeooo:rsid="000b29e3"/>
    </style:style>
    <style:style style:name="T3" style:family="text">
      <style:text-properties fo:color="#000000" loext:opacity="100%" style:text-line-through-style="none" style:text-line-through-type="none" fo:language="es" fo:country="ES" fo:font-style="normal" style:text-underline-style="none" officeooo:rsid="003afdb9" style:font-style-asian="normal" style:font-style-complex="normal"/>
    </style:style>
    <style:style style:name="T4" style:family="text">
      <style:text-properties fo:color="#000000" loext:opacity="100%" style:text-line-through-style="none" style:text-line-through-type="none" fo:language="es" fo:country="ES" fo:font-style="normal" style:text-underline-style="none" officeooo:rsid="02829701" style:font-style-asian="normal" style:font-style-complex="normal"/>
    </style:style>
    <style:style style:name="T5" style:family="text">
      <style:text-properties fo:color="#000000" loext:opacity="100%" style:text-line-through-style="none" style:text-line-through-type="none" fo:language="es" fo:country="ES" fo:font-style="normal" style:text-underline-style="none" officeooo:rsid="0015ed1a" style:font-style-asian="normal" style:font-style-complex="normal"/>
    </style:style>
    <style:style style:name="T6" style:family="text">
      <style:text-properties officeooo:rsid="00160a44"/>
    </style:style>
    <style:style style:name="T7" style:family="text">
      <style:text-properties officeooo:rsid="005197e9"/>
    </style:style>
    <style:style style:name="T8" style:family="text">
      <style:text-properties officeooo:rsid="002bcaea"/>
    </style:style>
    <style:style style:name="T9" style:family="text">
      <style:text-properties officeooo:rsid="001ef7b0"/>
    </style:style>
    <style:style style:name="T10" style:family="text">
      <style:text-properties officeooo:rsid="001f3535"/>
    </style:style>
    <style:style style:name="T11" style:family="text">
      <style:text-properties officeooo:rsid="00395ea5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fo:text-indent="-0.6cm" fo:margin-left="1.799cm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number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  <style:text-properties fo:font-family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  <style:text-properties fo:font-family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  <style:text-properties fo:font-family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  <style:text-properties fo:font-family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  <style:text-properties fo:font-family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  <style:text-properties fo:font-family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  <style:text-properties fo:font-family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  <style:text-properties fo:font-family="StarSymbol"/>
      </text:list-level-style-bullet>
    </text:list-style>
    <text:list-style style:name="L2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1LVL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_5f_CharLFO1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1LVL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1LVL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1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1LVL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1LVL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2"/>
      <table:table table:name="Tabla16" table:style-name="Tabla16">
        <table:table-column table:style-name="Tabla16.A"/>
        <table:table-column table:style-name="Tabla16.B"/>
        <table:table-row table:style-name="Tabla16.1">
          <table:table-cell table:style-name="Tabla16.A1" table:number-columns-spanned="2" office:value-type="string">
            <text:p text:style-name="P3">Resultados de Aprendizaje</text:p>
          </table:table-cell>
          <table:covered-table-cell/>
        </table:table-row>
        <table:table-row table:style-name="Tabla16.2">
          <table:table-cell table:style-name="Tabla16.A2" table:number-columns-spanned="2" office:value-type="string">
            <text:p text:style-name="P4">3. Investiga incidentes de ciberseguridad analizando los riesgos implicados y definiendo las posibles medidas a adoptar. </text:p>
          </table:table-cell>
          <table:covered-table-cell/>
        </table:table-row>
        <table:table-row table:style-name="Tabla16.1">
          <table:table-cell table:style-name="Tabla16.A3" table:number-columns-spanned="2" office:value-type="string">
            <text:p text:style-name="P3">Criterios de evaluación</text:p>
          </table:table-cell>
          <table:covered-table-cell/>
        </table:table-row>
        <table:table-row>
          <table:table-cell table:style-name="Tabla16.A4" office:value-type="string">
            <text:p text:style-name="P5">3a</text:p>
          </table:table-cell>
          <table:table-cell table:style-name="Tabla16.B4" office:value-type="string">
            <text:p text:style-name="P6">Se han recopilado y almacenado de forma segura evidencias de incidentes de ciberseguridad que afectan a la organización</text:p>
          </table:table-cell>
        </table:table-row>
        <table:table-row>
          <table:table-cell table:style-name="Tabla16.A5" office:value-type="string">
            <text:p text:style-name="P5">3b</text:p>
          </table:table-cell>
          <table:table-cell table:style-name="Tabla16.B5" office:value-type="string">
            <text:p text:style-name="P6">Se ha realizado un análisis de evidencias</text:p>
          </table:table-cell>
        </table:table-row>
        <table:table-row>
          <table:table-cell table:style-name="Tabla16.A6" office:value-type="string">
            <text:p text:style-name="P7">3c</text:p>
          </table:table-cell>
          <table:table-cell table:style-name="Tabla16.B6" office:value-type="string">
            <text:p text:style-name="P6">Se ha realizado la investigación de incidentes de ciberseguridad</text:p>
          </table:table-cell>
        </table:table-row>
        <table:table-row>
          <table:table-cell table:style-name="Tabla16.A6" office:value-type="string">
            <text:p text:style-name="P7">3d</text:p>
          </table:table-cell>
          <table:table-cell table:style-name="Tabla16.B6" office:value-type="string">
            <text:p text:style-name="P6">Se ha intercambiado información de incidentes, con proveedores y/o organismos competentes que podrían hacer aportaciones al respecto. </text:p>
          </table:table-cell>
        </table:table-row>
        <table:table-row table:style-name="Tabla16.2">
          <table:table-cell table:style-name="Tabla16.A6" office:value-type="string">
            <text:p text:style-name="P7">3e</text:p>
          </table:table-cell>
          <table:table-cell table:style-name="Tabla16.A2" office:value-type="string">
            <text:p text:style-name="P6">Se han iniciado las primeras medidas de contención de los incidentes para limitar los posibles daños causados </text:p>
          </table:table-cell>
        </table:table-row>
      </table:table>
      <text:p text:style-name="P8">Contenidos:</text:p>
      <text:p text:style-name="P9"><text:span text:style-name="T1">1. </text:span>Desarrollo de planes de prevención y concienciación en ciberseguridad:</text:p>
      <text:list text:style-name="L1">
        <text:list-item>
          <text:p text:style-name="P10">− Principios generales en materia de ciberseguridad.</text:p>
        </text:list-item>
        <text:list-item>
          <text:p text:style-name="P11">− Normativa de protección del puesto del trabajo.</text:p>
        </text:list-item>
        <text:list-item>
          <text:p text:style-name="P11">− Plan de formación y concienciación en materia de ciberseguridad.</text:p>
        </text:list-item>
        <text:list-item>
          <text:p text:style-name="P11">− Materiales de formación y concienciación.</text:p>
        </text:list-item>
        <text:list-item>
          <text:p text:style-name="P12">− Auditorías internas de cumplimiento en materia de prevención.</text:p>
        </text:list-item>
      </text:list>
      <text:p text:style-name="P13"><text:span text:style-name="T2">2. </text:span>Auditoría de incidentes de ciberseguridad:</text:p>
      <text:list text:style-name="L2">
        <text:list-item>
          <text:list>
            <text:list-item>
              <text:p text:style-name="P14">− Taxonomía de incidentes de ciberseguridad.</text:p>
            </text:list-item>
            <text:list-item>
              <text:p text:style-name="P15">− Controles, herramientas y mecanismos de monitorización, identificación, detección y alerta de incidentes: tipos y fuentes</text:p>
            </text:list-item>
            <text:list-item>
              <text:p text:style-name="P15">− Controles, herramientas y mecanismos de detección e identificación de incidentes de seguridad física.</text:p>
            </text:list-item>
            <text:list-item>
              <text:p text:style-name="P15">− Controles, herramientas y mecanismos de monitorización, identificación, detección y alerta de incidentes a través de la investigación en fuentes abiertas (OSINT).</text:p>
            </text:list-item>
            <text:list-item>
              <text:p text:style-name="P14">− Clasificación, valoración, documentación, seguimiento inicial de incidentes de ciberseguridad.</text:p>
            </text:list-item>
          </text:list>
        </text:list-item>
      </text:list>
      <text:p text:style-name="P16"><text:span text:style-name="T3">3. </text:span><text:span text:style-name="T4">I</text:span><text:span text:style-name="T5">nvestigación de los incidentes de ciberseguridad:</text:span></text:p>
      <text:list text:style-name="L3">
        <text:list-item>
          <text:p text:style-name="P17">− Recopilación de evidencias. <text:span text:style-name="T6">(y almacenado de forma segura)</text:span></text:p>
        </text:list-item>
        <text:list-item>
          <text:p text:style-name="P18">− Análisis de evidencias.</text:p>
        </text:list-item>
        <text:list-item>
          <text:p text:style-name="P18">− Investigación del incidente</text:p>
        </text:list-item>
        <text:list-item>
          <text:p text:style-name="P18">− Intercambio de información del incidente con proveedores u organismos competentes.</text:p>
        </text:list-item>
        <text:list-item>
          <text:p text:style-name="P19">− Medidas de contención de incidentes.</text:p>
        </text:list-item>
      </text:list>
      <text:p text:style-name="P20"/>
      <text:p text:style-name="P20"><text:span text:style-name="T7">4. </text:span>Implementación de medidas de ciberseguridad:</text:p>
      <text:list text:style-name="L4">
        <text:list-item>
          <text:p text:style-name="P21">− Desarrollar procedimientos de actuación detallados para dar respuesta, mitigar, eliminar o contener los tipos de incidentes.</text:p>
        </text:list-item>
        <text:list-item>
          <text:p text:style-name="P22">− Implantar capacidades de ciberresiliencia.</text:p>
        </text:list-item>
        <text:list-item>
          <text:p text:style-name="P22">− Establecer flujos de toma de decisiones y escalado interno y/o externo adecuados.</text:p>
        </text:list-item>
        <text:list-item>
          <text:p text:style-name="P22">− Tareas para restablecer los servicios afectados por incidentes.</text:p>
        </text:list-item>
        <text:list-item>
          <text:p text:style-name="P22">− Documentación</text:p>
        </text:list-item>
        <text:list-item>
          <text:p text:style-name="P23">− Seguimiento de incidentes para evitar una situación similar.</text:p>
        </text:list-item>
      </text:list>
      <text:p text:style-name="P24"><text:span text:style-name="T8">5. </text:span>Detección y documentación de incidentes de ciberseguridad:</text:p>
      <text:list text:style-name="L5">
        <text:list-item>
          <text:list>
            <text:list-item>
              <text:p text:style-name="P25">− Desarrollar procedimientos de actuación para la notificación de incidentes.</text:p>
            </text:list-item>
            <text:list-item>
              <text:p text:style-name="P26">− Notificación interna de incidentes.</text:p>
            </text:list-item>
            <text:list-item>
              <text:p text:style-name="P27">− Notificación de incidentes a quienes corresponda.</text:p>
            </text:list-item>
          </text:list>
        </text:list-item>
      </text:list>
      <text:p text:style-name="P28"><text:a xlink:type="simple" xlink:href="https://www.jesusninoc.com/02/03/investigacion-de-los-incidentes-de-ciberseguridad-incidentes-de-ciberseguridad/" text:style-name="Internet_20_link" text:visited-style-name="Visited_20_Internet_20_Link"/></text:p>
      <text:p text:style-name="P28"><text:soft-page-break/></text:p>
      <text:p text:style-name="P29">Investigacion de incicentes de ciberseguridad</text:p>
      <text:p text:style-name="P28"><text:a xlink:type="simple" xlink:href="https://www.jesusninoc.com/02/03/investigacion-de-los-incidentes-de-ciberseguridad-incidentes-de-ciberseguridad/" text:style-name="Internet_20_link" text:visited-style-name="Visited_20_Internet_20_Link">https://www.jesusninoc.com/02/03/investigacion-de-los-incidentes-de-ciberseguridad-incidentes-de-ciberseguridad/</text:a></text:p>
      <text:p text:style-name="P28"/>
      <text:p text:style-name="P29">CETI CI</text:p>
      <text:p text:style-name="P28"><text:a xlink:type="simple" xlink:href="https://ciberninjas.com/ciberseguridad-asignatura-incidentes-de-ciberseguridad/" text:style-name="Internet_20_link" text:visited-style-name="Visited_20_Internet_20_Link">https://ciberninjas.com/ciberseguridad-asignatura-incidentes-de-ciberseguridad/</text:a></text:p>
      <text:p text:style-name="P28"/>
      <text:p text:style-name="P28">Cómo utilizar Grabify IP Logger o IPLogger</text:p>
      <text:p text:style-name="P28"><text:a xlink:type="simple" xlink:href="https://blog.elhacker.net/2022/01/como-utilizar-grabify-ip-logger-o-iplogger.html" text:style-name="Internet_20_link" text:visited-style-name="Visited_20_Internet_20_Link">https://blog.elhacker.net/2022/01/como-utilizar-grabify-ip-logger-o-iplogger.html</text:a></text:p>
      <text:p text:style-name="P28"/>
      <text:p text:style-name="P28">Ingeniería del Caos, War Games y la Resiliencia </text:p>
      <text:p text:style-name="P28"><text:a xlink:type="simple" xlink:href="https://blog.segu-info.com.ar/2024/01/ingenieria-del-caos-war-games-y-la.html" text:style-name="Internet_20_link" text:visited-style-name="Visited_20_Internet_20_Link">https://blog.segu-info.com.ar/2024/01/ingenieria-del-caos-war-games-y-la.html</text:a></text:p>
      <text:p text:style-name="P28"/>
      <text:p text:style-name="P28"/>
      <text:p text:style-name="P28"/>
      <text:p text:style-name="P30">Enlaces a recursos</text:p>
      <text:p text:style-name="P31">OSINT</text:p>
      <text:p text:style-name="P30"><text:a xlink:type="simple" xlink:href="https://derechodelared.com/osint-cheat-sheets/" text:style-name="Internet_20_link" text:visited-style-name="Visited_20_Internet_20_Link">https://derechodelared.com/osint-cheat-sheets/</text:a></text:p>
      <text:p text:style-name="P30"/>
      <text:p text:style-name="P30"><text:a xlink:type="simple" xlink:href="https://medium.com/@turkishhoodie010/16-osint-tools-d84a52496efb" text:style-name="Internet_20_link" text:visited-style-name="Visited_20_Internet_20_Link">https://medium.com/@turkishhoodie010/16-osint-tools-d84a52496efb</text:a></text:p>
      <text:p text:style-name="P30"><text:a xlink:type="simple" xlink:href="https://thehackerway.com/2022/05/31/10-herramientas-para-osint-y-ciberinteligencia-que-te-podrian-interesar/" text:style-name="Internet_20_link" text:visited-style-name="Visited_20_Internet_20_Link"/></text:p>
      <text:p text:style-name="P30"><text:a xlink:type="simple" xlink:href="https://thehackerway.com/2022/05/31/10-herramientas-para-osint-y-ciberinteligencia-que-te-podrian-interesar/" text:style-name="Internet_20_link" text:visited-style-name="Visited_20_Internet_20_Link">https://thehackerway.com/2022/05/31/10-herramientas-para-osint-y-ciberinteligencia-que-te-podrian-interesar/</text:a></text:p>
      <text:p text:style-name="P30"><text:a xlink:type="simple" xlink:href="https://medium.com/@turkishhoodie010/16-osint-tools-d84a52496efb" text:style-name="Internet_20_link" text:visited-style-name="Visited_20_Internet_20_Link">https://medium.com/@turkishhoodie010/16-osint-tools-d84a52496efb</text:a></text:p>
      <text:p text:style-name="P30"/>
      <text:p text:style-name="P30"><text:a xlink:type="simple" xlink:href="https://www.comunixgroup.com/5-webs-de-osint-y-reconocimiento/#utm_campaign=5-webs-de-osint-y-reconocimiento" text:style-name="Internet_20_link" text:visited-style-name="Visited_20_Internet_20_Link">https://www.comunixgroup.com/5-webs-de-osint-y-reconocimiento/#utm_campaign=5-webs-de-osint-y-reconocimiento</text:a></text:p>
      <text:p text:style-name="P32"/>
      <text:p text:style-name="P32">OSINT. <text:s text:c="3"/>WhatsappINT</text:p>
      <text:p text:style-name="P32"><text:a xlink:type="simple" xlink:href="https://www.elladodelmal.com/2024/01/whatsapp-int-como-buscar-y-encontrar.html" text:style-name="Internet_20_link" text:visited-style-name="Visited_20_Internet_20_Link">https://www.elladodelmal.com/2024/01/whatsapp-int-como-buscar-y-encontrar.html</text:a></text:p>
      <text:p text:style-name="P32"><text:a xlink:type="simple" xlink:href="https://deephacking.tech/de-una-postal-antigua-a-la-ubicacion-actual-exacta-osint/" text:style-name="Internet_20_link" text:visited-style-name="Visited_20_Internet_20_Link">https://deephacking.tech/de-una-postal-antigua-a-la-ubicacion-actual-exacta-osint/</text:a></text:p>
      <text:p text:style-name="P32"><text:span text:style-name="T9">Busca datos privados que hayan sido filtrados en internet. <text:s/></text:span>Leakpeek.<text:span text:style-name="T10">com</text:span><text:span text:style-name="T9"><text:line-break/></text:span><text:a xlink:type="simple" xlink:href="https://www.instagram.com/reel/C2VNPBPNnks/?igsh=NDU4eW00bXZ5Nmpn" text:style-name="Internet_20_link" text:visited-style-name="Visited_20_Internet_20_Link"><text:span text:style-name="T9">https://www.instagram.com/reel/C2VNPBPNnks/?igsh=NDU4eW00bXZ5Nmpn</text:span></text:a></text:p>
      <text:p text:style-name="P32"/>
      <text:p text:style-name="P31">AForense</text:p>
      <text:p text:style-name="P33">Autopsy Revelado</text:p>
      <text:p text:style-name="P33"><text:a xlink:type="simple" xlink:href="https://www.youtube.com/watch?app=desktop&amp;v=BRFHw-ythl8" text:style-name="Internet_20_link" text:visited-style-name="Visited_20_Internet_20_Link">https://www.youtube.com/watch?app=desktop&amp;v=BRFHw-ythl8</text:a></text:p>
      <text:p text:style-name="P34">Herramientas</text:p>
      <text:p text:style-name="P30"><text:a xlink:type="simple" xlink:href="https://www.hackplayers.com/2013/10/herramientas-analisis-forense-memoria-linux.html" text:style-name="Internet_20_link" text:visited-style-name="Visited_20_Internet_20_Link">https://www.hackplayers.com/2013/10/herramientas-analisis-forense-memoria-linux.html</text:a></text:p>
      <text:p text:style-name="P34">distro tsorgi</text:p>
      <text:p text:style-name="P30"><text:a xlink:type="simple" xlink:href="https://tsurugi-linux.org/index.php" text:style-name="Internet_20_link" text:visited-style-name="Visited_20_Internet_20_Link">https://tsurugi-linux.org/index.php</text:a></text:p>
      <text:p text:style-name="P34">discos de rescate</text:p>
      <text:p text:style-name="P30"><text:a xlink:type="simple" xlink:href="https://blog.elhacker.net/2021/12/mejores-discos-de-rescate-para-recuperar-ficheros-reparar-windows-o-linux.html" text:style-name="Internet_20_link" text:visited-style-name="Visited_20_Internet_20_Link">https://blog.elhacker.net/2021/12/mejores-discos-de-rescate-para-recuperar-ficheros-reparar-windows-o-linux.html</text:a></text:p>
      <text:p text:style-name="P34">mitre</text:p>
      <text:p text:style-name="P30"><text:a xlink:type="simple" xlink:href="https://www.incibe-cert.es/blog/matriz-mitre-tacticas-y-tecnicas-entornos-industriales" text:style-name="Internet_20_link" text:visited-style-name="Visited_20_Internet_20_Link">https://www.incibe-cert.es/blog/matriz-mitre-tacticas-y-tecnicas-entornos-industriales</text:a></text:p>
      <text:p text:style-name="P34">revisar archivos pdf</text:p>
      <text:p text:style-name="P30"><text:a xlink:type="simple" xlink:href="https://noticiasseguridad.com/tutoriales/como-realizar-informatica-forense-en-archivos-pdf-maliciosos-revisa-si-este-pdf-contiene-malware-o-backdoors/" text:style-name="Internet_20_link" text:visited-style-name="Visited_20_Internet_20_Link">https://noticiasseguridad.com/tutoriales/como-realizar-informatica-forense-en-archivos-pdf-maliciosos-revisa-si-este-pdf-contiene-malware-o-backdoors/</text:a></text:p>
      <text:p text:style-name="P34">herramienta captura memoria</text:p>
      <text:p text:style-name="P31"><text:a xlink:type="simple" xlink:href="https://noticiasseguridad.com/tutoriales/collect-memorydump-una-gran-herramienta-para-el-analisis-forense-digital-para-crear-automaticamente-instantaneas-de-memoria-de-windows/" text:style-name="Internet_20_link" text:visited-style-name="Visited_20_Internet_20_Link"><text:soft-page-break/>https://noticiasseguridad.com/tutoriales/collect-memorydump-una-gran-herramienta-para-el-analisis-forense-digital-para-crear-automaticamente-instantaneas-de-memoria-de-windows/</text:a></text:p>
      <text:p text:style-name="P35">Toma de evidencias en entornos Windows</text:p>
      <text:p text:style-name="P35"><text:a xlink:type="simple" xlink:href="https://www.incibe-cert.es/sites/default/files/contenidos/guias/doc/incibe_toma_evidencias_analisis_forense.pdf" text:style-name="Internet_20_link" text:visited-style-name="Visited_20_Internet_20_Link">https://www.incibe-cert.es/sites/default/files/contenidos/guias/doc/incibe_toma_evidencias_analisis_forense.pdf</text:a></text:p>
      <text:p text:style-name="P32">Cómo VER las CONTRASEÑAS GUARDADAS en SAFARI MAC</text:p>
      <text:p text:style-name="P32"><text:a xlink:type="simple" xlink:href="https://www.youtube.com/watch?v=epqdPXuAweM" text:style-name="Internet_20_link" text:visited-style-name="Visited_20_Internet_20_Link">https://www.youtube.com/watch?v=epqdPXuAweM</text:a></text:p>
      <text:p text:style-name="P32">Como Recuperar Contraseñas Guardadas En El Navegador GOOGLE CHROME</text:p>
      <text:p text:style-name="P32"><text:a xlink:type="simple" xlink:href="https://www.youtube.com/watch?v=IuNbLJkxyeM" text:style-name="Internet_20_link" text:visited-style-name="Visited_20_Internet_20_Link">https://www.youtube.com/watch?v=IuNbLJkxyeM</text:a></text:p>
      <text:p text:style-name="P32">Cómo desencriptar contraseñas de Firefox</text:p>
      <text:p text:style-name="P32"><text:a xlink:type="simple" xlink:href="https://www.youtube.com/watch?v=O36DuYHr89U" text:style-name="Internet_20_link" text:visited-style-name="Visited_20_Internet_20_Link">https://www.youtube.com/watch?v=O36DuYHr89U</text:a></text:p>
      <text:p text:style-name="P32"/>
      <text:p text:style-name="P32">A red team tool that assists into extracting/dumping master credentials and/or entries from different password managers</text:p>
      <text:p text:style-name="P32"><text:a xlink:type="simple" xlink:href="https://github.com/efchatz/pandora" text:style-name="Internet_20_link" text:visited-style-name="Visited_20_Internet_20_Link">https://github.com/efchatz/pandora</text:a></text:p>
      <text:p text:style-name="P32"><text:a xlink:type="simple" xlink:href="https://blog.segu-info.com.ar/2024/01/pandora-extraer-credenciales-de.html" text:style-name="Internet_20_link" text:visited-style-name="Visited_20_Internet_20_Link">https://blog.segu-info.com.ar/2024/01/pandora-extraer-credenciales-de.html</text:a></text:p>
      <text:p text:style-name="P31"/>
      <text:p text:style-name="P31">PDF incibe – <text:span text:style-name="T11">guia notificación incidentes</text:span></text:p>
      <text:p text:style-name="P31"><text:a xlink:type="simple" xlink:href="https://www.incibe.es/sites/default/files/contenidos/guias/doc/guia_nacional_notificacion_gestion_ciberincidentes.pdf" text:style-name="Internet_20_link" text:visited-style-name="Visited_20_Internet_20_Link">https://www.incibe.es/sites/default/files/contenidos/guias/doc/guia_nacional_notificacion_gestion_ciberincidentes.pdf</text:a></text:p>
      <text:p text:style-name="P30"><text:a xlink:type="simple" xlink:href="https://www.incibe.es/incibe-cert/guias-y-estudios/guias/guia-nacional-de-notificacion-y-gestion-de-ciberincidentes" text:style-name="Internet_20_link" text:visited-style-name="Visited_20_Internet_20_Link">https://www.incibe.es/incibe-cert/guias-y-estudios/guias/guia-nacional-de-notificacion-y-gestion-de-ciberincidentes</text:a></text:p>
      <text:p text:style-name="P30"/>
      <text:p text:style-name="P34">analisis malware</text:p>
      <text:p text:style-name="P30"><text:a xlink:type="simple" xlink:href="https://www.welivesecurity.com/la-es/2021/10/28/herramientas-gratuitas-analisis-malware/" text:style-name="Internet_20_link" text:visited-style-name="Visited_20_Internet_20_Link">https://www.welivesecurity.com/la-es/2021/10/28/herramientas-gratuitas-analisis-malware/</text:a></text:p>
      <text:p text:style-name="P30"/>
      <text:p text:style-name="P30">La Unión Europea refuerza su ciberseguridad y resiliencia con la aprobación de la directiva NIS 2</text:p>
      <text:p text:style-name="P30"><text:a xlink:type="simple" xlink:href="https://www.ccn-cert.cni.es/seguridad-al-dia/actualidad-ccn/11799-la-union-europea-refuerza-su-ciberseguridad-y-resiliencia-con-la-aprobacion-de-la-directiva-nis-2.html" text:style-name="Internet_20_link" text:visited-style-name="Visited_20_Internet_20_Link">https://www.ccn-cert.cni.es/seguridad-al-dia/actualidad-ccn/11799-la-union-europea-refuerza-su-ciberseguridad-y-resiliencia-con-la-aprobacion-de-la-directiva-nis-2.html</text:a></text:p>
      <text:p text:style-name="P30"/>
      <text:p text:style-name="P30"/>
      <text:p text:style-name="P30"/>
      <text:p text:style-name="P36">Exfiltracion datos</text:p>
      <text:p text:style-name="P36"><text:a xlink:type="simple" xlink:href="https://www.hackplayers.com/2022/03/icmp-transfertools-transfiriendo-por-icmp.html" text:style-name="Internet_20_link" text:visited-style-name="Visited_20_Internet_20_Link">https://www.hackplayers.com/2022/03/icmp-transfertools-transfiriendo-por-icmp.html</text:a></text:p>
      <text:p text:style-name="P36"/>
      <text:p text:style-name="P37">virus encriptador ENCRYPTED</text:p>
      <text:p text:style-name="P36"><text:a xlink:type="simple" xlink:href="https://www.pcrisk.es/guias-de-desinfeccion/8257-encrypted-ransomware" text:style-name="Internet_20_link" text:visited-style-name="Visited_20_Internet_20_Link">https://www.pcrisk.es/guias-de-desinfeccion/8257-encrypted-ransomware</text:a></text:p>
      <text:p text:style-name="P36"><text:a xlink:type="simple" xlink:href="https://www.redeszone.net/tutoriales/seguridad/bash-bunny-usb-hacking/" text:style-name="Internet_20_link" text:visited-style-name="Visited_20_Internet_20_Link"/></text:p>
      <text:p text:style-name="P37">Bash Bunny</text:p>
      <text:p text:style-name="P36"><text:a xlink:type="simple" xlink:href="https://www.redeszone.net/tutoriales/seguridad/bash-bunny-usb-hacking/" text:style-name="Internet_20_link" text:visited-style-name="Visited_20_Internet_20_Link">https://www.redeszone.net/tutoriales/seguridad/bash-bunny-usb-hacking/</text:a></text:p>
      <text:p text:style-name="P36"/>
      <text:p text:style-name="P37">Ataque POODLE <text:s/>(SSL 3.0)</text:p>
      <text:p text:style-name="P36"><text:a xlink:type="simple" xlink:href="https://www.redeszone.net/tutoriales/seguridad/que-son-ataques-poodle/" text:style-name="Internet_20_link" text:visited-style-name="Visited_20_Internet_20_Link">https://www.redeszone.net/tutoriales/seguridad/que-son-ataques-poodle/</text:a></text:p>
      <text:p text:style-name="P36"/>
      <text:p text:style-name="P37">Inyeccion de comandos</text:p>
      <text:p text:style-name="P37"><text:a xlink:type="simple" xlink:href="https://www.redeszone.net/tutoriales/seguridad/que-son-ataques-inyeccion-comandos/" text:style-name="Internet_20_link" text:visited-style-name="Visited_20_Internet_20_Link">https://www.redeszone.net/tutoriales/seguridad/que-son-ataques-inyeccion-comandos/</text:a></text:p>
      <text:p text:style-name="P37"/>
      <text:p text:style-name="P37">Analiza la cabecera de un correo para buscar amenazas</text:p>
      <text:p text:style-name="P37"><text:a xlink:type="simple" xlink:href="https://www.redeszone.net/tutoriales/seguridad/analizar-header-correo-amenazas/" text:style-name="Internet_20_link" text:visited-style-name="Visited_20_Internet_20_Link"><text:soft-page-break/>https://www.redeszone.net/tutoriales/seguridad/analizar-header-correo-amenazas/</text:a></text:p>
      <text:p text:style-name="P37"><text:a xlink:type="simple" xlink:href="https://keepcoding.io/blog/como-analizar-un-correo-electronico/" text:style-name="Internet_20_link" text:visited-style-name="Visited_20_Internet_20_Link">https://keepcoding.io/blog/como-analizar-un-correo-electronico/</text:a></text:p>
      <text:p text:style-name="P37"><text:a xlink:type="simple" xlink:href="https://www.kaspersky.es/blog/analyzing-mail-header/26307/" text:style-name="Internet_20_link" text:visited-style-name="Visited_20_Internet_20_Link">https://www.kaspersky.es/blog/analyzing-mail-header/26307/</text:a></text:p>
      <text:p text:style-name="P37">Conoce qué pueden hacer si entran o hackean tu e-mail</text:p>
      <text:p text:style-name="P37"><text:a xlink:type="simple" xlink:href="https://www.redeszone.net/tutoriales/seguridad/intrusos-correo-consejos-seguridad/" text:style-name="Internet_20_link" text:visited-style-name="Visited_20_Internet_20_Link">https://www.redeszone.net/tutoriales/seguridad/intrusos-correo-consejos-seguridad/</text:a></text:p>
      <text:p text:style-name="P37"><text:a xlink:type="simple" xlink:href="https://www.kaspersky.es/blog/analyzing-mail-header/26307/" text:style-name="Internet_20_link" text:visited-style-name="Visited_20_Internet_20_Link">https://www.kaspersky.es/blog/analyzing-mail-header/26307/</text:a></text:p>
      <text:p text:style-name="P37"/>
      <text:p text:style-name="P37">CISA lanza la herramienta gratuita ‘Decider’</text:p>
      <text:p text:style-name="P37"><text:a xlink:type="simple" xlink:href="https://derechodelared.com/cisa-decider-mitre-attck/" text:style-name="Internet_20_link" text:visited-style-name="Visited_20_Internet_20_Link">https://derechodelared.com/cisa-decider-mitre-attck/</text:a></text:p>
      <text:p text:style-name="P37"/>
      <text:p text:style-name="P38">Analisis de Logs</text:p>
      <text:p text:style-name="P37"><text:a xlink:type="simple" xlink:href="https://keepcoding.io/blog/que-es-el-analisis-de-logs/" text:style-name="Internet_20_link" text:visited-style-name="Visited_20_Internet_20_Link">https://keepcoding.io/blog/que-es-el-analisis-de-logs/</text:a></text:p>
      <text:p text:style-name="P37"><text:a xlink:type="simple" xlink:href="https://www.elastic.co/es/what-is/log-analytics" text:style-name="Internet_20_link" text:visited-style-name="Visited_20_Internet_20_Link">https://www.elastic.co/es/what-is/log-analytics</text:a></text:p>
      <text:p text:style-name="P37"><text:a xlink:type="simple" xlink:href="https://es.ryte.com/wiki/Análisis_de_Log_Files" text:style-name="Internet_20_link" text:visited-style-name="Visited_20_Internet_20_Link">https://es.ryte.com/wiki/An%C3%A1lisis_de_Log_Files</text:a></text:p>
      <text:p text:style-name="P37"><text:a xlink:type="simple" xlink:href="https://wanatopacademy.es/blog/analisis-logs-seo/" text:style-name="Internet_20_link" text:visited-style-name="Visited_20_Internet_20_Link">https://wanatopacademy.es/blog/analisis-logs-seo/</text:a></text:p>
      <text:p text:style-name="P37"/>
      <text:p text:style-name="P37"/>
      <text:p text:style-name="P37">Análisis de logs en caso de incidente ¿qué revisar?</text:p>
      <text:p text:style-name="P37"><text:a xlink:type="simple" xlink:href="https://es.scassi.com/es/temas-de-actualidad/analisis-de-logs-en-caso-de-incidente-que-revisar" text:style-name="Internet_20_link" text:visited-style-name="Visited_20_Internet_20_Link">https://es.scassi.com/es/temas-de-actualidad/analisis-de-logs-en-caso-de-incidente-que-revisar</text:a></text:p>
      <text:p text:style-name="P37"/>
      <text:p text:style-name="P37"><text:a xlink:type="simple" xlink:href="https://www.servicepilot.com/en/blog/checklist-critical-logs-review-security-incident-analysis/" text:style-name="Internet_20_link" text:visited-style-name="Visited_20_Internet_20_Link">https://www.servicepilot.com/en/blog/checklist-critical-logs-review-security-incident-analysis/</text:a></text:p>
      <text:p text:style-name="P37"/>
      <text:p text:style-name="P37"><text:a xlink:type="simple" xlink:href="https://www.onpage.com/the-importance-of-log-monitoring-for-incident-response/" text:style-name="Internet_20_link" text:visited-style-name="Visited_20_Internet_20_Link">https://www.onpage.com/the-importance-of-log-monitoring-for-incident-response/</text:a></text:p>
      <text:p text:style-name="P37"/>
      <text:p text:style-name="P37"><text:a xlink:type="simple" xlink:href="https://www.crowdstrike.com/cybersecurity-101/observability/log-analysis/" text:style-name="Internet_20_link" text:visited-style-name="Visited_20_Internet_20_Link">https://www.crowdstrike.com/cybersecurity-101/observability/log-analysis/</text:a></text:p>
      <text:p text:style-name="P37"><text:a xlink:type="simple" xlink:href="https://www.digitalguardian.com/blog/what-log-analysis-use-cases-best-practices-and-more" text:style-name="Internet_20_link" text:visited-style-name="Visited_20_Internet_20_Link">https://www.digitalguardian.com/blog/what-log-analysis-use-cases-best-practices-and-more</text:a></text:p>
      <text:p text:style-name="P39"/>
      <text:p text:style-name="P39"/>
      <text:p text:style-name="P40">Analisis de logs</text:p>
      <text:p text:style-name="P37"/>
      <text:p text:style-name="P37"><draw:frame draw:style-name="fr1" draw:name="Imagen1" text:anchor-type="char" svg:x="0.783cm" svg:y="0.049cm" svg:width="15.963cm" svg:height="22.578cm" draw:z-index="0"><draw:image xlink:href="Pictures/10000000000003890000050023BF5C1E.jpg" xlink:type="simple" xlink:show="embed" xlink:actuate="onLoad" draw:mime-type="image/jpeg"/></draw:frame></text:p>
      <text:p text:style-name="P37"/>
      <text:p text:style-name="P37"/>
      <text:p text:style-name="P37"/>
      <text:p text:style-name="P37"><text:soft-page-break/></text:p>
      <text:p text:style-name="P41">Preparar practica de analizar malware</text:p>
      <text:p text:style-name="P41">Donde descargar malware</text:p>
      <text:p text:style-name="P41"/>
      <text:p text:style-name="P41"><text:a xlink:type="simple" xlink:href="https://blog.segu-info.com.ar/2022/11/descargar-muestras-de-malware-actuales.html" text:style-name="Internet_20_link" text:visited-style-name="Visited_20_Internet_20_Link">https://blog.segu-info.com.ar/2022/11/descargar-muestras-de-malware-actuales.html</text:a></text:p>
      <text:p text:style-name="P41"/>
      <text:p text:style-name="P41"><text:a xlink:type="simple" xlink:href="https://www.hackplayers.com/2022/11/donde-descargar-muestras-de-malware.html" text:style-name="Internet_20_link" text:visited-style-name="Visited_20_Internet_20_Link">https://www.hackplayers.com/2022/11/donde-descargar-muestras-de-malware.html</text:a></text:p>
      <text:p text:style-name="P41"/>
      <text:p text:style-name="P41"><text:a xlink:type="simple" xlink:href="https://www.hackplayers.com/2016/10/recopilatorio-de-recursos-de-analisis-malware.html" text:style-name="Internet_20_link" text:visited-style-name="Visited_20_Internet_20_Link">https://www.hackplayers.com/2016/10/recopilatorio-de-recursos-de-analisis-malware.html</text:a></text:p>
      <text:p text:style-name="P41"/>
      <text:p text:style-name="P41"><text:a xlink:type="simple" xlink:href="https://protegermipc.net/2017/06/22/donde-descargar-virus-malware/" text:style-name="Internet_20_link" text:visited-style-name="Visited_20_Internet_20_Link">https://protegermipc.net/2017/06/22/donde-descargar-virus-malware/</text:a></text:p>
      <text:p text:style-name="P41"/>
      <text:h text:style-name="P42" text:outline-level="3"><text:span text:style-name="Strong_20_Emphasis">Repositorios públicos de malware para investigación</text:span></text:h>
      <text:p text:style-name="Text_20_body">Hay plataformas diseñadas para compartir muestras de malware de manera responsable con fines educativos y de investigación:</text:p>
      <text:list text:style-name="L6">
        <text:list-item>
          <text:p text:style-name="P43"><text:a xlink:type="simple" xlink:href="https://github.com/ytisf/theZoo" office:target-frame-name="_new" xlink:show="replace" text:style-name="Internet_20_link" text:visited-style-name="Visited_20_Internet_20_Link"><text:span text:style-name="Strong_20_Emphasis">TheZoo</text:span></text:a><text:span text:style-name="Strong_20_Emphasis">: <text:s/></text:span><text:a xlink:type="simple" xlink:href="https://github.com/ytisf/theZoo" text:style-name="Internet_20_link" text:visited-style-name="Visited_20_Internet_20_Link"><text:span text:style-name="Strong_20_Emphasis">https://github.com/ytisf/theZoo</text:span></text:a><text:span text:style-name="Strong_20_Emphasis"> <text:s/></text:span></text:p>
          <text:list>
            <text:list-item>
              <text:p text:style-name="P44">Repositorio de GitHub que contiene muestras de malware conocidas, incluidas variantes de ransomware como WannaCry y Locky. Ofrecen tanto binarios como información sobre cada malware.</text:p>
            </text:list-item>
            <text:list-item>
              <text:p text:style-name="P44"><text:span text:style-name="Strong_20_Emphasis">Nota:</text:span> Tendrás que demostrar que usas las muestras con fines legítimos.</text:p>
            </text:list-item>
          </text:list>
        </text:list-item>
        <text:list-item>
          <text:p text:style-name="P43"><text:a xlink:type="simple" xlink:href="https://malshare.com/" office:target-frame-name="_new" xlink:show="replace" text:style-name="Internet_20_link" text:visited-style-name="Visited_20_Internet_20_Link"><text:span text:style-name="Strong_20_Emphasis">MalShare</text:span></text:a><text:span text:style-name="Strong_20_Emphasis">: <text:s/></text:span><text:a xlink:type="simple" xlink:href="https://malshare.com/" text:style-name="Internet_20_link" text:visited-style-name="Visited_20_Internet_20_Link"><text:span text:style-name="Strong_20_Emphasis">https://malshare.com/</text:span></text:a><text:span text:style-name="Strong_20_Emphasis"> </text:span></text:p>
          <text:list>
            <text:list-item>
              <text:p text:style-name="P44">Repositorio gratuito que ofrece muestras de malware, incluyendo ransomware. Es necesario registrarse para acceder a los archivos.</text:p>
            </text:list-item>
          </text:list>
        </text:list-item>
        <text:list-item>
          <text:p text:style-name="P43"><text:a xlink:type="simple" xlink:href="https://virusshare.com/" office:target-frame-name="_new" xlink:show="replace" text:style-name="Internet_20_link" text:visited-style-name="Visited_20_Internet_20_Link"><text:span text:style-name="Strong_20_Emphasis">VirusShare</text:span></text:a><text:span text:style-name="Strong_20_Emphasis">: </text:span><text:a xlink:type="simple" xlink:href="https://virusshare.com/" text:style-name="Internet_20_link" text:visited-style-name="Visited_20_Internet_20_Link"><text:span text:style-name="Strong_20_Emphasis">https://virusshare.com/</text:span></text:a><text:span text:style-name="Strong_20_Emphasis"> </text:span></text:p>
          <text:list>
            <text:list-item>
              <text:p text:style-name="P44">Una base de datos extensa de malware con una amplia variedad de muestras. Se requiere una cuenta para acceder.</text:p>
            </text:list-item>
          </text:list>
        </text:list-item>
        <text:list-item>
          <text:p text:style-name="P43"><text:a xlink:type="simple" xlink:href="https://www.hybrid-analysis.com/" office:target-frame-name="_new" xlink:show="replace" text:style-name="Internet_20_link" text:visited-style-name="Visited_20_Internet_20_Link"><text:span text:style-name="Strong_20_Emphasis">Hybrid Analysis</text:span></text:a><text:span text:style-name="Strong_20_Emphasis">: <text:s/>https://www.hybrid-analysis.com/</text:span></text:p>
          <text:list>
            <text:list-item>
              <text:p text:style-name="P43">Plataforma de análisis dinámico que permite descargar muestras después de revisar su comportamiento.</text:p>
            </text:list-item>
          </text:list>
        </text:list-item>
      </text:list>
      <text:p text:style-name="P45"/>
      <text:p text:style-name="P41"/>
      <text:p text:style-name="P46">malware traffic analysis. Exercicis, exemples <text:s/>(pcap amb malware)</text:p>
      <text:p text:style-name="P46"><text:a xlink:type="simple" xlink:href="https://www.malware-traffic-analysis.net/index.html" text:style-name="Internet_20_link" text:visited-style-name="Visited_20_Internet_20_Link">https://www.malware-traffic-analysis.net/index.html</text:a></text:p>
      <text:p text:style-name="P46"/>
      <text:p text:style-name="P46"/>
      <text:p text:style-name="P46"><text:a xlink:type="simple" xlink:href="https://start.paloaltonetworks.com/2023-unit42-ransomware-extortion-report" text:style-name="Internet_20_link" text:visited-style-name="Visited_20_Internet_20_Link">https://start.paloaltonetworks.com/2023-unit42-ransomware-extortion-report</text:a></text:p>
      <text:p text:style-name="P46"/>
      <text:p text:style-name="P47">como funciona un ransomware</text:p>
      <text:p text:style-name="P47"><text:a xlink:type="simple" xlink:href="https://www.instagram.com/reel/C-nX2dFtPV9/?igsh=MWEycXQ5Y3IyM3gxNA%3D%3D" text:style-name="Internet_20_link" text:visited-style-name="Visited_20_Internet_20_Link">https://www.instagram.com/reel/C-nX2dFtPV9/?igsh=MWEycXQ5Y3IyM3gxNA%3D%3D</text:a></text:p>
      <text:p text:style-name="P47"/>
      <text:p text:style-name="P48"/>
      <text:p text:style-name="P49"/>
      <text:p text:style-name="P48"><text:a xlink:type="simple" xlink:href="https://www.ransomwarehelp.com/es/tipos-de-ransomware/tipos-de-ransomware/" text:style-name="Internet_20_link" text:visited-style-name="Visited_20_Internet_20_Link"><text:span text:style-name="T12">https://www.ransomwarehelp.com/es/tipos-de-ransomware/tipos-de-ransomware/</text:span></text:a></text:p>
      <text:p text:style-name="P48"><text:a xlink:type="simple" xlink:href="https://www.ransomwarehelp.com/es/tipos-de-ransomware/ransomware-como-servicio-raas/" text:style-name="Internet_20_link" text:visited-style-name="Visited_20_Internet_20_Link"><text:span text:style-name="T12">https://www.ransomwarehelp.com/es/tipos-de-ransomware/ransomware-como-servicio-raas/</text:span></text:a><text:span text:style-name="T12"> </text:span></text:p>
      <text:p text:style-name="P49"/>
      <text:p text:style-name="P48"><text:soft-page-break/></text:p>
      <text:p text:style-name="P48"/>
      <text:p text:style-name="P48"/>
      <text:p text:style-name="P48"/>
      <text:p text:style-name="P48">Alteración de evidencias I – Modificación de timestamps</text:p>
      <text:p text:style-name="P47"><text:a xlink:type="simple" xlink:href="https://defsec.noblogs.org/alteracion-de-evidencias-i-modificacion-de-timestamps/" text:style-name="Internet_20_link" text:visited-style-name="Visited_20_Internet_20_Link">https://defsec.noblogs.org/alteracion-de-evidencias-i-modificacion-de-timestamps/</text:a></text:p>
      <text:p text:style-name="P47"/>
      <text:p text:style-name="P47"/>
      <text:p text:style-name="P47">European alternatives for popular services</text:p>
      <text:p text:style-name="P47"><text:a xlink:type="simple" xlink:href="https://european-alternatives.eu/alternatives-to" text:style-name="Internet_20_link" text:visited-style-name="Visited_20_Internet_20_Link">https://european-alternatives.eu/alternatives-to</text:a></text:p>
      <text:p text:style-name="P47"/>
      <text:p text:style-name="P47"/>
      <text:p text:style-name="P47"/>
      <text:p text:style-name="P47"/>
      <text:p text:style-name="P47"/>
      <text:p text:style-name="P50"><text:s/>!!COMO BAJAR RANSOMWARE !! <text:s/><text:span text:style-name="T13">PELIGRO</text:span> !!!!!!! <text:s/><text:span text:style-name="T13">PELIGRO</text:span> !!!!!!!</text:p>
      <text:p text:style-name="P51">================================================</text:p>
      <text:p text:style-name="P52">Crear cuenta temporal <text:s/>en <text:s/>temp-mail.org/es</text:p>
      <text:p text:style-name="P52">niloji1953@citdaca.com</text:p>
      <text:p text:style-name="P52">registro en malshare</text:p>
      <text:p text:style-name="P52"/>
      <text:p text:style-name="P52">Thank you for your interest in the MalShare research project. Below, you'll find your registrant name, email, and API key.</text:p>
      <text:p text:style-name="P53">Name : niloji<text:line-break/>Email : <text:a xlink:type="simple" xlink:href="mailto:niloji1953@citdaca.com" text:style-name="Internet_20_link" text:visited-style-name="Visited_20_Internet_20_Link">niloji1953@citdaca.com</text:a><text:line-break/>API Key : 98bb11a75bd668b737a29df4a9ee9a5c35970a2669a8d6d2a1ed16fc86bf9078</text:p>
      <text:p text:style-name="P53">Your free API key will allow you to pull 2000 samples per day. If you require more or have additional feature requests, please contact <text:a xlink:type="simple" xlink:href="mailto:Admin@MalShare.com" text:style-name="Internet_20_link" text:visited-style-name="Visited_20_Internet_20_Link">Admin@MalShare.com</text:a>.</text:p>
      <text:p text:style-name="P53">If you would like to show your support for the MalShare Project, please consider donating via paypal.</text:p>
      <text:p text:style-name="P53">Donate : <text:a xlink:type="simple" xlink:href="http://www.malshare.com/donate.php" text:style-name="Internet_20_link" text:visited-style-name="Visited_20_Internet_20_Link">www.malshare.com/donate.php</text:a><text:line-break/>Resources : <text:a xlink:type="simple" xlink:href="https://github.com/malshare" text:style-name="Internet_20_link" text:visited-style-name="Visited_20_Internet_20_Link">https://github.com/malshare</text:a></text:p>
      <text:p text:style-name="P53">The MalShare Project Team<text:line-break/><text:a xlink:type="simple" xlink:href="http://www.malshare.com/" text:style-name="Internet_20_link" text:visited-style-name="Visited_20_Internet_20_Link">www.malshare.com</text:a></text:p>
      <text:p text:style-name="P52"/>
      <text:p text:style-name="P45"/>
      <text:p text:style-name="P51">Para buscar un virus, primero buscamos firmas del virus ( sha256 ) en paginas como securesoft o incibe, etc.</text:p>
      <text:p text:style-name="P51">Luego en la pagina de malshare, en buscar, pegamos el hash y le damos a buscar.</text:p>
      <text:p text:style-name="P51">No encuentra todos, hay que ir probando….</text:p>
      <text:p text:style-name="P51"/>
      <text:p text:style-name="P54">Altra forma</text:p>
      <text:p text:style-name="P54">Buscar en google <text:s text:c="2"/>el nom del ransom, + malware <text:s/>bazaar</text:p>
      <text:p text:style-name="P54">En bazaar.abuse.ch <text:s/>no cal registre per baixar els zips “infected”</text:p>
      <text:p text:style-name="P51">================================================</text:p>
      <text:p text:style-name="P51"/>
      <text:p text:style-name="P51"/>
      <text:p text:style-name="P51"/>
      <text:p text:style-name="P51"><text:soft-page-break/></text:p>
      <text:p text:style-name="P51">Crea tu propio SOC con tecnología Open Source</text:p>
      <text:p text:style-name="P51"><text:a xlink:type="simple" xlink:href="https://cylum.tech/articulos/crea-tu-propio-soc-con-tecnologia-open-source/" text:style-name="Internet_20_link" text:visited-style-name="Visited_20_Internet_20_Link">https://cylum.tech/articulos/crea-tu-propio-soc-con-tecnologia-open-source/</text:a></text:p>
      <text:p text:style-name="P51"/>
      <text:p text:style-name="P5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style:rfc-language-tag="ca-ES-valencia" fo:language="ca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style:rfc-language-tag="ca-ES-valencia" fo:language="ca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color="#000000" loext:opacity="100%" style:text-line-through-style="none" style:text-line-through-type="none" style:font-name="Arial1" fo:font-family="Arial" style:font-family-generic="swiss" style:font-pitch="variable" fo:font-size="12pt" style:text-underline-style="none" fo:font-weight="normal" officeooo:rsid="004960d7" style:font-size-asian="12pt" style:font-weight-asian="normal" style:font-size-complex="12pt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Pa12" style:family="paragraph" style:parent-style-name="Default" style:default-outline-level="">
      <style:paragraph-properties style:line-height-at-least="0.355cm"/>
    </style:style>
    <style:style style:name="Pa6" style:family="paragraph" style:parent-style-name="Default" style:default-outline-level="">
      <style:paragraph-properties style:line-height-at-least="0.355cm"/>
    </style:style>
    <style:style style:name="Pa20" style:family="paragraph" style:parent-style-name="Default" style:default-outline-level="">
      <style:paragraph-properties style:line-height-at-least="0.355cm"/>
    </style:style>
    <style:style style:name="Pa18" style:family="paragraph" style:parent-style-name="Default" style:default-outline-level="">
      <style:paragraph-properties style:line-height-at-least="0.355cm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chapter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>
      <style:text-properties style:font-name="Arial1" fo:font-family="Arial" style:font-family-generic="swiss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WW_5f_CharLFO1LVL1" style:display-name="WW_CharLFO1LVL1" style:family="text">
      <style:text-properties style:font-name="Arial1" fo:font-family="Arial" style:font-family-generic="swiss" style:font-pitch="variable"/>
    </style:style>
    <style:style style:name="WW_5f_CharLFO1LVL3" style:display-name="WW_CharLFO1LVL3" style:family="text">
      <style:text-properties style:font-name="Arial1" fo:font-family="Arial" style:font-family-generic="swiss" style:font-pitch="variable"/>
    </style:style>
    <style:style style:name="WW_5f_CharLFO1LVL4" style:display-name="WW_CharLFO1LVL4" style:family="text">
      <style:text-properties style:font-name="Arial1" fo:font-family="Arial" style:font-family-generic="swiss" style:font-pitch="variable"/>
    </style:style>
    <style:style style:name="WW_5f_CharLFO1LVL5" style:display-name="WW_CharLFO1LVL5" style:family="text">
      <style:text-properties style:font-name="Arial1" fo:font-family="Arial" style:font-family-generic="swiss" style:font-pitch="variable"/>
    </style:style>
    <style:style style:name="WW_5f_CharLFO1LVL6" style:display-name="WW_CharLFO1LVL6" style:family="text">
      <style:text-properties style:font-name="Arial1" fo:font-family="Arial" style:font-family-generic="swiss" style:font-pitch="variable"/>
    </style:style>
    <style:style style:name="WW_5f_CharLFO1LVL7" style:display-name="WW_CharLFO1LVL7" style:family="text">
      <style:text-properties style:font-name="Arial1" fo:font-family="Arial" style:font-family-generic="swiss" style:font-pitch="variable"/>
    </style:style>
    <style:style style:name="WW_5f_CharLFO1LVL8" style:display-name="WW_CharLFO1LVL8" style:family="text">
      <style:text-properties style:font-name="Arial1" fo:font-family="Arial" style:font-family-generic="swiss" style:font-pitch="variable"/>
    </style:style>
    <style:style style:name="WW_5f_CharLFO1LVL9" style:display-name="WW_CharLFO1LVL9" style:family="text">
      <style:text-properties style:font-name="Arial1" fo:font-family="Arial" style:font-family-generic="swiss" style:font-pitch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7-22T18:09:41.412764700</dc:date>
    <meta:editing-duration>PT3H20M36S</meta:editing-duration>
    <meta:editing-cycles>45</meta:editing-cycles>
    <meta:generator>LibreOffice/25.2.4.3$Windows_X86_64 LibreOffice_project/33e196637044ead23f5c3226cde09b47731f7e27</meta:generator>
    <meta:document-statistic meta:table-count="1" meta:image-count="1" meta:object-count="0" meta:page-count="8" meta:paragraph-count="174" meta:word-count="944" meta:character-count="10966" meta:non-whitespace-character-count="10200"/>
  </office:meta>
</office:document-meta>
</file>