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F000000DAF0FF2E2A.png" manifest:media-type="image/png"/>
  <manifest:file-entry manifest:full-path="Pictures/1000000000000236000000F3C92A3612.png" manifest:media-type="image/png"/>
  <manifest:file-entry manifest:full-path="Pictures/100000000000020E000001B4494AA734.png" manifest:media-type="image/png"/>
  <manifest:file-entry manifest:full-path="Pictures/10000000000002460000015814FBB7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2"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0d05f" officeooo:paragraph-rsid="0070d05f" fo:background-color="#ffffff" style:font-size-asian="14pt" style:font-size-complex="14pt"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61a5a5" fo:background-color="#ffffff" style:font-size-asian="14pt" style:font-size-complex="14pt"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9" style:family="paragraph" style:parent-style-name="Text_20_body">
      <style:paragraph-properties fo:margin-top="0cm" fo:margin-bottom="0cm" style:contextual-spacing="false" fo:line-height="100%" fo:text-align="justify" style:justify-single-word="false"/>
      <style:text-properties fo:font-variant="normal" fo:text-transform="none" fo:color="#c9211e" loext:opacity="10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10"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6fcde9" fo:background-color="#ffffff" style:font-size-asian="14pt" style:font-size-complex="14pt" loext:padding="0cm" loext:border="none"/>
    </style:style>
    <style:style style:name="P11"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12"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61a5a5" officeooo:paragraph-rsid="0070d05f" fo:background-color="#ffffff" style:font-size-asian="14pt" style:font-weight-asian="bold" style:font-size-complex="14pt" style:font-weight-complex="bold" loext:padding="0cm" loext:border="none"/>
    </style:style>
    <style:style style:name="P13"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fo:background-color="#ffffff" style:font-size-asian="14pt" style:font-size-complex="14pt" loext:padding="0cm" loext:border="none"/>
    </style:style>
    <style:style style:name="P14"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2f0f2" officeooo:paragraph-rsid="0072f0f2" fo:background-color="#ffffff" style:font-size-asian="14pt" style:font-size-complex="14pt" loext:padding="0cm" loext:border="none"/>
    </style:style>
    <style:style style:name="P15"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557d0c" fo:background-color="#ffffff" style:font-size-asian="14pt" style:font-size-complex="14pt" loext:padding="0cm" loext:border="none"/>
    </style:style>
    <style:style style:name="P16" style:family="paragraph" style:parent-style-name="Normal">
      <style:paragraph-properties fo:text-align="justify" style:justify-single-word="false"/>
      <style:text-properties officeooo:paragraph-rsid="004419bd"/>
    </style:style>
    <style:style style:name="P17" style:family="paragraph" style:parent-style-name="Normal">
      <style:paragraph-properties fo:text-align="justify" style:justify-single-word="false"/>
      <style:text-properties officeooo:paragraph-rsid="00746228"/>
    </style:style>
    <style:style style:name="P18" style:family="paragraph" style:parent-style-name="Standard">
      <style:text-properties officeooo:paragraph-rsid="00746228"/>
    </style:style>
    <style:style style:name="P19" style:family="paragraph">
      <style:paragraph-properties fo:text-align="cente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0304ea" style:font-weight-asian="bold" style:font-weight-complex="bold"/>
    </style:style>
    <style:style style:name="T2" style:family="text">
      <style:text-properties fo:font-weight="bold" officeooo:rsid="002188a7" style:font-weight-asian="bold" style:font-weight-complex="bold"/>
    </style:style>
    <style:style style:name="T3" style:family="text">
      <style:text-properties fo:font-weight="bold" officeooo:rsid="00557d0c" style:font-weight-asian="bold" style:font-weight-complex="bold"/>
    </style:style>
    <style:style style:name="T4" style:family="text">
      <style:text-properties fo:font-weight="bold" officeooo:rsid="006b1373" style:font-weight-asian="bold" style:font-weight-complex="bold"/>
    </style:style>
    <style:style style:name="T5" style:family="text">
      <style:text-properties fo:font-weight="bold" officeooo:rsid="006884d2" style:font-weight-asian="bold" style:font-weight-complex="bold"/>
    </style:style>
    <style:style style:name="T6" style:family="text">
      <style:text-properties fo:font-weight="bold" officeooo:rsid="0061a5a5" style:font-weight-asian="bold" style:font-weight-complex="bold"/>
    </style:style>
    <style:style style:name="T7"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8" style:family="text">
      <style:text-properties officeooo:rsid="004e28f2" style:font-weight-asian="bold" style:font-weight-complex="bold"/>
    </style:style>
    <style:style style:name="T9" style:family="text">
      <style:text-properties officeooo:rsid="00557d0c" style:font-weight-asian="bold" style:font-weight-complex="bold"/>
    </style:style>
    <style:style style:name="T10" style:family="text">
      <style:text-properties officeooo:rsid="00746228"/>
    </style:style>
    <style:style style:name="T11" style:family="text">
      <style:text-properties officeooo:rsid="00706db8"/>
    </style:style>
    <style:style style:name="T12" style:family="text">
      <style:text-properties officeooo:rsid="006e2adb"/>
    </style:style>
    <style:style style:name="T13" style:family="text">
      <style:text-properties officeooo:rsid="006221e2"/>
    </style:style>
    <style:style style:name="T14" style:family="text">
      <style:text-properties style:text-line-through-style="none" style:text-line-through-type="none" fo:font-size="11.5pt" style:text-underline-style="none" style:font-size-asian="11.5pt"/>
    </style:style>
    <style:style style:name="T15"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T16" style:family="text">
      <style:text-properties fo:font-variant="normal" fo:text-transform="none" style:use-window-font-color="true" loext:opacity="0%" style:font-name="Calibri" fo:font-size="14pt" fo:letter-spacing="normal" fo:language="en" fo:country="GB" fo:font-style="normal" fo:font-weight="normal" officeooo:rsid="0072f0f2" fo:background-color="#ffffff" loext:char-shading-value="0" style:font-size-asian="14pt" style:font-size-complex="14pt" loext:padding="0cm" loext:border="none"/>
    </style:style>
    <style:style style:name="T17" style:family="text">
      <style:text-properties fo:font-variant="normal" fo:text-transform="none" style:use-window-font-color="true" loext:opacity="0%" style:font-name="Calibri" fo:font-size="14pt" fo:letter-spacing="normal" fo:language="en" fo:country="GB" fo:font-style="normal" fo:font-weight="normal" officeooo:rsid="00746228" fo:background-color="#ffffff" loext:char-shading-value="0" style:font-size-asian="14pt" style:font-size-complex="14pt" loext:padding="0cm" loext:border="none"/>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text:span text:style-name="T2">ctivi</text:span><text:span text:style-name="T3">ty</text:span><text:span text:style-name="T2">: <text:s/></text:span><text:span text:style-name="T4">ransomware</text:span><text:span text:style-name="T5"> </text:span><text:span text:style-name="T6">ANALYSIS</text:span><draw:frame draw:style-name="fr1" draw:name="Imagen2" text:anchor-type="char" svg:x="9.613cm" svg:y="0cm" svg:width="7.715cm" svg:height="4.56cm" draw:z-index="0"><draw:image xlink:href="Pictures/10000000000002460000015814FBB7AC.png" xlink:type="simple" xlink:show="embed" xlink:actuate="onLoad" draw:mime-type="image/png"/></draw:frame></text:p>
      <text:p text:style-name="P2"><text:span text:style-name="Strong_20_Emphasis"><text:span text:style-name="T7"/></text:span></text:p>
      <text:p text:style-name="P3">Ransomware is a type of malicious software that locks users out of their system or data using different methods to force them to pay a ransom. Most often, such programs encrypt files on an infected machine and demand a fee to be paid in exchange for the decryption key. Additionally, such programs can be used to steal sensitive information from the compromised computer and even conduct DDoS attacks against affected organizations to pressure them into paying</text:p>
      <text:p text:style-name="P4"/>
      <text:p text:style-name="P5"><text:span text:style-name="T8">Activi</text:span><text:span text:style-name="T9">ty</text:span></text:p>
      <text:p text:style-name="P6">Look at the following pages about ransomware issues.</text:p>
      <text:p text:style-name="P7"/>
      <text:p text:style-name="P8">Identify the type of ransomware</text:p>
      <text:p text:style-name="P8"><text:a xlink:type="simple" xlink:href="https://id-ransomware.malwarehunterteam.com/" text:style-name="Internet_20_link" text:visited-style-name="Visited_20_Internet_20_Link">https://id-ransomware.malwarehunterteam.com/</text:a></text:p>
      <text:p text:style-name="P8"/>
      <text:p text:style-name="P9"><text:span text:style-name="T10">Ask: <text:s/></text:span>How many types of ransomware can be detected?</text:p>
      <text:p text:style-name="P8"/>
      <text:p text:style-name="P8">Clean (decryption) of files affected.</text:p>
      <text:p text:style-name="P10"><text:a xlink:type="simple" xlink:href="https://www.nomoreransom.org/es/index.html" text:style-name="Internet_20_link" text:visited-style-name="Visited_20_Internet_20_Link">https://www.nomoreransom.org/es/index.html</text:a></text:p>
      <text:p text:style-name="P10"/>
      <text:p text:style-name="P11">Prevent ransomware attacks <text:span text:style-name="T11">(with a built in Honeypot)</text:span></text:p>
      <text:p text:style-name="P11"><text:a xlink:type="simple" xlink:href="https://www.security-projects.com/?Anti_Ransom" text:style-name="Internet_20_link" text:visited-style-name="Visited_20_Internet_20_Link">https://www.security-projects.com/?Anti_Ransom</text:a></text:p>
      <text:p text:style-name="P11"/>
      <text:p text:style-name="P12">Look for more information about <text:span text:style-name="T12">ransomware analy</text:span>sis <text:span text:style-name="T13"><text:s text:c="2"/></text:span>(English pages only)</text:p>
      <text:p text:style-name="P6">And comment this pages.</text:p>
      <text:p text:style-name="P13" loext:marker-style-name="T14"/>
      <text:p text:style-name="P14"><text:span text:style-name="T10">Now, Solve </text:span>Some Challenges:</text:p>
      <text:p text:style-name="P15"/>
      <text:p text:style-name="P16"><text:span text:style-name="Strong_20_Emphasis"><text:span text:style-name="T15">Our organization's antivirus has detected ransomware on a computer and has stopped it. In the antivirus report, among other things, the MD5 hash corresponding to the malware appears: <text:s text:c="4"/>07fadb006486953439ce0092651fd7a6</text:span></text:span></text:p>
      <text:p text:style-name="P16"><text:span text:style-name="Strong_20_Emphasis"><text:span text:style-name="T16">I</text:span></text:span><text:span text:style-name="Strong_20_Emphasis"><text:span text:style-name="T15">ndicate the name of the ransomware family responsible for the incident.</text:span></text:span></text:p>
      <text:p text:style-name="P16"><text:span text:style-name="Strong_20_Emphasis"><text:span text:style-name="T15"/></text:span></text:p>
      <text:p text:style-name="P16"><text:span text:style-name="Strong_20_Emphasis"><text:span text:style-name="T15">-------------------------------------------</text:span></text:span></text:p>
      <text:p text:style-name="P16"><text:span text:style-name="Strong_20_Emphasis"><text:span text:style-name="T15">If we have been victims of a ransomware attack, the first step is to identify the family to which said malware belongs. Once identified, it is possible to carry out a search on the details and behavior of said harmful code, being able to obtain valuable </text:span></text:span><text:soft-page-break/><text:span text:style-name="Strong_20_Emphasis"><text:span text:style-name="T15">information, such as knowing whether or not a file decryption and recovery tool exists.</text:span></text:span></text:p>
      <text:p text:style-name="P16"><text:span text:style-name="Strong_20_Emphasis"><text:span text:style-name="T15"/></text:span></text:p>
      <text:p text:style-name="P17"><text:span text:style-name="Strong_20_Emphasis"><text:span text:style-name="T15">The attached file, “</text:span></text:span><text:span text:style-name="Strong_20_Emphasis"><text:span text:style-name="T17">info.zip”, </text:span></text:span><text:span text:style-name="Strong_20_Emphasis"><text:span text:style-name="T15">includes the ransom note created by ransomware after infecting a computer, along with one of the encrypted files. </text:span></text:span></text:p>
      <text:p text:style-name="P17"><text:span text:style-name="Strong_20_Emphasis"><text:span text:style-name="T17">Y</text:span></text:span><text:span text:style-name="Strong_20_Emphasis"><text:span text:style-name="T15">ou must identify the name of </text:span></text:span><text:span text:style-name="Strong_20_Emphasis"><text:span text:style-name="T17">the</text:span></text:span><text:span text:style-name="Strong_20_Emphasis"><text:span text:style-name="T15"> malware</text:span></text:span></text:p>
      <text:p text:style-name="P17"><text:span text:style-name="Strong_20_Emphasis"><text:span text:style-name="T15"/></text:span></text:p>
      <text:p text:style-name="P17"><text:span text:style-name="Strong_20_Emphasis"><text:span text:style-name="T15">----------------------------------------------</text:span></text:span></text:p>
      <text:p text:style-name="P17"><text:span text:style-name="Strong_20_Emphasis"><text:span text:style-name="T15">Depending on the ransomware family, it is possible to recover the encrypted data using a tool. Unfortunately, in most cases this is not possible and the only possible solution is to restore the computer from a backup.</text:span></text:span></text:p>
      <text:p text:style-name="P17"><text:span text:style-name="Strong_20_Emphasis"><text:span text:style-name="T17">I</text:span></text:span><text:span text:style-name="Strong_20_Emphasis"><text:span text:style-name="T15">ndicate which of the following ransomware families does NOT have a tool for file decryption:</text:span></text:span></text:p>
      <text:p text:style-name="P17"><text:span text:style-name="Strong_20_Emphasis"><text:span text:style-name="T15"/></text:span></text:p>
      <text:p text:style-name="P17"><text:span text:style-name="Strong_20_Emphasis"><text:span text:style-name="T15">Avaddon<text:tab/><text:tab/><text:tab/><text:tab/>Babuk<text:tab/><text:tab/><text:tab/><text:tab/>Bitcryptor</text:span></text:span></text:p>
      <text:p text:style-name="P17"><text:span text:style-name="Strong_20_Emphasis"><text:span text:style-name="T15">Coinvault<text:tab/><text:tab/><text:tab/><text:tab/>Dharma<text:tab/><text:tab/><text:tab/>Eking</text:span></text:span></text:p>
      <text:p text:style-name="P17"><text:span text:style-name="Strong_20_Emphasis"><text:span text:style-name="T15">Hakbit<text:tab/><text:tab/><text:tab/><text:tab/>Hive<text:tab/><text:tab/><text:tab/><text:tab/>Jigsaw</text:span></text:span></text:p>
      <text:p text:style-name="P17"><text:span text:style-name="Strong_20_Emphasis"><text:span text:style-name="T15">Lortok<text:tab/><text:tab/><text:tab/><text:tab/>Nemucod<text:tab/><text:tab/><text:tab/>Pylocky</text:span></text:span></text:p>
      <text:p text:style-name="P17"><text:span text:style-name="Strong_20_Emphasis"><text:span text:style-name="T15">Ragnarok<text:tab/><text:tab/><text:tab/><text:tab/>Sodinokibi</text:span></text:span></text:p>
      <text:p text:style-name="P17"><text:span text:style-name="Strong_20_Emphasis"><text:span text:style-name="T15"/></text:span></text:p>
      <text:p text:style-name="P17"><text:span text:style-name="Strong_20_Emphasis"><text:span text:style-name="T15">-------------------------------------------------</text:span></text:span></text:p>
      <text:p text:style-name="P17"><text:span text:style-name="Strong_20_Emphasis"><text:span text:style-name="T15">Depending on the ransomware family, it is possible to recover the encrypted data using a tool.</text:span></text:span></text:p>
      <text:p text:style-name="P17"><text:span text:style-name="Strong_20_Emphasis"><text:span text:style-name="T15"/></text:span></text:p>
      <text:p text:style-name="P17"><text:span text:style-name="Strong_20_Emphasis"><text:span text:style-name="T15">The attached file “</text:span></text:span><text:span text:style-name="Strong_20_Emphasis"><text:span text:style-name="T17">info2.zip</text:span></text:span><text:span text:style-name="Strong_20_Emphasis"><text:span text:style-name="T15">” includes the ransomware ransom note along with an encrypted file after the infection of a computer. </text:span></text:span><text:span text:style-name="Strong_20_Emphasis"><text:span text:style-name="T17">You must decrypt </text:span></text:span><text:span text:style-name="Strong_20_Emphasis"><text:span text:style-name="T15">the encrypted file.</text:span></text:span></text:p>
      <text:p text:style-name="P17"><text:span text:style-name="Strong_20_Emphasis"><text:span text:style-name="T15"/></text:span></text:p>
      <text:p text:style-name="P17"><text:span text:style-name="Strong_20_Emphasis"><text:span text:style-name="T15">----------------------------------------------</text:span></text:span></text:p>
      <text:p text:style-name="P18"><text:span text:style-name="Strong_20_Emphasis"><text:span text:style-name="T15">Document the entire process in pdf format. Sign it with your digital certificate.</text:span></text:span></text:p>
      <text:p text:style-name="P18"><text:span text:style-name="Strong_20_Emphasi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hyphenation-keep="auto" loext:hyphenation-keep-type="column"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7512bd"/>
    </style:style>
    <style:style style:name="M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7512bd"/>
    </style:style>
    <style:style style:name="MP4" style:family="paragraph">
      <style:paragraph-properties fo:text-align="center"/>
    </style:style>
    <style:style style:name="MT1" style:family="text">
      <style:text-properties fo:font-size="10pt" officeooo:rsid="00242b2f" style:font-size-asian="10pt" style:font-size-complex="10pt"/>
    </style:style>
    <style:style style:name="MT2" style:family="text">
      <style:text-properties fo:font-size="10pt" fo:language="zxx" fo:country="none" officeooo:rsid="009ecadd" style:font-size-asian="10pt" style:language-asian="zxx" style:country-asian="none" style:font-size-complex="10pt" style:language-complex="zxx" style:country-complex="none"/>
    </style:style>
    <style:style style:name="MT3" style:family="text">
      <style:text-properties fo:font-size="10pt" fo:language="zxx" fo:country="none" officeooo:rsid="007512bd" style:font-size-asian="10pt" style:language-asian="zxx" style:country-asian="none" style:font-size-complex="10pt" style:language-complex="zxx" style:country-complex="none"/>
    </style:style>
    <style:style style:name="MT4" style:family="text">
      <style:text-properties fo:font-size="10pt" fo:language="zxx" fo:country="none" officeooo:rsid="0032343d" style:font-size-asian="10pt" style:language-asian="zxx" style:country-asian="none" style:font-size-complex="10pt" style:language-complex="zxx" style:country-complex="non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4" draw:name="Imagen 1" draw:style-name="Mgr1" draw:text-style-name="MP2" svg:width="2.02cm" svg:height="0.999cm" svg:x="11.746cm" svg:y="-0.018cm"><draw:image xlink:href="Pictures/10000000000001AF000000DAF0FF2E2A.png" xlink:type="simple" xlink:show="embed" xlink:actuate="onLoad" draw:mime-type="image/png"><text:p/></draw:image></draw:frame><draw:frame draw:style-name="Mfr1" draw:name="Imagen3 Copy 1" text:anchor-type="char" svg:x="-0.295cm" svg:y="-0.381cm" svg:width="1.842cm" svg:height="1.526cm" draw:z-index="2"><draw:image xlink:href="Pictures/100000000000020E000001B4494AA734.png" xlink:type="simple" xlink:show="embed" xlink:actuate="onLoad" draw:mime-type="image/png"/></draw:frame><text:span text:style-name="MT1"><text:tab/>IES </text:span><text:span text:style-name="MT2">Sant Vicent Ferrer<text:tab/></text:span><text:span text:style-name="MT3">CE-CETI</text:span><draw:frame draw:style-name="Mfr2" draw:name="Imagen29" text:anchor-type="char" svg:x="14.037cm" svg:y="-0.131cm" svg:width="3.078cm" svg:height="1.323cm" draw:z-index="6"><draw:image xlink:href="Pictures/1000000000000236000000F3C92A3612.png" xlink:type="simple" xlink:show="embed" xlink:actuate="onLoad" draw:mime-type="image/png"/></draw:frame></text:p>
        <text:p text:style-name="MP3"><draw:line text:anchor-type="paragraph" draw:z-index="8" draw:name="Línea 1" draw:style-name="Mgr2" draw:text-style-name="MP4" svg:x1="0.079cm" svg:y1="1.023cm" svg:x2="16.933cm" svg:y2="1.014cm"><text:p/></draw:line><text:span text:style-name="MT3"><text:tab/></text:span><text:span text:style-name="MT4">A</text:span><text:span text:style-name="MT2">lgemesí</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24.8.4.2$Windows_X86_64 LibreOffice_project/bb3cfa12c7b1bf994ecc5649a80400d06cd71002</meta:generator>
    <meta:editing-duration>PT4H56M48S</meta:editing-duration>
    <meta:editing-cycles>75</meta:editing-cycles>
    <dc:date>2025-01-13T19:00:16.488000000</dc:date>
    <meta:print-date>2023-12-14T14:47:24.937000000</meta:print-date>
    <meta:printed-by>Archivos PDF</meta:printed-by>
    <meta:document-statistic meta:table-count="0" meta:image-count="3" meta:object-count="0" meta:page-count="2" meta:paragraph-count="35" meta:word-count="397" meta:character-count="2801" meta:non-whitespace-character-count="2403"/>
  </office:meta>
</office:document-meta>
</file>