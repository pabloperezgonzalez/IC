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346000001AD1693F416.png" manifest:media-type="image/png"/>
  <manifest:file-entry manifest:full-path="Pictures/100000000000020E000001B4494AA734.png" manifest:media-type="image/png"/>
  <manifest:file-entry manifest:full-path="Pictures/10000000000002390000011384688A35.png" manifest:media-type="image/png"/>
  <manifest:file-entry manifest:full-path="Pictures/10000000000003C400000235046A1D93.png" manifest:media-type="image/png"/>
  <manifest:file-entry manifest:full-path="Pictures/10000001000000580000001F4EE5900C.png" manifest:media-type="image/png"/>
  <manifest:file-entry manifest:full-path="Pictures/100000000000019000000029BABA1C1A.png" manifest:media-type="image/png"/>
  <manifest:file-entry manifest:full-path="Pictures/10000000000001F70000012626952B11.png" manifest:media-type="image/png"/>
  <manifest:file-entry manifest:full-path="Pictures/10000000000004330000035E16D5C592.png" manifest:media-type="image/png"/>
  <manifest:file-entry manifest:full-path="Pictures/100000000000034C00000105D12EA57A.png" manifest:media-type="image/png"/>
  <manifest:file-entry manifest:full-path="Pictures/100000000000012F0000008B3690B782.png" manifest:media-type="image/png"/>
  <manifest:file-entry manifest:full-path="Pictures/100000000000017D000000CE854D81C9.png" manifest:media-type="image/png"/>
  <manifest:file-entry manifest:full-path="Pictures/10000000000000C8000001522EC41DA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swiss"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color="#000000" draw:fill="none" draw:fill-color="#ffffff" draw:auto-grow-height="true" draw:auto-grow-width="false" fo:max-height="0cm" fo:min-height="8.376cm" fo:padding-top="0cm" fo:padding-bottom="0cm" fo:padding-left="0cm" fo:padding-right="0cm" fo:wrap-option="no-wrap" loext:decorative="false"/>
      <style:paragraph-properties style:writing-mode="lr-tb"/>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2" style:family="graphic" style:parent-style-name="standard" style:list-style-name="L4">
      <style:graphic-properties draw:stroke="none" svg:stroke-color="#000000" draw:fill="none" draw:fill-color="#ffffff" draw:auto-grow-height="true" draw:auto-grow-width="false" fo:max-height="0cm" fo:min-height="3.903cm" fo:padding-top="0cm" fo:padding-bottom="0cm" fo:padding-left="0cm" fo:padding-right="0cm" fo:wrap-option="no-wrap" loext:decorative="false"/>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4" style:family="graphic" style:parent-style-name="standard" style:list-style-name="L4">
      <style:graphic-properties draw:stroke="none" svg:stroke-color="#000000" draw:fill="none" draw:fill-color="#ffffff" draw:auto-grow-height="true" draw:auto-grow-width="false" fo:max-height="0cm" fo:min-height="6.459cm" fo:padding-top="0cm" fo:padding-bottom="0cm" fo:padding-left="0cm" fo:padding-right="0cm" fo:wrap-option="no-wrap" loext:decorative="false"/>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color="#000000" draw:fill="none" draw:fill-color="#ffffff" draw:auto-grow-height="true" draw:auto-grow-width="false" fo:max-height="0cm" fo:min-height="11.068cm" fo:padding-top="0cm" fo:padding-bottom="0cm" fo:padding-left="0cm" fo:padding-right="0cm" fo:wrap-option="no-wrap" loext:decorative="false"/>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8" style:family="graphic" style:parent-style-name="standard" style:list-style-name="L4">
      <style:graphic-properties draw:stroke="none" svg:stroke-color="#000000" draw:fill="none" draw:fill-color="#ffffff" draw:auto-grow-height="true" draw:auto-grow-width="false" fo:max-height="0cm" fo:min-height="9.287cm" fo:padding-top="0cm" fo:padding-bottom="0cm" fo:padding-left="0cm" fo:padding-right="0cm" fo:wrap-option="no-wrap" loext:decorative="false"/>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0" style:family="graphic" style:parent-style-name="standard" style:list-style-name="L4">
      <style:graphic-properties draw:stroke="none" svg:stroke-color="#000000" draw:fill="none" draw:fill-color="#ffffff" draw:auto-grow-height="true" draw:auto-grow-width="false" fo:max-height="0cm" fo:min-height="7.336cm" fo:padding-top="0cm" fo:padding-bottom="0cm" fo:padding-left="0cm" fo:padding-right="0cm" fo:wrap-option="no-wrap" loext:decorative="false"/>
      <style:paragraph-properties style:writing-mode="lr-tb"/>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2" style:family="graphic" style:parent-style-name="standard" style:list-style-name="L4">
      <style:graphic-properties draw:stroke="none" svg:stroke-color="#000000" draw:fill="none" draw:fill-color="#ffffff" draw:auto-grow-height="true" draw:auto-grow-width="false" fo:max-height="0cm" fo:min-height="7.336cm" fo:padding-top="0cm" fo:padding-bottom="0cm" fo:padding-left="0cm" fo:padding-right="0cm" fo:wrap-option="no-wrap" loext:decorative="false"/>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4" style:family="graphic" style:parent-style-name="standard" style:list-style-name="L4">
      <style:graphic-properties draw:stroke="none" svg:stroke-color="#000000" draw:fill="none" draw:fill-color="#ffffff" draw:auto-grow-height="true" draw:auto-grow-width="false" fo:max-height="0cm" fo:min-height="10.785cm" fo:padding-top="0cm" fo:padding-bottom="0cm" fo:padding-left="0cm" fo:padding-right="0cm" fo:wrap-option="no-wrap" loext:decorative="false"/>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39"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0"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6.691cm" loext:decorative="false"/>
      <style:paragraph-properties style:writing-mode="lr-tb"/>
    </style:style>
    <style:style style:name="gr42"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3"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pr1" style:family="presentation" style:parent-style-name="SVF-notes">
      <style:graphic-properties draw:fill-color="#ffffff" draw:auto-grow-height="true" fo:min-height="13.364cm" loext:decorative="false"/>
      <style:paragraph-properties style:writing-mode="lr-tb"/>
    </style:style>
    <style:style style:name="pr2" style:family="presentation" style:parent-style-name="Blank-notes">
      <style:graphic-properties draw:fill-color="#ffffff" draw:auto-grow-height="true" fo:min-height="13.364cm" loext:decorative="false"/>
      <style:paragraph-properties style:writing-mode="lr-tb"/>
    </style:style>
    <style:style style:name="P1" style:family="paragraph">
      <style:paragraph-properties fo:margin-top="0.035cm" fo:margin-bottom="0cm" fo:line-height="100%" fo:text-align="start" style:writing-mode="lr-tb"/>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margin-top="0.035cm" fo:margin-bottom="0cm" fo:line-height="100%" fo:text-align="start" style:writing-mode="lr-tb" style:font-independent-line-spacing="true"/>
      <style:text-properties fo:font-size="18pt"/>
    </style:style>
    <style:style style:name="P4" style:family="paragraph">
      <style:paragraph-properties fo:margin-left="0cm" fo:margin-right="0.189cm" fo:margin-top="0.035cm" fo:margin-bottom="0cm" fo:line-height="100%" fo:text-align="end" fo:text-indent="0cm" style:writing-mode="lr-tb"/>
      <style:text-properties fo:font-size="18pt"/>
    </style:style>
    <style:style style:name="P5" style:family="paragraph">
      <style:paragraph-properties fo:margin-left="0cm" fo:margin-right="0.014cm" fo:margin-top="0cm" fo:margin-bottom="0cm" fo:line-height="100%" fo:text-align="end" fo:text-indent="0cm" style:writing-mode="lr-tb"/>
      <style:text-properties fo:font-size="18pt"/>
    </style:style>
    <style:style style:name="P6"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P7" style:family="paragraph">
      <style:paragraph-properties fo:margin-left="0.035cm" fo:margin-right="0.014cm" fo:margin-top="0.034cm" fo:margin-bottom="0cm" fo:line-height="100%" fo:text-align="center" fo:text-indent="1.18cm" loext:tab-stop-distance="0cm" style:writing-mode="lr-tb">
        <style:tab-stops>
          <style:tab-stop style:position="0cm"/>
        </style:tab-stops>
      </style:paragraph-properties>
      <style:text-properties fo:font-size="18pt"/>
    </style:style>
    <style:style style:name="P8" style:family="paragraph">
      <loext:graphic-properties draw:fill="none"/>
      <style:paragraph-properties fo:margin-left="0.035cm" fo:margin-right="0.014cm" fo:margin-top="0.034cm" fo:margin-bottom="0cm" fo:line-height="100%" fo:text-align="center" fo:text-indent="1.18cm" loext:tab-stop-distance="0cm" style:writing-mode="lr-tb" style:font-independent-line-spacing="true">
        <style:tab-stops>
          <style:tab-stop style:position="0cm"/>
        </style:tab-stops>
      </style:paragraph-properties>
      <style:text-properties fo:font-size="18pt"/>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style:paragraph-properties fo:margin-left="0.169cm" fo:margin-right="0.155cm" fo:margin-top="0.034cm" fo:margin-bottom="0cm" fo:line-height="100%" fo:text-align="start" fo:text-indent="0cm" style:writing-mode="lr-tb"/>
      <style:text-properties fo:font-size="18pt"/>
    </style:style>
    <style:style style:name="P12" style:family="paragraph">
      <style:paragraph-properties fo:margin-left="0.169cm" fo:margin-right="0.155cm" fo:margin-top="0.002cm" fo:margin-bottom="0cm" fo:line-height="100%" fo:text-align="start" fo:text-indent="0cm" style:writing-mode="lr-tb"/>
      <style:text-properties fo:font-size="18pt"/>
    </style:style>
    <style:style style:name="P13" style:family="paragraph">
      <loext:graphic-properties draw:fill="none"/>
      <style:paragraph-properties fo:margin-left="0.169cm" fo:margin-right="0.155cm" fo:margin-top="0.034cm" fo:margin-bottom="0cm" fo:line-height="100%" fo:text-align="center" fo:text-indent="0cm" style:writing-mode="lr-tb" style:font-independent-line-spacing="true"/>
      <style:text-properties fo:font-size="18pt"/>
    </style:style>
    <style:style style:name="P14" style:family="paragraph">
      <loext:graphic-properties draw:fill="none"/>
      <style:paragraph-properties fo:margin-left="0.169cm" fo:margin-right="0.155cm" fo:margin-top="0.034cm" fo:margin-bottom="0cm" fo:line-height="100%" fo:text-align="start" fo:text-indent="0cm" style:writing-mode="lr-tb" style:font-independent-line-spacing="true"/>
      <style:text-properties fo:font-size="18pt"/>
    </style:style>
    <style:style style:name="P15" style:family="paragraph">
      <style:paragraph-properties fo:text-align="center"/>
    </style:style>
    <style:style style:name="P16" style:family="paragraph">
      <loext:graphic-properties draw:fill="none" draw:fill-color="#ffffff"/>
    </style:style>
    <style:style style:name="P17" style:family="paragraph">
      <loext:graphic-properties draw:fill-color="#ffffff"/>
      <style:text-properties fo:font-size="20pt"/>
    </style:style>
    <style:style style:name="P18" style:family="paragraph">
      <style:paragraph-properties fo:margin-left="0.169cm" fo:margin-right="0.155cm" fo:margin-top="0.034cm" fo:margin-bottom="0cm" fo:text-align="start" fo:text-indent="0cm"/>
    </style:style>
    <style:style style:name="P19" style:family="paragraph">
      <style:paragraph-properties fo:margin-left="0.169cm" fo:margin-right="0.155cm" fo:margin-top="0.034cm" fo:margin-bottom="0cm" fo:text-align="justify" fo:text-indent="0cm"/>
    </style:style>
    <style:style style:name="P20" style:family="paragraph">
      <loext:graphic-properties draw:fill="none" draw:fill-color="#ffffff"/>
      <style:paragraph-properties fo:margin-left="0.169cm" fo:margin-right="0.155cm" fo:margin-top="0.034cm" fo:margin-bottom="0cm" fo:text-align="start" fo:text-indent="0cm"/>
      <style:text-properties fo:color="#001f5f" loext:opacity="100%" style:font-name="Calibri" fo:font-size="18pt" style:font-size-asian="27.5pt" style:font-name-complex="Calibri" style:font-size-complex="27.5pt"/>
    </style:style>
    <style:style style:name="P21" style:family="paragraph">
      <style:paragraph-properties fo:margin-left="0.169cm" fo:margin-right="0.155cm" fo:margin-top="0.034cm" fo:margin-bottom="0cm" fo:line-height="100%" fo:text-align="justify" fo:text-indent="0cm" style:writing-mode="lr-tb"/>
      <style:text-properties fo:font-size="18pt"/>
    </style:style>
    <style:style style:name="P22" style:family="paragraph">
      <loext:graphic-properties draw:fill="none"/>
      <style:paragraph-properties fo:margin-left="0.169cm" fo:margin-right="0.155cm" fo:margin-top="0.034cm" fo:margin-bottom="0cm" fo:line-height="100%" fo:text-align="justify" fo:text-indent="0cm" style:writing-mode="lr-tb" style:font-independent-line-spacing="true"/>
      <style:text-properties fo:font-size="18pt"/>
    </style:style>
    <style:style style:name="P23" style:family="paragraph">
      <style:paragraph-properties fo:margin-left="0.169cm" fo:margin-right="0.155cm" fo:margin-top="0.002cm" fo:margin-bottom="0cm" fo:line-height="100%" fo:text-align="justify" fo:text-indent="0cm" style:writing-mode="lr-tb"/>
      <style:text-properties fo:font-size="18pt"/>
    </style:style>
    <style:style style:name="T1" style:family="text">
      <style:text-properties fo:font-variant="normal" fo:text-transform="none" fo:color="#244060" loext:opacity="100%" style:text-line-through-style="none" style:text-line-through-type="none" style:text-position="0% 100%" style:font-name="Calibri" fo:font-size="20pt" fo:letter-spacing="-0.004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2" style:family="text">
      <style:text-properties fo:font-variant="normal" fo:text-transform="none" fo:color="#244060" loext:opacity="100%" style:text-line-through-style="none" style:text-line-through-type="none" style:text-position="0% 100%" style:font-name="Calibri" fo:font-size="20pt" fo:letter-spacing="-0.002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3" style:family="text">
      <style:text-properties fo:font-variant="normal" fo:text-transform="none" fo:color="#244060" loext:opacity="100%" style:text-line-through-style="none" style:text-line-through-type="none" style:text-position="0% 100%" style:font-name="Calibri" fo:font-size="20pt" fo:letter-spacing="-0.007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4" style:family="text">
      <style:text-properties fo:font-variant="normal" fo:text-transform="none" fo:color="#244060" loext:opacity="100%" style:text-line-through-style="none" style:text-line-through-type="none" style:text-position="0% 100%" style:font-name="Calibri" fo:font-size="20pt" fo:letter-spacing="-0.009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5" style:family="text">
      <style:text-properties fo:font-variant="normal" fo:text-transform="none" fo:color="#244060"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6" style:family="text">
      <style:text-properties fo:font-variant="normal" fo:text-transform="none" fo:color="#244060" loext:opacity="100%" style:text-line-through-style="none" style:text-line-through-type="none" style:text-position="0% 100%" style:font-name="Calibri" fo:font-size="20pt" fo:letter-spacing="-0.016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7" style:family="text">
      <style:text-properties fo:font-variant="normal" fo:text-transform="none" fo:color="#244060"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T8" style:family="text">
      <style:text-properties fo:font-variant="normal" fo:text-transform="none" fo:color="#622422" loext:opacity="100%" style:text-line-through-style="none" style:text-line-through-type="none" style:text-position="0% 100%" style:font-name="Calibri" fo:font-size="40pt" fo:letter-spacing="-0.039cm"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9" style:family="text">
      <style:text-properties fo:font-variant="normal" fo:text-transform="none" fo:color="#622422" loext:opacity="100%" style:text-line-through-style="none" style:text-line-through-type="none" style:text-position="0% 100%" style:font-name="Calibri" fo:font-size="40pt" fo:letter-spacing="-0.009cm"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10" style:family="text">
      <style:text-properties fo:font-variant="normal" fo:text-transform="none" fo:color="#622422" loext:opacity="100%" style:text-line-through-style="none" style:text-line-through-type="none" style:text-position="0% 100%" style:font-name="Calibri" fo:font-size="40pt" fo:letter-spacing="normal" fo:font-style="normal" style:text-underline-style="none" fo:font-weight="bold" fo:background-color="transparent" style:font-size-asian="40pt" style:font-style-asian="normal" style:font-weight-asian="bold" style:font-name-complex="Calibri" style:font-size-complex="40pt" style:font-style-complex="normal" style:font-weight-complex="bold"/>
    </style:style>
    <style:style style:name="T11" style:family="text">
      <style:text-properties fo:font-variant="normal" fo:text-transform="none" fo:color="#001f5f" loext:opacity="100%" style:text-line-through-style="none" style:text-line-through-type="none" style:text-position="0% 100%" style:font-name="Calibri" fo:font-size="2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2" style:family="text">
      <style:text-properties fo:font-variant="normal" fo:text-transform="none" fo:color="#001f5f" loext:opacity="100%" style:text-line-through-style="none" style:text-line-through-type="none" style:text-position="0% 100%" style:font-name="Calibri" fo:font-size="27.5pt" fo:letter-spacing="normal" fo:font-style="normal" style:text-underline-style="none" fo:font-weight="normal" fo:background-color="transparent" style:font-size-asian="27.5pt" style:font-style-asian="normal" style:font-weight-asian="normal" style:font-name-complex="Calibri" style:font-size-complex="27.5pt" style:font-style-complex="normal" style:font-weight-complex="normal"/>
    </style:style>
    <style:style style:name="T13" style:family="text">
      <style:text-properties fo:font-variant="normal" fo:text-transform="none" fo:color="#001f5f" loext:opacity="100%" style:text-line-through-style="none" style:text-line-through-type="none" style:text-position="0% 100%" style:font-name="Calibri" fo:font-size="28pt" fo:font-style="normal" style:text-underline-style="none" fo:font-weight="bold" fo:background-color="#ffff00" style:font-size-asian="28pt" style:font-style-asian="normal" style:font-weight-asian="bold" style:font-name-complex="Calibri" style:font-size-complex="28pt" style:font-style-complex="normal" style:font-weight-complex="bold"/>
    </style:style>
    <style:style style:name="T14" style:family="text">
      <style:text-properties fo:font-variant="normal" fo:text-transform="none" fo:color="#001f5f" loext:opacity="100%" style:text-line-through-style="none" style:text-line-through-type="none" style:text-position="0% 100%" style:font-name="Calibri" fo:font-size="18pt"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5" style:family="text">
      <style:text-properties fo:font-variant="normal" fo:text-transform="none" fo:color="#001f5f" loext:opacity="100%" style:text-line-through-style="none" style:text-line-through-type="none" style:text-position="0% 100%" style:font-name="Calibri" fo:font-size="18pt" fo:letter-spacing="normal" fo:font-style="normal" style:text-underline-style="none" fo:font-weight="normal" fo:background-color="transparent" style:font-size-asian="16pt" style:font-style-asian="normal" style:font-weight-asian="normal" style:font-name-complex="Calibri" style:font-size-complex="16pt" style:font-style-complex="normal" style:font-weight-complex="normal"/>
    </style:style>
    <style:style style:name="T16" style:family="text">
      <style:text-properties fo:font-variant="normal" fo:text-transform="none" fo:color="#001f5f" loext:opacity="100%" style:text-line-through-style="none" style:text-line-through-type="none" style:text-position="0% 100%" style:font-name="Calibri" fo:font-size="18pt" fo:letter-spacing="normal" fo:font-style="normal" style:text-underline-style="none" fo:font-weight="normal" fo:background-color="transparent" style:font-size-asian="27.5pt" style:font-style-asian="normal" style:font-weight-asian="normal" style:font-name-complex="Calibri" style:font-size-complex="27.5pt" style:font-style-complex="normal" style:font-weight-complex="normal"/>
    </style:style>
    <style:style style:name="T17" style:family="text">
      <style:text-properties fo:color="#c9211e" loext:opacity="100%" fo:font-size="15pt" style:font-size-asian="15pt" style:font-size-complex="15pt"/>
    </style:style>
    <style:style style:name="T18" style:family="text">
      <style:text-properties fo:font-variant="normal" fo:text-transform="none" fo:color="#001f5f" loext:opacity="100%" style:text-line-through-style="none" style:text-line-through-type="none" style:text-position="0% 100%" style:font-name="Calibri" fo:font-size="2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19" style:family="text">
      <style:text-properties fo:font-variant="normal" fo:text-transform="none" fo:color="#001f5f" loext:opacity="100%" style:text-line-through-style="none" style:text-line-through-type="none" style:text-position="0% 100%" style:font-name="Calibri" fo:font-size="15pt" fo:letter-spacing="normal" fo:font-style="normal" style:text-underline-style="none" fo:font-weight="normal" fo:background-color="transparent" style:font-size-asian="15pt" style:font-style-asian="normal" style:font-weight-asian="normal" style:font-name-complex="Calibri" style:font-size-complex="15pt" style:font-style-complex="normal" style:font-weight-complex="normal"/>
    </style:style>
    <style:style style:name="T20" style:family="text">
      <style:text-properties fo:color="#001f5f" loext:opacity="100%" style:font-name="Calibri" fo:font-size="18pt" style:letter-kerning="true" style:font-name-asian="Microsoft YaHei" style:font-size-asian="27.5pt" style:font-name-complex="Calibri" style:font-size-complex="27.5pt"/>
    </style:style>
    <style:style style:name="T21" style:family="text">
      <style:text-properties fo:color="#001f5f" loext:opacity="100%" style:font-name="Calibri" fo:font-size="15pt" style:letter-kerning="true" style:font-name-asian="Microsoft YaHei" style:font-size-asian="15pt" style:font-name-complex="Calibri" style:font-size-complex="15pt"/>
    </style:style>
    <style:style style:name="T22" style:family="text">
      <style:text-properties fo:font-variant="normal" fo:text-transform="none" fo:color="#001f5f" loext:opacity="100%" style:text-line-through-style="none" style:text-line-through-type="none" style:text-position="0% 100%" style:font-name="Calibri" fo:font-size="24pt" fo:font-style="normal" style:text-underline-style="none" fo:font-weight="bold" fo:background-color="transparent" style:font-size-asian="24pt" style:font-style-asian="normal" style:font-weight-asian="bold" style:font-name-complex="Calibri" style:font-size-complex="24pt" style:font-style-complex="normal" style:font-weight-complex="bold"/>
    </style:style>
    <style:style style:name="T23" style:family="text">
      <style:text-properties fo:font-variant="normal" fo:text-transform="none" fo:color="#001f5f" loext:opacity="100%" style:text-line-through-style="none" style:text-line-through-type="none" style:text-position="0% 100%" style:font-name="Calibri" fo:font-size="18pt" fo:font-style="normal" style:text-underline-style="none" fo:font-weight="bold" fo:background-color="transparent" style:font-size-asian="18pt" style:font-style-asian="normal" style:font-weight-asian="bold" style:font-name-complex="Calibri" style:font-size-complex="18pt" style:font-style-complex="normal" style:font-weight-complex="bold"/>
    </style:style>
    <style:style style:name="T24" style:family="text">
      <style:text-properties fo:font-variant="normal" fo:text-transform="none" fo:color="#001f5f" loext:opacity="100%" style:text-line-through-style="none" style:text-line-through-type="none" style:text-position="0% 100%" style:font-name="Calibri" fo:font-size="1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5" style:family="text">
      <style:text-properties fo:font-size="14pt" style:font-size-asian="14pt" style:font-size-complex="14pt"/>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font-variant="normal" fo:text-transform="none" fo:color="#001f5f" loext:opacity="100%" style:text-line-through-style="none" style:text-line-through-type="none" style:text-position="0% 100%" style:font-name="Calibri" fo:font-size="18pt" fo:font-style="normal" style:text-underline-style="none" fo:font-weight="bold" fo:background-color="transparent" style:font-size-asian="14pt" style:font-style-asian="normal" style:font-weight-asian="bold" style:font-name-complex="Calibri" style:font-size-complex="14pt" style:font-style-complex="normal" style:font-weight-complex="bold"/>
    </style:style>
    <style:style style:name="T29" style:family="text">
      <style:text-properties fo:font-variant="normal" fo:text-transform="none" fo:color="#001f5f" loext:opacity="100%" style:text-line-through-style="none" style:text-line-through-type="none" style:text-position="0% 100%" style:font-name="Calibri" fo:font-size="18pt" fo:letter-spacing="normal" fo:font-style="normal" style:text-underline-style="none" fo:font-weight="bold" fo:background-color="transparent" style:font-size-asian="14pt" style:font-style-asian="normal" style:font-weight-asian="bold" style:font-name-complex="Calibri" style:font-size-complex="14pt" style:font-style-complex="normal" style:font-weight-complex="bold"/>
    </style:style>
    <text:list-style style:name="L1">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1f5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1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VF" presentation:presentation-page-layout-name="AL1T11">
        <office:forms form:automatic-focus="false" form:apply-design-mode="false"/>
        <draw:custom-shape draw:name="object 15" draw:style-name="gr1" draw:text-style-name="P3" draw:layer="layout" svg:width="10.976cm" svg:height="1.73cm" svg:x="3.631cm" svg:y="0.569cm">
          <text:p text:style-name="P1"><text:span text:style-name="T1">IES</text:span><text:span text:style-name="T2"> SANT</text:span><text:span text:style-name="T3"> </text:span><text:span text:style-name="T2">VICENT FERRER</text:span><text:span text:style-name="T4"> </text:span><text:span text:style-name="T1">(ALGEMESÍ)</text:span></text:p>
          <text:p text:style-name="P2"><text:span text:style-name="T5">INCIDENTS DE CIBERSEGURET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 draw:text-style-name="P6" draw:layer="layout" svg:width="3.67cm" svg:height="1.73cm" svg:x="20.959cm" svg:y="0.569cm">
          <text:p text:style-name="P4"><text:span text:style-name="T1">CURS</text:span><text:span text:style-name="T6"> 21</text:span><text:span text:style-name="T7">/22</text:span></text:p>
          <text:p text:style-name="P5"><text:span text:style-name="T7">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 draw:text-style-name="P8" draw:layer="layout" svg:width="19.5cm" svg:height="3.455cm" svg:x="2.5cm" svg:y="3.328cm">
          <text:p text:style-name="P7"><text:span text:style-name="T8">UNITAT</text:span><text:span text:style-name="T9"> 03</text:span></text:p>
          <text:p text:style-name="P7"><text:span text:style-name="T10">INVESTIGACIÓ d’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7.003cm" svg:height="9.965cm" svg:x="3.947cm" svg:y="7.63cm">
          <draw:image xlink:href="Pictures/10000000000003C400000235046A1D93.png" xlink:type="simple" xlink:show="embed" xlink:actuate="onLoad" draw:mime-type="image/png">
            <text:p/>
          </draw:image>
        </draw:frame>
        <draw:frame draw:style-name="gr4" draw:text-style-name="P9" draw:layer="layout" svg:width="2.459cm" svg:height="2.039cm" svg:x="0.577cm" svg:y="0.529cm">
          <draw:image xlink:href="Pictures/100000000000020E000001B4494AA734.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presentation:presentation-page-layout-name="AL1T11">
        <office:forms form:automatic-focus="false" form:apply-design-mode="false"/>
        <draw:custom-shape draw:name="object 4" draw:style-name="gr6" draw:text-style-name="P13" draw:layer="layout" svg:width="21.5cm" svg:height="8.453cm" svg:x="2cm" svg:y="4.744cm">
          <text:list text:style-name="L4">
            <text:list-item>
              <text:p text:style-name="P11"><text:span text:style-name="T11">Recopilació d’evidències</text:span></text:p>
            </text:list-item>
            <text:list-item>
              <text:p text:style-name="P11"><text:span text:style-name="T11">Anàlisi d’evidències (riscos)</text:span></text:p>
            </text:list-item>
            <text:list-item>
              <text:p text:style-name="P11"><text:span text:style-name="T11">Investigació de l’incident</text:span></text:p>
            </text:list-item>
            <text:list-item>
              <text:p text:style-name="P11"><text:span text:style-name="T11">Intercanvi d’informació de l’incident amb proveïdors o organismes competents</text:span></text:p>
            </text:list-item>
            <text:list-item>
              <text:p text:style-name="P11"><text:span text:style-name="T11">Mesures de contenció d’incidents</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 presentation:presentation-page-layout-name="AL1T11">
        <office:forms form:automatic-focus="false" form:apply-design-mode="false"/>
        <draw:custom-shape draw:name="object 24" draw:style-name="gr7" draw:text-style-name="P14" draw:layer="layout" svg:width="21.5cm" svg:height="8.453cm" svg:x="2cm" svg:y="4.744cm">
          <text:list text:style-name="L4">
            <text:list-item>
              <text:p text:style-name="P11"><text:span text:style-name="T13">Recopilació d’evidències</text:span></text:p>
            </text:list-item>
            <text:list-item>
              <text:p text:style-name="P11"><text:span text:style-name="T11">Anàlisi d’evidències</text:span></text:p>
            </text:list-item>
            <text:list-item>
              <text:p text:style-name="P11"><text:span text:style-name="T11">Investigació de l’incident</text:span></text:p>
            </text:list-item>
            <text:list-item>
              <text:p text:style-name="P11"><text:span text:style-name="T11">Intercanvi d’informació de l’incident amb proveïdors o organismes competents</text:span></text:p>
            </text:list-item>
            <text:list-item>
              <text:p text:style-name="P11"><text:span text:style-name="T11">Mesures de contenció d’incidents</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 presentation:presentation-page-layout-name="AL1T11">
        <office:forms form:automatic-focus="false" form:apply-design-mode="false"/>
        <draw:custom-shape draw:name="object 2" draw:style-name="gr8" draw:text-style-name="P14" draw:layer="layout" svg:width="22.469cm" svg:height="11.011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1"/></text:p>
          <text:p text:style-name="P12"><text:span text:style-name="T12"/></text:p>
          <text:p text:style-name="P12"><text:span text:style-name="T12"/></text:p>
          <text:p text:style-name="P12"><text:span text:style-name="T12"/></text:p>
          <text:p text:style-name="P12"><text:span text:style-name="T15">Principis durant la recol·lecció d'evidències</text:span></text:p>
          <text:p text:style-name="P12"><text:span text:style-name="T15">Procediment de recol·lecció</text:span></text:p>
          <text:p text:style-name="P12"><text:span text:style-name="T15">El procediment d'emmagatzematge</text:span></text:p>
          <text:p text:style-name="P12"><text:span text:style-name="T16">Eines necessà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21.249cm" svg:height="0.839cm" svg:x="2.194cm" svg:y="16.163cm">
          <draw:text-box>
            <text:p text:style-name="P15"><text:span text:style-name="T17"><text:a xlink:href="https://www.incibe-cert.es/blog/rfc3227" xlink:type="simple">https://www.incibe-cert.es/blog/rfc3227</text:a></text:span></text:p>
          </draw:text-box>
        </draw:frame>
        <draw:frame draw:style-name="gr4" draw:text-style-name="P9" draw:layer="layout" svg:width="8.871cm" svg:height="5.185cm" svg:x="14.638cm" svg:y="6.925cm">
          <draw:image xlink:href="Pictures/10000000000001F70000012626952B11.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Blank" presentation:presentation-page-layout-name="AL1T11">
        <office:forms form:automatic-focus="false" form:apply-design-mode="false"/>
        <draw:custom-shape draw:name="object 8" draw:style-name="gr10" draw:text-style-name="P14" draw:layer="layout" svg:width="22.469cm" svg:height="11.712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8"/></text:p>
          <text:p text:style-name="P12"><text:span text:style-name="T15">Principis durant la recol·lecció d'evidències</text:span></text:p>
          <text:list text:style-name="L4">
            <text:list-item>
              <text:p text:style-name="P12"><text:span text:style-name="T19">Capturar una imatge del sistema tan precisa com siga possible.</text:span></text:p>
            </text:list-item>
            <text:list-item>
              <text:p text:style-name="P12"><text:span text:style-name="T19">Realitzar notes detallades, incloent dates i hores indicant si s'utilitza horari local o UTC.</text:span></text:p>
            </text:list-item>
            <text:list-item>
              <text:p text:style-name="P12"><text:span text:style-name="T19">Minimitzar els canvis en la informació que s'està recol·lectant i eliminar els agents externs que puguen fer-ho.</text:span></text:p>
            </text:list-item>
            <text:list-item>
              <text:p text:style-name="P12"><text:span text:style-name="T19">En el cas d'enfrontar-se a un dilema entre recol·lecció i anàlisi triar primer recol·lecció i després anàlisi.</text:span></text:p>
            </text:list-item>
            <text:list-item>
              <text:p text:style-name="P12"><text:span text:style-name="T19">Recollir la informació segons l'ordre de volatilitat (de major a menor).</text:span></text:p>
            </text:list-item>
            <text:list-item>
              <text:p text:style-name="P12"><text:span text:style-name="T19">Tindre en compte que per cada dispositiu la recollida d'informació pot realitzar-se de diferent manera.</text:span></text:p>
            </text:list-item>
          </text:list>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Blank" presentation:presentation-page-layout-name="AL1T11">
        <office:forms form:automatic-focus="false" form:apply-design-mode="false"/>
        <draw:custom-shape draw:name="object 10" draw:style-name="gr11" draw:text-style-name="P14" draw:layer="layout" svg:width="22.469cm" svg:height="14.262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8"/></text:p>
          <text:p text:style-name="P12"><text:span text:style-name="T15">Principis durant la recol·lecció d'evidències <text:s/>- <text:s/></text:span><text:span text:style-name="T19">Ordre de volatilitat</text:span></text:p>
          <text:p text:style-name="P12"><text:span text:style-name="T19">L'ordre de volatilitat fa referència al període de temps en el qual està accessible una certa informació. És per això que s'ha de recol·lectar en primer lloc aquella informació que vaja a estar disponible durant el menor període de temps, és a dir, aquella la volatilitat de la qual siga major.</text:span></text:p>
          <text:p text:style-name="P12"><text:span text:style-name="T19"/></text:p>
          <text:p text:style-name="P12"><text:span text:style-name="T19">D'acord amb aquesta escala es pot crear la següent llista en ordre de major a menor volatilitat:</text:span></text:p>
          <text:p text:style-name="P12"><text:span text:style-name="T19"/></text:p>
          <text:list text:style-name="L4">
            <text:list-item>
              <text:p text:style-name="P12"><text:span text:style-name="T19">Registres i contingut de la caché.</text:span></text:p>
            </text:list-item>
            <text:list-item>
              <text:p text:style-name="P12"><text:span text:style-name="T19">Taula d'encaminament, cache ARP, taula de processos, estadístiques del kernel, memòria.</text:span></text:p>
            </text:list-item>
            <text:list-item>
              <text:p text:style-name="P12"><text:span text:style-name="T19">Informació temporal del sistema.</text:span></text:p>
            </text:list-item>
            <text:list-item>
              <text:p text:style-name="P12"><text:span text:style-name="T19">Disc</text:span></text:p>
            </text:list-item>
            <text:list-item>
              <text:p text:style-name="P12"><text:span text:style-name="T19">Logs del sistema.</text:span></text:p>
            </text:list-item>
            <text:list-item>
              <text:p text:style-name="P12"><text:span text:style-name="T19">Configuració física i topologia de la xarxa.</text:span></text:p>
            </text:list-item>
            <text:list-item>
              <text:p text:style-name="P12"><text:span text:style-name="T19">Documents.</text:span></text:p>
            </text:list-item>
          </text:list>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Blank" presentation:presentation-page-layout-name="AL1T11">
        <office:forms form:automatic-focus="false" form:apply-design-mode="false"/>
        <draw:custom-shape draw:name="object 11" draw:style-name="gr12" draw:text-style-name="P14" draw:layer="layout" svg:width="22.469cm" svg:height="12.347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8"/></text:p>
          <text:p text:style-name="P12"><text:span text:style-name="T15">Principis durant la recol·lecció d'evidències <text:s/>- <text:s text:c="2"/></text:span><text:span text:style-name="T19">Accions que han d'evitar-se</text:span></text:p>
          <text:p text:style-name="P12"><text:span text:style-name="T19"/></text:p>
          <text:p text:style-name="P12"><text:span text:style-name="T19">S'han d'evitar les següents accions amb la finalitat de no invalidar el procés de recol·lecció d'informació ja que ha de preservar-se la seua integritat amb la finalitat que els resultats obtinguts puguen ser utilitzats en un judici en el cas que siga necessari:</text:span></text:p>
          <text:p text:style-name="P12"><text:span text:style-name="T19"/></text:p>
          <text:list text:style-name="L4">
            <text:list-item>
              <text:p text:style-name="P12"><text:span text:style-name="T19">No apagar l'ordinador fins que s'haja recopilat tota la informació.</text:span></text:p>
            </text:list-item>
            <text:list-item>
              <text:p text:style-name="P12"><text:span text:style-name="T19">No confiar en la informació proporcionada pels programes del sistema ja que poden haver-se vist compromesos. S'ha de recopilar la informació mitjançant programes des d'un mitjà protegit com s'explicarà més endavant.</text:span></text:p>
            </text:list-item>
            <text:list-item>
              <text:p text:style-name="P12"><text:span text:style-name="T19">No executar programes que modifiquen la data i hora d'accés de tots els fitxers del sistema.</text:span></text:p>
            </text:list-item>
          </text:list>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Blank" presentation:presentation-page-layout-name="AL1T11">
        <draw:custom-shape draw:name="object 12" draw:style-name="gr13" draw:text-style-name="P14" draw:layer="layout" svg:width="22.469cm" svg:height="10.942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8"/></text:p>
          <text:p text:style-name="P12"><text:span text:style-name="T15">Principis durant la recol·lecció d'evidències <text:s/>- <text:s text:c="2"/></text:span><text:span text:style-name="T19">Consideracions sobre la privacitat</text:span></text:p>
          <text:p text:style-name="P12"><text:span text:style-name="T19"/></text:p>
          <text:list text:style-name="L4">
            <text:list-item>
              <text:p text:style-name="P12"><text:span text:style-name="T19">És molt important tindre en consideració les pautes de l'empresa en el que a privacitat es refereix. És habitual sol·licitar una autorització per escrit de qui corresponga per a poder dur a terme la recol·lecció d'evidències. Aquest és un aspecte fonamental ja que pot donar-se el cas que es treballe amb informació confidencial o de vital importància per a l'empresa, o que la disponibilitat dels serveis es veja afectada.</text:span></text:p>
            </text:list-item>
            <text:list-item>
              <text:p text:style-name="P12"><text:span text:style-name="T19">No cal entremetre's en la privacitat de les persones sense una justificació. No s'han de recopilar dades de llocs als quals normalment no hi ha raó per a accedir, com a fitxers personals, llevat que hi haja suficients indic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Blank" presentation:presentation-page-layout-name="AL1T11">
        <draw:custom-shape draw:name="object 9" draw:style-name="gr14" draw:text-style-name="P14" draw:layer="layout" svg:width="22.469cm" svg:height="15.108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5">Procediment de recol·lecció <text:s/>- <text:s/></text:span><text:span text:style-name="T19">Transparència</text:span></text:p>
          <text:p text:style-name="P12"><text:span text:style-name="T19">Els mètodes utilitzats per a recol·lectar evidències han de ser transparents i reproduïbles. S'ha d'estar preparat per a reproduir amb precisió els mètodes usats, i que aquests mètodes hagen sigut testats per experts independents.</text:span></text:p>
          <text:p text:style-name="P12"><text:span text:style-name="T19"/></text:p>
          <text:p text:style-name="P12"><text:span text:style-name="T19">Passos</text:span></text:p>
          <text:list text:style-name="L4">
            <text:list-item>
              <text:p text:style-name="P12"><text:span text:style-name="T19">On està l'evidència? Llistar quins sistemes estan involucrats en l'incident i de quins d'ells s'han de prendre evidències.</text:span></text:p>
            </text:list-item>
            <text:list-item>
              <text:p text:style-name="P12"><text:span text:style-name="T19">Establir què és rellevant. En cas de dubte és millor recopilar molta informació que poca.</text:span></text:p>
            </text:list-item>
            <text:list-item>
              <text:p text:style-name="P12"><text:span text:style-name="T19">Fixar l'ordre de volatilitat per a cada sistema.</text:span></text:p>
            </text:list-item>
            <text:list-item>
              <text:p text:style-name="P12"><text:span text:style-name="T19">Obtindre la informació d'acord amb l'ordre establit.</text:span></text:p>
            </text:list-item>
            <text:list-item>
              <text:p text:style-name="P12"><text:span text:style-name="T19">Comprovar el grau de sincronització del rellotge del sistema.</text:span></text:p>
            </text:list-item>
            <text:list-item>
              <text:p text:style-name="P12"><text:span text:style-name="T19">Segons es vagen realitzant els passos de recol·lecció preguntar-se què més pot ser una evidència.</text:span></text:p>
            </text:list-item>
            <text:list-item>
              <text:p text:style-name="P12"><text:span text:style-name="T19">Documentar cada pas.</text:span></text:p>
            </text:list-item>
            <text:list-item>
              <text:p text:style-name="P12"><text:span text:style-name="T19">No oblidar a la gent involucrada. Prendre notes sobre quina gent era allí, què estaven fent, què van observar i com van reaccionar.</text:span></text:p>
            </text:list-item>
          </text:list>
          <text:p text:style-name="P12"><text:span text:style-name="T15"/></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Blank" presentation:presentation-page-layout-name="AL1T11">
        <draw:custom-shape draw:name="object 13" draw:style-name="gr15" draw:text-style-name="P14" draw:layer="layout" svg:width="22.469cm" svg:height="12.31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5">El procediment d'emmagatzematge</text:span></text:p>
          <text:p text:style-name="P12"><text:span text:style-name="T19"/></text:p>
          <text:p text:style-name="P12"><text:span text:style-name="T19">1. Cadena de custòdia</text:span></text:p>
          <text:p text:style-name="P12"><text:span text:style-name="T19">Ha d'estar clarament documentada i s'han de detallar els següents punts:</text:span></text:p>
          <text:p text:style-name="P12"><text:span text:style-name="T19"/></text:p>
          <text:list text:style-name="L4">
            <text:list-item>
              <text:p text:style-name="P12"><text:span text:style-name="T19">On?, quan? i qui? va descobrir i va recol·lectar l'evidència.</text:span></text:p>
            </text:list-item>
            <text:list-item>
              <text:p text:style-name="P12"><text:span text:style-name="T19">On?, quan? i qui? va manipular l'evidència.</text:span></text:p>
            </text:list-item>
            <text:list-item>
              <text:p text:style-name="P12"><text:span text:style-name="T19">Qui ha custodiat l'evidència?, quant temps? i com l'ha emmagatzemada?</text:span></text:p>
            </text:list-item>
            <text:list-item>
              <text:p text:style-name="P12"><text:span text:style-name="T19">En el cas que l'evidència canvie de custòdia indicar quan i com es va realitzar l'intercanvi, incloent número d'albarà, etc.</text:span></text:p>
            </text:list-item>
          </text:list>
          <text:p text:style-name="P12"><text:span text:style-name="T19"/></text:p>
          <text:p text:style-name="P12"><text:span text:style-name="T19">2. On i com emmagatzemar-ho</text:span></text:p>
          <text:list text:continue-numbering="true" text:style-name="L4">
            <text:list-item>
              <text:p text:style-name="P12"><text:span text:style-name="T19">S'ha d'emmagatzemar la informació en dispositius la seguretat dels quals haja sigut demostrada i que permeten detectar intents d'accés no autoritza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Blank" presentation:presentation-page-layout-name="AL1T11">
        <draw:custom-shape draw:name="object 14" draw:style-name="gr16" draw:text-style-name="P14" draw:layer="layout" svg:width="22.469cm" svg:height="13.932cm" svg:x="1.774cm" svg:y="3.364cm">
          <text:p text:style-name="P11"><text:span text:style-name="T11">Recopilació d’evidències</text:span></text:p>
          <text:p text:style-name="P11"><text:span text:style-name="T11"/></text:p>
          <text:p text:style-name="P11"><text:span text:style-name="T14">RFC 3227 - <text:s/>Directrius per a la recopilació d'evidències i el seu emmagatzematge</text:span></text:p>
          <text:p text:style-name="P11"><text:span text:style-name="T16">Eines necessàries</text:span></text:p>
          <text:p text:style-name="P11"><text:span text:style-name="T19">Eines necessàries</text:span></text:p>
          <text:p text:style-name="P11"><text:span text:style-name="T19">Existeixen una sèrie de pautes que han de ser seguides a l'hora de seleccionar les eines amb les quals es durà a terme el procés de recol·lecció:</text:span></text:p>
          <text:p text:style-name="P11"><text:span text:style-name="T19"/></text:p>
          <text:list text:style-name="L4">
            <text:list-item>
              <text:p text:style-name="P11"><text:span text:style-name="T19">S'han d'utilitzar eines alienes al sistema ja que aquestes poden haver-se vist compromeses, principalment en els casos de malware.</text:span></text:p>
            </text:list-item>
            <text:list-item>
              <text:p text:style-name="P11"><text:span text:style-name="T19">S'ha de procurar utilitzar eines que alteren el menys possible l'escenari, evitant l'ús d'eines d'interfície gràfica i aquelles l'ús de memòria de les quals siga gran.</text:span></text:p>
            </text:list-item>
            <text:list-item>
              <text:p text:style-name="P11"><text:span text:style-name="T19">Els programes que es vagen a utilitzar per a recol·lectar les evidències han d'estar situats en un dispositiu de només lectura (CDROM, pendrive protegit, etc.).</text:span></text:p>
            </text:list-item>
            <text:list-item>
              <text:p text:style-name="P11"><text:span text:style-name="T19">S'ha de preparar un conjunt d'utilitats adequades als sistemes operatius amb els quals es treballe.</text:span></text:p>
            </text:list-item>
            <text:list-item>
              <text:p text:style-name="P11"><text:span text:style-name="T19">El kit d'anàlisi ha d'incloure els següents tipus d'eines:</text:span></text:p>
              <text:list>
                <text:list-item>
                  <text:p text:style-name="P11"><text:span text:style-name="T19">Programes per a llistar i examinar processos.</text:span></text:p>
                </text:list-item>
                <text:list-item>
                  <text:p text:style-name="P11"><text:span text:style-name="T19">Programes per a examinar l'estat del sistema.</text:span></text:p>
                </text:list-item>
                <text:list-item>
                  <text:p text:style-name="P11"><text:span text:style-name="T19">Programes per a realitzar copies bit a bi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Blank" presentation:presentation-page-layout-name="AL1T11">
        <draw:custom-shape draw:name="object 25" draw:style-name="gr17" draw:text-style-name="P14" draw:layer="layout" svg:width="21.5cm" svg:height="8.453cm" svg:x="2cm" svg:y="4.744cm">
          <text:list text:style-name="L4">
            <text:list-item>
              <text:p text:style-name="P11"><text:span text:style-name="T11">Recopilació d’evidències</text:span></text:p>
            </text:list-item>
            <text:list-item>
              <text:p text:style-name="P11"><text:span text:style-name="T13">Anàlisi d’evidències</text:span></text:p>
            </text:list-item>
            <text:list-item>
              <text:p text:style-name="P11"><text:span text:style-name="T11">Investigació de l’incident</text:span></text:p>
            </text:list-item>
            <text:list-item>
              <text:p text:style-name="P11"><text:span text:style-name="T11">Intercanvi d’informació de l’incident amb proveïdors o organismes competents</text:span></text:p>
            </text:list-item>
            <text:list-item>
              <text:p text:style-name="P11"><text:span text:style-name="T11">Mesures de contenció d’incidents</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Blank" presentation:presentation-page-layout-name="AL1T11">
        <draw:custom-shape draw:name="object 1" draw:style-name="gr18" draw:text-style-name="P14" draw:layer="layout" svg:width="21.935cm" svg:height="3.607cm" svg:x="1.898cm" svg:y="3.944cm">
          <text:p text:style-name="P11"><text:span text:style-name="T11">Anàlisi d’evidències <text:s/>(riscos)</text:span></text:p>
          <text:p text:style-name="P11"><text:span text:style-name="T11"/></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20.276cm" svg:height="0.839cm" svg:x="2.141cm" svg:y="16.305cm">
          <draw:text-box>
            <text:p><text:span text:style-name="T17"><text:a xlink:href="https://www.incibe.es/protege-tu-empresa/blog/analisis-riesgos-pasos-sencillo" xlink:type="simple">https://www.incibe.es/protege-tu-empresa/blog/analisis-riesgos-pasos-sencillo</text:a></text:span></text:p>
          </draw:text-box>
        </draw:frame>
        <draw:frame draw:style-name="gr4" draw:text-style-name="P9" draw:layer="layout" svg:width="20.253cm" svg:height="10.367cm" svg:x="2.926cm" svg:y="5.672cm">
          <draw:image xlink:href="Pictures/1000000000000346000001AD1693F416.png" xlink:type="simple" xlink:show="embed" xlink:actuate="onLoad" draw:mime-type="image/png">
            <text:p/>
          </draw:image>
        </draw:frame>
        <presentation:notes draw:style-name="dp2">
          <draw:page-thumbnail draw:style-name="gr5"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Blank" presentation:presentation-page-layout-name="AL1T11">
        <draw:custom-shape draw:name="object 18" draw:style-name="gr19"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0" draw:layer="layout" svg:width="21.25cm" svg:height="8.376cm" svg:x="1.904cm" svg:y="6.664cm">
          <draw:text-box>
            <text:p text:style-name="P18"><text:span text:style-name="T20">Fase 1. Definir l'abast</text:span></text:p>
            <text:p text:style-name="P18"><text:span text:style-name="T20"/></text:p>
            <text:p text:style-name="P19"><text:span text:style-name="T20">El primer pas a l'hora de dur a terme l'anàlisi de riscos, és establir l'abast de l'estudi. Considerarem que aquesta anàlisi de riscos forma part del Pla Director de Seguretat. Per tant, recomanem que l'anàlisi de riscos cobrisca la totalitat de l'abast del PDS, on s'han seleccionat les àrees estratègiques sobre les quals millorar la seguretat. D'altra banda, també és possible definir un abast més limitat atenent departaments, processos o sistemes. Per exemple, anàlisi de riscos sobre els processos del departament Administració, anàlisi de riscos sobre els processos de producció i gestió de magatzem o anàlisi de riscos sobre els sistemes TIC relacionats amb la pàgina web de l'empresa, etc. En aquest cas pràctic considerem que l'abast triat per a l'anàlisi de riscos és “Els serveis i sistemes del Departament Informàtica”.</text:span></text:p>
          </draw:text-box>
        </draw:frame>
        <presentation:notes draw:style-name="dp2">
          <draw:page-thumbnail draw:style-name="gr5"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Blank" presentation:presentation-page-layout-name="AL1T11">
        <draw:custom-shape draw:name="object 19" draw:style-name="gr21"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0" draw:layer="layout" svg:width="21.25cm" svg:height="3.903cm" svg:x="1.904cm" svg:y="6.664cm">
          <draw:text-box>
            <text:p text:style-name="P18"><text:span text:style-name="T20">Fase 2. Identificar els actius</text:span></text:p>
            <text:p text:style-name="P18"><text:span text:style-name="T20"/></text:p>
            <text:p text:style-name="P19"><text:span text:style-name="T20">Una vegada definit l'abast, hem d'identificar els actius més importants que guarden relació amb el departament, procés, o sistema objecte de l'estudi. Per a mantindre un inventari d'actius senzill pot ser suficient amb fer ús d'un full de càlcul o taula.</text:span></text:p>
          </draw:text-box>
        </draw:frame>
        <presentation:notes draw:style-name="dp2">
          <draw:page-thumbnail draw:style-name="gr5" draw:layer="layout" svg:width="19.798cm" svg:height="11.136cm" svg:x="0.6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Blank" presentation:presentation-page-layout-name="AL1T11">
        <draw:custom-shape draw:name="object 20" draw:style-name="gr23"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0" draw:layer="layout" svg:width="21.25cm" svg:height="6.459cm" svg:x="1.904cm" svg:y="6.664cm">
          <draw:text-box>
            <text:p text:style-name="P18"><text:span text:style-name="T20">Fase 3. Identificar / seleccionar les amenaces</text:span></text:p>
            <text:p text:style-name="P19"><text:span text:style-name="T20"/></text:p>
            <text:p text:style-name="P19"><text:span text:style-name="T20">Havent identificat els principals actius, el següent pas consisteix a identificar les amenaces a les quals aquests estan exposats. Tal com imaginem, el conjunt d'amenaces és ampli i divers pel que hem de fer un esforç a mantindre un enfocament pràctic i aplicat. Per exemple, si la nostra intenció és avaluar el risc que correm enfront de la destrucció del nostre servidor de fitxers, és convenient, considerar les avaries del servidor, la possibilitat de danys per aigua (trencament d'una canonada) o els danys per foc, en lloc de plantejar-nos el risc que el CPD siga destruït per un meteorit.</text:span></text:p>
          </draw:text-box>
        </draw:frame>
        <presentation:notes draw:style-name="dp2">
          <draw:page-thumbnail draw:style-name="gr5" draw:layer="layout" svg:width="19.798cm" svg:height="11.136cm" svg:x="0.6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Blank" presentation:presentation-page-layout-name="AL1T11">
        <draw:custom-shape draw:name="object 21" draw:style-name="gr25"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21.25cm" svg:height="11.068cm" svg:x="1.904cm" svg:y="6.664cm">
          <draw:text-box>
            <text:p text:style-name="P18"><text:span text:style-name="T20">Fase 4. Identificar vulnerabilitats i salvaguardes</text:span></text:p>
            <text:p text:style-name="P18"><text:span text:style-name="T20"/></text:p>
            <text:p text:style-name="P19"><text:span text:style-name="T20">La següent fase consisteix a estudiar les característiques dels nostres actius per a identificar punts febles o vulnerabilitats. Per exemple, una possible vulnerabilitat pot ser identificar un conjunt d'ordinadors o servidors els sistemes antivirus dels quals no estan actualitzats o una sèrie d'actius per als quals no existeix suport ni manteniment per part del fabricant. Posteriorment, a l'hora d'avaluar el risc aplicarem penalitzacions per a reflectir les vulnerabilitats identificades.</text:span></text:p>
            <text:p text:style-name="P19"><text:span text:style-name="T20"/></text:p>
            <text:p text:style-name="P19"><text:span text:style-name="T20">D'altra banda, també analitzarem i documentarem les mesures de seguretat implantades en la nostra organització. Per exemple, és possible que hàgem instal·lat un sistema SAI (Sistema d'Alimentació Ininterrompuda) o un grup electrogen per a proveir d'electricitat als equips del CPD. Totes dues mesures de seguretat (també conegudes com a salvaguardes) contribueixen a reduir el risc de les amenaces relacionades amb el tall de subministrament elèctric.</text:span></text:p>
            <text:p text:style-name="P19"><text:span text:style-name="T20"/></text:p>
            <text:p text:style-name="P19"><text:span text:style-name="T20"/></text:p>
          </draw:text-box>
        </draw:frame>
        <presentation:notes draw:style-name="dp2">
          <draw:page-thumbnail draw:style-name="gr5" draw:layer="layout" svg:width="19.798cm" svg:height="11.136cm" svg:x="0.6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Blank" presentation:presentation-page-layout-name="AL1T11">
        <draw:custom-shape draw:name="object 22" draw:style-name="gr27"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0" draw:layer="layout" svg:width="21.25cm" svg:height="9.287cm" svg:x="1.904cm" svg:y="6.664cm">
          <draw:text-box>
            <text:p text:style-name="P18"><text:span text:style-name="T20">Fase 5. Avaluar el risc</text:span></text:p>
            <text:p text:style-name="P18"><text:span text:style-name="T20"/></text:p>
            <text:p text:style-name="P18"><text:span text:style-name="T20">Arribat a aquest punt disposem dels següents elements:</text:span></text:p>
            <text:p text:style-name="P18"><text:span text:style-name="T20"/></text:p>
            <text:list text:style-name="L4">
              <text:list-item>
                <text:p text:style-name="P18"><text:span text:style-name="T20">Inventari d'actius.</text:span></text:p>
              </text:list-item>
              <text:list-item>
                <text:p text:style-name="P18"><text:span text:style-name="T20">Conjunt d'amenaces a les quals està exposada cada actiu.</text:span></text:p>
              </text:list-item>
              <text:list-item>
                <text:p text:style-name="P18"><text:span text:style-name="T20">Conjunt de vulnerabilitats associades a cada actiu (si correspon).</text:span></text:p>
              </text:list-item>
              <text:list-item>
                <text:p text:style-name="P18"><text:span text:style-name="T20">Conjunt de mesures de seguretat implantades</text:span></text:p>
              </text:list-item>
            </text:list>
            <text:p text:style-name="P19"><text:span text:style-name="T20"/></text:p>
            <text:p text:style-name="P19"><text:span text:style-name="T20">Amb aquesta informació, ens trobem en condicions de calcular el risc. Per a cada parell actiu-amenaça, estimarem la probabilitat que l'amenaça es materialitze i l'impacte sobre el negoci que això produiria. El càlcul de risc es pot realitzar usant tant criteris quantitatius com qualitatius. </text:span></text:p>
            <text:p text:style-name="P19"><text:span text:style-name="T20"/></text:p>
          </draw:text-box>
        </draw:frame>
        <presentation:notes draw:style-name="dp2">
          <draw:page-thumbnail draw:style-name="gr5" draw:layer="layout" svg:width="19.798cm" svg:height="11.136cm" svg:x="0.6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Blank" presentation:presentation-page-layout-name="AL1T11">
        <draw:custom-shape draw:name="object 30" draw:style-name="gr29"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0" draw:layer="layout" svg:width="21.25cm" svg:height="7.336cm" svg:x="1.904cm" svg:y="6.664cm">
          <draw:text-box>
            <text:p text:style-name="P18"><text:span text:style-name="T20">Fase 5. Avaluar el risc</text:span></text:p>
            <text:p text:style-name="P18"><text:span text:style-name="T20"/></text:p>
            <text:p text:style-name="P18"><text:span text:style-name="T20">Càlcul del risc</text:span></text:p>
            <text:p text:style-name="P18"><text:span text:style-name="T20"/></text:p>
            <text:p text:style-name="P18"><text:span text:style-name="T20">A l'hora de calcular el risc, si hem optat per fer l'anàlisi quantitativa, calcularem multiplicant els factors probabilitat i impacte:</text:span></text:p>
            <text:p text:style-name="P18"><text:span text:style-name="T20"/></text:p>
            <text:p text:style-name="P18"><text:span text:style-name="T20">RISC = PROBABILITAT x IMPACTE.</text:span></text:p>
            <text:p text:style-name="P18"><text:span text:style-name="T20"/></text:p>
            <text:p text:style-name="P18"><text:span text:style-name="T20"/></text:p>
            <text:p text:style-name="P19"><text:span text:style-name="T20"/></text:p>
          </draw:text-box>
        </draw:frame>
        <presentation:notes draw:style-name="dp2">
          <draw:page-thumbnail draw:style-name="gr5" draw:layer="layout" svg:width="19.798cm" svg:height="11.136cm" svg:x="0.6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Blank" presentation:presentation-page-layout-name="AL1T11">
        <draw:custom-shape draw:name="object 32" draw:style-name="gr31"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20" draw:layer="layout" svg:width="21.25cm" svg:height="7.336cm" svg:x="1.904cm" svg:y="6.664cm">
          <draw:text-box>
            <text:p text:style-name="P18"><text:span text:style-name="T20">Fase 5. Avaluar el risc</text:span></text:p>
            <text:p text:style-name="P18"><text:span text:style-name="T20"/></text:p>
            <text:p text:style-name="P18"><text:span text:style-name="T20">Càlcul del risc</text:span></text:p>
            <text:p text:style-name="P18"><text:span text:style-name="T20"/></text:p>
            <text:p text:style-name="P18"><text:span text:style-name="T20">Si per contra hem optat per l'anàlisi qualitativa, farem ús d'una matriu de risc com la que es mostra a continuació</text:span></text:p>
            <text:p text:style-name="P18"><text:span text:style-name="T20"/></text:p>
            <text:p text:style-name="P18"><text:span text:style-name="T20"/></text:p>
            <text:p text:style-name="P19"><text:span text:style-name="T20"/></text:p>
          </draw:text-box>
        </draw:frame>
        <draw:frame draw:style-name="gr4" draw:text-style-name="P9" draw:layer="layout" svg:width="10.036cm" svg:height="4.849cm" svg:x="7.217cm" svg:y="12.008cm">
          <draw:image xlink:href="Pictures/10000000000002390000011384688A35.png" xlink:type="simple" xlink:show="embed" xlink:actuate="onLoad" draw:mime-type="image/png">
            <text:p/>
          </draw:image>
        </draw:frame>
        <presentation:notes draw:style-name="dp2">
          <draw:page-thumbnail draw:style-name="gr5" draw:layer="layout" svg:width="19.798cm" svg:height="11.136cm" svg:x="0.6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Blank" presentation:presentation-page-layout-name="AL1T11">
        <draw:custom-shape draw:name="object 23" draw:style-name="gr33" draw:text-style-name="P14" draw:layer="layout" svg:width="21.935cm" svg:height="1.221cm" svg:x="1.898cm" svg:y="3.944cm">
          <text:p text:style-name="P11"><text:span text:style-name="T11">Anàlisi d’evidències <text:s/>(ris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0" draw:layer="layout" svg:width="21.25cm" svg:height="10.785cm" svg:x="1.904cm" svg:y="6.664cm">
          <draw:text-box>
            <text:p text:style-name="P18"><text:span text:style-name="T20">Fase 6. Tractar el risc</text:span></text:p>
            <text:p text:style-name="P18"><text:span text:style-name="T20"/></text:p>
            <text:p text:style-name="P19"><text:span text:style-name="T20">Una vegada calculat el risc, hem de tractar aquells riscos que superen un límit que nosaltres mateixos hàgem establit. Per exemple, tractarem aquells riscos el valor dels quals siga superior a “4” o superior a “Mitjà” en cas que hàgem fet el càlcul en termes qualitatius. A l'hora de tractar el risc, existeixen quatre estratègies principals:</text:span></text:p>
            <text:p text:style-name="P18"><text:span text:style-name="T20"/></text:p>
            <text:list text:style-name="L4">
              <text:list-item>
                <text:p text:style-name="P18"><text:span text:style-name="T21">Transferir el risc a un tercer. Per exemple, contractant una assegurança que cobrisca els danys a tercers ocasionats per fugides d'informació.</text:span></text:p>
              </text:list-item>
              <text:list-item>
                <text:p text:style-name="P18"><text:span text:style-name="T21">Eliminar el risc. Per exemple, eliminant un procés o sistema que està subjecte a un risc elevat. En el cas pràctic que hem exposat, podríem eliminar la wifi de cortesia per a donar servei als clients si no és estrictament necessari.</text:span></text:p>
              </text:list-item>
              <text:list-item>
                <text:p text:style-name="P18"><text:span text:style-name="T21">Assumir el risc, sempre justificadament. Per exemple, el cost d'instal·lar un grup electrogen pot ser massa alt i per tant, l'organització pot optar per assumir.</text:span></text:p>
              </text:list-item>
              <text:list-item>
                <text:p text:style-name="P18"><text:span text:style-name="T21">Implantar mesures per a mitigar-ho. Per exemple, contractant un accés a internet de suport per a poder accedir als serveis en el núvol en cas que la línia principal haja caigut. </text:span></text:p>
              </text:list-item>
            </text:list>
            <text:p text:style-name="P19"><text:span text:style-name="T20"/></text:p>
          </draw:text-box>
        </draw:frame>
        <presentation:notes draw:style-name="dp2">
          <draw:page-thumbnail draw:style-name="gr5" draw:layer="layout" svg:width="19.798cm" svg:height="11.136cm" svg:x="0.6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Blank" presentation:presentation-page-layout-name="AL1T11">
        <draw:custom-shape draw:name="object 26" draw:style-name="gr35" draw:text-style-name="P14" draw:layer="layout" svg:width="21.5cm" svg:height="8.453cm" svg:x="2cm" svg:y="4.744cm">
          <text:list text:style-name="L4">
            <text:list-item>
              <text:p text:style-name="P11"><text:span text:style-name="T11">Recopilació d’evidències</text:span></text:p>
            </text:list-item>
            <text:list-item>
              <text:p text:style-name="P11"><text:span text:style-name="T11">Anàlisi d’evidències</text:span></text:p>
            </text:list-item>
            <text:list-item>
              <text:p text:style-name="P11"><text:span text:style-name="T13">Investigació de l’incident</text:span></text:p>
            </text:list-item>
            <text:list-item>
              <text:p text:style-name="P11"><text:span text:style-name="T11">Intercanvi d’informació de l’incident amb proveïdors o organismes competents</text:span></text:p>
            </text:list-item>
            <text:list-item>
              <text:p text:style-name="P11"><text:span text:style-name="T11">Mesures de contenció d’incidents</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1" draw:master-page-name="Blank" presentation:presentation-page-layout-name="AL1T11">
        <draw:custom-shape draw:name="object 3" draw:style-name="gr36" draw:text-style-name="P14" draw:layer="layout" svg:width="21.5cm" svg:height="2.387cm" svg:x="2cm" svg:y="4.744cm">
          <text:p text:style-name="P11"><text:span text:style-name="T11">Amb tècniques d’anàlisi forense</text:span></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2.359cm" svg:height="9.91cm" svg:x="8.32cm" svg:y="6.878cm">
          <draw:image xlink:href="Pictures/10000000000004330000035E16D5C592.png" xlink:type="simple" xlink:show="embed" xlink:actuate="onLoad" draw:mime-type="image/png">
            <text:p/>
          </draw:image>
        </draw:frame>
        <presentation:notes draw:style-name="dp2">
          <draw:page-thumbnail draw:style-name="gr5" draw:layer="layout" svg:width="19.798cm" svg:height="11.136cm" svg:x="0.6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Blank" presentation:presentation-page-layout-name="AL1T11">
        <draw:custom-shape draw:name="object 31" draw:style-name="gr37" draw:text-style-name="P14" draw:layer="layout" svg:width="21.5cm" svg:height="12.177cm" svg:x="2cm" svg:y="4.744cm">
          <text:p text:style-name="P11"><text:span text:style-name="T11">Anàlisi forense</text:span></text:p>
          <text:p text:style-name="P11"><text:span text:style-name="T11">Cada cas suposarà analitzar unes evidències</text:span></text:p>
          <text:p text:style-name="P11"><text:span text:style-name="T11"/></text:p>
          <text:list text:style-name="L4">
            <text:list-item>
              <text:p text:style-name="P11"><text:span text:style-name="T22">Comunicacions</text:span></text:p>
            </text:list-item>
            <text:list-item>
              <text:p text:style-name="P11"><text:span text:style-name="T22">Imatge de disc</text:span></text:p>
            </text:list-item>
            <text:list-item>
              <text:p text:style-name="P11"><text:span text:style-name="T22">Imatge de memòria</text:span></text:p>
            </text:list-item>
            <text:list-item>
              <text:p text:style-name="P11"><text:span text:style-name="T22">Fitxers amb diversos formats</text:span></text:p>
            </text:list-item>
            <text:list-item>
              <text:p text:style-name="P11"><text:span text:style-name="T22">Metadades</text:span></text:p>
            </text:list-item>
            <text:list-item>
              <text:p text:style-name="P11"><text:span text:style-name="T22">Dispositius hardware</text:span></text:p>
            </text:list-item>
            <text:list-item>
              <text:p text:style-name="P11"><text:span text:style-name="T22">Malware</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Blank" presentation:presentation-page-layout-name="AL1T11">
        <draw:custom-shape draw:name="object 27" draw:style-name="gr38" draw:text-style-name="P14" draw:layer="layout" svg:width="21.5cm" svg:height="8.453cm" svg:x="2cm" svg:y="4.744cm">
          <text:list text:style-name="L4">
            <text:list-item>
              <text:p text:style-name="P11"><text:span text:style-name="T11">Recopilació d’evidències</text:span></text:p>
            </text:list-item>
            <text:list-item>
              <text:p text:style-name="P11"><text:span text:style-name="T11">Anàlisi d’evidències</text:span></text:p>
            </text:list-item>
            <text:list-item>
              <text:p text:style-name="P11"><text:span text:style-name="T11">Investigació de l’incident</text:span></text:p>
            </text:list-item>
            <text:list-item>
              <text:p text:style-name="P11"><text:span text:style-name="T13">Intercanvi d’informació de l’incident amb proveïdors o organismes competents</text:span></text:p>
            </text:list-item>
            <text:list-item>
              <text:p text:style-name="P11"><text:span text:style-name="T11">Mesures de contenció d’incidents</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Blank" presentation:presentation-page-layout-name="AL1T11">
        <draw:custom-shape draw:name="object 5" draw:style-name="gr39" draw:text-style-name="P14" draw:layer="layout" svg:width="23.893cm" svg:height="12.454cm" svg:x="0.968cm" svg:y="3.363cm">
          <text:p text:style-name="P11"><text:span text:style-name="T11">Proveïdors <text:s/>-&gt; amb email</text:span></text:p>
          <text:p text:style-name="P11"><text:span text:style-name="T23"/></text:p>
          <text:p text:style-name="P11"><text:span text:style-name="T11">Organismes competents</text:span></text:p>
          <text:list text:style-name="L4">
            <text:list-item>
              <text:p text:style-name="P11"><text:span text:style-name="T24">El subjecte afectat enviarà un correu electrònic (o tiquet) al CSIRT de referència</text:span></text:p>
            </text:list-item>
            <text:list-item>
              <text:p text:style-name="P11"><text:span text:style-name="T24">El CSIRT de referència, depenent de l'incident, posa en coneixement del mateix a l'organisme receptor implicat o l'autoritat nacional competent</text:span></text:p>
              <text:list>
                <text:list-item>
                  <text:p text:style-name="P11"><text:span text:style-name="T25">Si afecta la Defensa Nacional, al ESP DEF CERT</text:span></text:p>
                </text:list-item>
                <text:list-item>
                  <text:p text:style-name="P11"><text:span text:style-name="T25">Si afecta Infraestructura Crítica de la Llei PIC 8/2011, al CNPIC</text:span></text:p>
                </text:list-item>
                <text:list-item>
                  <text:p text:style-name="P11"><text:span text:style-name="T25">Si afecta el RGPD, a l'AEPD.</text:span></text:p>
                </text:list-item>
                <text:list-item>
                  <text:p text:style-name="P11"><text:span text:style-name="T25">Si és un incident de AAPP sota el ENS de perillositat MOLT ALTA o CRÍTICA, al CCN-CERT</text:span></text:p>
                </text:list-item>
                <text:list-item>
                  <text:p text:style-name="P11"><text:span text:style-name="T25">Si és un incident d'obligatori report segons l'RD Llei 12/2018, a l'autoritat nacional competent corresponent.</text:span></text:p>
                  <text:list>
                    <text:list-item>
                      <text:p text:style-name="P11"><text:span text:style-name="T25">RGPD: es remet la URL del portal de l'AEPD.</text:span></text:p>
                    </text:list-item>
                    <text:list-item>
                      <text:p text:style-name="P11"><text:span text:style-name="T25"><text:a xlink:href="https://www.bde.es/bde/es/" xlink:type="simple">BDE</text:a></text:span><text:span text:style-name="T25">: es remet la plantilla de notificació .XLS del BDE.</text:span></text:p>
                    </text:list-item>
                    <text:list-item>
                      <text:p text:style-name="P11"><text:span text:style-name="T25">PIC: es remet la plantilla de notificació .XLS del CNPIC.</text:span></text:p>
                    </text:list-item>
                    <text:list-item>
                      <text:p text:style-name="P11"><text:span text:style-name="T25">ENS: es remet la plantilla de notificació .DOC a CCN-CERT.</text:span></text:p>
                    </text:list-item>
                    <text:list-item>
                      <text:p text:style-name="P11"><text:span text:style-name="T25">NIS: es remet la plantilla de notificació de l'autoritat nacional competen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6.453cm" svg:height="0.66cm" svg:x="13.299cm" svg:y="8.94cm">
          <draw:image xlink:href="Pictures/100000000000019000000029BABA1C1A.png" xlink:type="simple" xlink:show="embed" xlink:actuate="onLoad" draw:mime-type="image/png">
            <text:p/>
          </draw:image>
          <office:event-listeners>
            <presentation:event-listener script:event-name="dom:click" presentation:action="show" xlink:href="https://emad.defensa.gob.es/unidades/mcce/" xlink:type="simple" xlink:show="embed" xlink:actuate="onRequest"/>
          </office:event-listeners>
        </draw:frame>
        <draw:frame draw:style-name="gr4" draw:text-style-name="P9" draw:layer="layout" svg:width="5.37cm" svg:height="1.66cm" svg:x="19.543cm" svg:y="8.839cm">
          <draw:image xlink:href="Pictures/100000000000034C00000105D12EA57A.png" xlink:type="simple" xlink:show="embed" xlink:actuate="onLoad" draw:mime-type="image/png">
            <text:p/>
          </draw:image>
          <office:event-listeners>
            <presentation:event-listener script:event-name="dom:click" presentation:action="show" xlink:href="https://www.boe.es/buscar/doc.php?id=BOE-A-2011-8849" xlink:type="simple" xlink:show="embed" xlink:actuate="onRequest"/>
          </office:event-listeners>
        </draw:frame>
        <draw:frame draw:style-name="gr4" draw:text-style-name="P9" draw:layer="layout" svg:width="5.117cm" svg:height="2.347cm" svg:x="19.955cm" svg:y="12.576cm">
          <draw:image xlink:href="Pictures/100000000000012F0000008B3690B782.png" xlink:type="simple" xlink:show="embed" xlink:actuate="onLoad" draw:mime-type="image/png">
            <text:p/>
          </draw:image>
          <office:event-listeners>
            <presentation:event-listener script:event-name="dom:click" presentation:action="show" xlink:href="https://www.boe.es/buscar/act.php?id=BOE-A-2010-1330" xlink:type="simple" xlink:show="embed" xlink:actuate="onRequest"/>
          </office:event-listeners>
        </draw:frame>
        <draw:frame draw:style-name="gr4" draw:text-style-name="P9" draw:layer="layout" svg:width="5.795cm" svg:height="3.133cm" svg:x="19.612cm" svg:y="15.132cm">
          <draw:image xlink:href="Pictures/100000000000017D000000CE854D81C9.png" xlink:type="simple" xlink:show="embed" xlink:actuate="onLoad" draw:mime-type="image/png">
            <text:p/>
          </draw:image>
          <office:event-listeners>
            <presentation:event-listener script:event-name="dom:click" presentation:action="show" xlink:href="https://www.boe.es/diario_boe/txt.php?id=BOE-A-2021-1192" xlink:type="simple" xlink:show="embed" xlink:actuate="onRequest"/>
          </office:event-listeners>
        </draw:frame>
        <draw:frame draw:style-name="gr4" draw:text-style-name="P9" draw:layer="layout" svg:width="2.561cm" svg:height="4.329cm" svg:x="22.594cm" svg:y="2.605cm">
          <draw:image xlink:href="Pictures/10000000000000C8000001522EC41DA6.png" xlink:type="simple" xlink:show="embed" xlink:actuate="onLoad" draw:mime-type="image/png">
            <text:p/>
          </draw:image>
          <office:event-listeners>
            <presentation:event-listener script:event-name="dom:click" presentation:action="show" xlink:href="https://emad.defensa.gob.es/unidades/mcce/" xlink:type="simple" xlink:show="embed" xlink:actuate="onRequest"/>
          </office:event-listeners>
        </draw:frame>
        <presentation:notes draw:style-name="dp2">
          <draw:page-thumbnail draw:style-name="gr5" draw:layer="layout" svg:width="19.798cm" svg:height="11.136cm" svg:x="0.6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Blank" presentation:presentation-page-layout-name="AL1T11">
        <draw:custom-shape draw:name="object 6" draw:style-name="gr40" draw:text-style-name="P14" draw:layer="layout" svg:width="23.893cm" svg:height="5.05cm" svg:x="0.984cm" svg:y="3.33cm">
          <text:p text:style-name="P11"><text:span text:style-name="T24"/></text:p>
          <text:list text:style-name="L4">
            <text:list-item>
              <text:list>
                <text:list-item>
                  <text:p text:style-name="P11"><text:span text:style-name="T25">L'Organisme receptor implicat o autoritat nacional competent es posa en contacte amb el subjecte afectat per a recaptar dades de l'incident.</text:span></text:p>
                </text:list-item>
                <text:list-item>
                  <text:p text:style-name="P11"><text:span text:style-name="T25">El subjecte afectat comunica les dades necessàries a l'organisme receptor implicat o autoritat nacional competent.</text:span></text:p>
                </text:list-item>
                <text:list-item>
                  <text:p text:style-name="P21"><text:span text:style-name="T25">Si escau, des de l'Oficina de Coordinació Cibernètica (OCC, depen de CNPIC) es posa la informació a la disposició de les Forces i Cossos de Seguretat de l'Estat i Ministeri Fiscal per a iniciar la investigació policial i judicial (art. 14.3 RD Llei 12/2018).</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6" draw:layer="layout" svg:width="22.281cm" svg:height="6.941cm" svg:x="1.514cm" svg:y="9.435cm">
          <draw:text-box>
            <text:p><text:span text:style-name="T26">Con la publicación del RD 43/2021, los operadores críticos, operadores de servicios esenciales y proveedores de servicios digitales tienen la obligación de notificar sus incidentes</text:span><text:span text:style-name="T27">. </text:span></text:p>
            <text:p><text:span text:style-name="T27"/></text:p>
            <text:p>Directiva NIS – RD-L 12/2019 - RD 43/2021</text:p>
            <text:p><text:a xlink:href="https://www.incibe-cert.es/FAQ-RD_43-2021" xlink:type="simple">https://www.incibe-cert.es/FAQ-RD_43-2021</text:a></text:p>
            <text:p/>
            <text:p/>
          </draw:text-box>
        </draw:frame>
        <presentation:notes draw:style-name="dp2">
          <draw:page-thumbnail draw:style-name="gr5" draw:layer="layout" svg:width="19.798cm" svg:height="11.136cm" svg:x="0.6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Blank" presentation:presentation-page-layout-name="AL1T11">
        <draw:custom-shape draw:name="object 28" draw:style-name="gr42" draw:text-style-name="P14" draw:layer="layout" svg:width="21.5cm" svg:height="8.453cm" svg:x="2cm" svg:y="4.744cm">
          <text:list text:style-name="L4">
            <text:list-item>
              <text:p text:style-name="P11"><text:span text:style-name="T11">Recopilació d’evidències</text:span></text:p>
            </text:list-item>
            <text:list-item>
              <text:p text:style-name="P11"><text:span text:style-name="T11">Anàlisi d’evidències</text:span></text:p>
            </text:list-item>
            <text:list-item>
              <text:p text:style-name="P11"><text:span text:style-name="T11">Investigació de l’incident</text:span></text:p>
            </text:list-item>
            <text:list-item>
              <text:p text:style-name="P11"><text:span text:style-name="T11">Intercanvi d’informació de l’incident amb proveïdors o organismes competents</text:span></text:p>
            </text:list-item>
            <text:list-item>
              <text:p text:style-name="P11"><text:span text:style-name="T13">Mesures de contenció d’incidents</text:span></text:p>
            </text:list-item>
          </text:list>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1" draw:master-page-name="Blank" presentation:presentation-page-layout-name="AL1T11">
        <draw:custom-shape draw:name="object 29" draw:style-name="gr43" draw:text-style-name="P22" draw:layer="layout" svg:width="21.5cm" svg:height="10.873cm" svg:x="1.817cm" svg:y="3.463cm">
          <text:p text:style-name="P21"><text:span text:style-name="T28">En el moment que s'ha identificat un ciberincident la màxima prioritat és contindre l'impacte del mateix en l'organització de manera que es puguen evitar al més prompte possible la propagació a altres sistemes o xarxes evitant un impacte major, i l'extracció d'informació fora de l'organització.</text:span></text:p>
          <text:p text:style-name="P21"><text:span text:style-name="T28"/></text:p>
          <text:p text:style-name="P21"><text:span text:style-name="T28">Aquesta sol ser la fase en la qual es realitza el triage que consisteix en avaluar tota la informació disponible en eixe moment i realitzar una classificació i priorització del ciberincident en funció del tipus i de la criticitat de la informació i els sistemes afectats. </text:span></text:p>
          <text:p text:style-name="P21"><text:span text:style-name="T28"/></text:p>
          <text:p text:style-name="P21"><text:span text:style-name="T28">Addicionalment s'identifiquen possibles impactes en el negoci i en funció dels procediments es treballa en la presa de decisions amb les unitats de negoci apropiades i/o als responsables dels serveis.</text:span></text:p>
          <text:p text:style-name="P21"><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Blank" presentation:presentation-page-layout-name="AL1T11">
        <draw:custom-shape draw:name="object 7" draw:style-name="gr44" draw:text-style-name="P22" draw:layer="layout" svg:width="21.5cm" svg:height="12.005cm" svg:x="1.817cm" svg:y="3.463cm">
          <text:p text:style-name="P21"><text:span text:style-name="T28">Les mesures de mitigació dependran de la mena de ciberincident, ja que en alguns casos serà necessari comptar amb suport de proveïdors de serveis, com en el cas d'un atacs de denegació de servei distribuït (DDoS), i en uns altres ciberincidents pot suposar incloc l'esborrat complet dels sistemes afectats i recuperació des d'una còpia de seguretat.</text:span></text:p>
          <text:p text:style-name="P21"><text:span text:style-name="T28"/></text:p>
          <text:p text:style-name="P21"><text:span text:style-name="T28">La finalitat de la fase de recuperació consisteix a retornar el nivell d'operació al seu estat normal i que les àrees de negoci afectades puguen reprendre la seua activitat. És important no precipitar-se en la posada en producció de sistemes que s'han vist implicats en ciberincidents.</text:span></text:p>
          <text:p text:style-name="P21"><text:span text:style-name="T28"/></text:p>
          <text:p text:style-name="P21"><text:span text:style-name="T28">Convé prestar especial atenció a aquests sistemes durant la posada en producció i buscar qualsevol signe d'activitat sospitosa, definint un període de temps amb mesures addicionals de monitoratge.</text:span></text:p>
          <text:p text:style-name="P2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0"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swiss"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style:rfc-language-tag="ca-ES-valencia" fo:language="ca" fo:country="E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83cm" fo:margin-bottom="0cm" fo:text-indent="0cm"/>
      <style:text-properties fo:font-size="33.9000015258789pt" style:font-size-asian="28pt" style:font-size-complex="28pt"/>
    </style:style>
    <style:style style:name="Predeterminado-outline3" style:family="presentation" style:parent-style-name="Predeterminado-outline2">
      <style:paragraph-properties fo:margin-left="0cm" fo:margin-right="0cm" fo:margin-top="0.362cm" fo:margin-bottom="0cm" fo:text-indent="0cm"/>
      <style:text-properties fo:font-size="29.1000003814697pt" style:font-size-asian="24pt" style:font-size-complex="24pt"/>
    </style:style>
    <style:style style:name="Predeterminado-outline4" style:family="presentation" style:parent-style-name="Predeterminado-outline3">
      <style:paragraph-properties fo:margin-left="0cm" fo:margin-right="0cm" fo:margin-top="0.241cm" fo:margin-bottom="0cm" fo:text-indent="0cm"/>
      <style:text-properties fo:font-size="24.2000007629395pt" style:font-size-asian="20pt" style:font-size-complex="20pt"/>
    </style:style>
    <style:style style:name="Predeterminado-outline5" style:family="presentation" style:parent-style-name="Predeterminado-outline4">
      <style:paragraph-properties fo:margin-left="0cm" fo:margin-right="0cm" fo:margin-top="0.12cm" fo:margin-bottom="0cm" fo:text-indent="0cm"/>
      <style:text-properties fo:font-size="24.2000007629395pt" style:font-size-asian="20pt" style:font-size-complex="20pt"/>
    </style:style>
    <style:style style:name="Predeterminado-outline6" style:family="presentation" style:parent-style-name="Predeterminado-outline5">
      <style:paragraph-properties fo:margin-left="0cm" fo:margin-right="0cm" fo:margin-top="0.12cm" fo:margin-bottom="0cm" fo:text-indent="0cm"/>
      <style:text-properties fo:font-size="24.2000007629395pt" style:font-size-asian="20pt" style:font-size-complex="20pt"/>
    </style:style>
    <style:style style:name="Predeterminado-outline7" style:family="presentation" style:parent-style-name="Predeterminado-outline6">
      <style:paragraph-properties fo:margin-left="0cm" fo:margin-right="0cm" fo:margin-top="0.12cm" fo:margin-bottom="0cm" fo:text-indent="0cm"/>
      <style:text-properties fo:font-size="24.2000007629395pt" style:font-size-asian="20pt" style:font-size-complex="20pt"/>
    </style:style>
    <style:style style:name="Predeterminado-outline8" style:family="presentation" style:parent-style-name="Predeterminado-outline7">
      <style:paragraph-properties fo:margin-left="0cm" fo:margin-right="0cm" fo:margin-top="0.12cm" fo:margin-bottom="0cm" fo:text-indent="0cm"/>
      <style:text-properties fo:font-size="24.2000007629395pt" style:font-size-asian="20pt" style:font-size-complex="20pt"/>
    </style:style>
    <style:style style:name="Predeterminado-outline9" style:family="presentation" style:parent-style-name="Predeterminado-outline8">
      <style:paragraph-properties fo:margin-left="0cm" fo:margin-right="0cm" fo:margin-top="0.12cm" fo:margin-bottom="0cm" fo:text-indent="0cm"/>
      <style:text-properties fo:font-size="24.2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VF-background" style:family="presentation">
      <style:graphic-properties draw:stroke="none" draw:fill="none"/>
      <style:text-properties style:letter-kerning="true"/>
    </style:style>
    <style:style style:name="SVF-backgroundobjects" style:family="presentation">
      <style:graphic-properties draw:textarea-horizontal-align="justify" draw:shadow="hidden" draw:shadow-offset-x="0.2cm" draw:shadow-offset-y="0.2cm" draw:shadow-color="#808080"/>
      <style:text-properties style:letter-kerning="true"/>
    </style:style>
    <style:style style:name="SVF-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VF-outline1" style:family="presentation">
      <style:graphic-properties draw:stroke="none" draw:fill="none" draw:auto-grow-height="false" draw:fit-to-size="false" style:shrink-to-fit="true">
        <text:list-style style:name="SV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outline2" style:family="presentation" style:parent-style-name="SVF-outline1">
      <style:paragraph-properties fo:margin-top="0.4cm" fo:margin-bottom="0cm"/>
      <style:text-properties fo:font-size="28pt" style:font-size-asian="28pt" style:font-size-complex="28pt"/>
    </style:style>
    <style:style style:name="SVF-outline3" style:family="presentation" style:parent-style-name="SVF-outline2">
      <style:paragraph-properties fo:margin-top="0.3cm" fo:margin-bottom="0cm"/>
      <style:text-properties fo:font-size="24pt" style:font-size-asian="24pt" style:font-size-complex="24pt"/>
    </style:style>
    <style:style style:name="SVF-outline4" style:family="presentation" style:parent-style-name="SVF-outline3">
      <style:paragraph-properties fo:margin-top="0.2cm" fo:margin-bottom="0cm"/>
      <style:text-properties fo:font-size="20pt" style:font-size-asian="20pt" style:font-size-complex="20pt"/>
    </style:style>
    <style:style style:name="SVF-outline5" style:family="presentation" style:parent-style-name="SVF-outline4">
      <style:paragraph-properties fo:margin-top="0.1cm" fo:margin-bottom="0cm"/>
      <style:text-properties fo:font-size="20pt" style:font-size-asian="20pt" style:font-size-complex="20pt"/>
    </style:style>
    <style:style style:name="SVF-outline6" style:family="presentation" style:parent-style-name="SVF-outline5">
      <style:paragraph-properties fo:margin-top="0.1cm" fo:margin-bottom="0cm"/>
      <style:text-properties fo:font-size="20pt" style:font-size-asian="20pt" style:font-size-complex="20pt"/>
    </style:style>
    <style:style style:name="SVF-outline7" style:family="presentation" style:parent-style-name="SVF-outline6">
      <style:paragraph-properties fo:margin-top="0.1cm" fo:margin-bottom="0cm"/>
      <style:text-properties fo:font-size="20pt" style:font-size-asian="20pt" style:font-size-complex="20pt"/>
    </style:style>
    <style:style style:name="SVF-outline8" style:family="presentation" style:parent-style-name="SVF-outline7">
      <style:paragraph-properties fo:margin-top="0.1cm" fo:margin-bottom="0cm"/>
      <style:text-properties fo:font-size="20pt" style:font-size-asian="20pt" style:font-size-complex="20pt"/>
    </style:style>
    <style:style style:name="SVF-outline9" style:family="presentation" style:parent-style-name="SVF-outline8">
      <style:paragraph-properties fo:margin-top="0.1cm" fo:margin-bottom="0cm"/>
      <style:text-properties fo:font-size="20pt" style:font-size-asian="20pt" style:font-size-complex="20pt"/>
    </style:style>
    <style:style style:name="SVF-subtitle" style:family="presentation">
      <style:graphic-properties draw:stroke="none" draw:fill="none" draw:textarea-vertical-align="middle">
        <text:list-style style:name="SV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VF-title" style:family="presentation">
      <style:graphic-properties draw:stroke="none" draw:fill="none" draw:textarea-vertical-align="middle">
        <text:list-style style:name="SV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3.6000003814697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1cm" fo:text-indent="0cm"/>
      <style:text-properties style:font-name="Source Sans Pro Light" fo:font-family="'Source Sans Pro Light'" style:font-style-name="細字" style:font-family-generic="swiss" style:font-pitch="variable" fo:font-size="20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7cm" fo:text-indent="0cm"/>
      <style:text-properties fo:font-size="16.2999992370605pt" style:font-size-asian="13.5pt" style:font-size-complex="13.5pt"/>
    </style:style>
    <style:style style:name="Alizarin-outline4" style:family="presentation" style:parent-style-name="Alizarin-outline3">
      <style:paragraph-properties fo:margin-left="0cm" fo:margin-right="0cm" fo:margin-top="0cm" fo:margin-bottom="0.181cm" fo:text-indent="0cm"/>
      <style:text-properties fo:font-size="14.5pt" style:font-size-asian="12pt" style:font-size-complex="12pt"/>
    </style:style>
    <style:style style:name="Alizarin-outline5" style:family="presentation" style:parent-style-name="Alizarin-outline4">
      <style:paragraph-properties fo:margin-left="0cm" fo:margin-right="0cm" fo:margin-top="0cm" fo:margin-bottom="0.09cm" fo:text-indent="0cm"/>
      <style:text-properties fo:font-size="14.5pt" style:font-size-asian="12pt" style:font-size-complex="12pt"/>
    </style:style>
    <style:style style:name="Alizarin-outline6" style:family="presentation" style:parent-style-name="Alizarin-outline5">
      <style:paragraph-properties fo:margin-left="0cm" fo:margin-right="0cm" fo:margin-top="0cm" fo:margin-bottom="0.09cm" fo:text-indent="0cm"/>
      <style:text-properties fo:font-size="14.5pt" style:font-size-asian="12pt" style:font-size-complex="12pt"/>
    </style:style>
    <style:style style:name="Alizarin-outline7" style:family="presentation" style:parent-style-name="Alizarin-outline6">
      <style:paragraph-properties fo:margin-left="0cm" fo:margin-right="0cm" fo:margin-top="0cm" fo:margin-bottom="0.09cm" fo:text-indent="0cm"/>
      <style:text-properties fo:font-size="14.5pt" style:font-size-asian="12pt" style:font-size-complex="12pt"/>
    </style:style>
    <style:style style:name="Alizarin-outline8" style:family="presentation" style:parent-style-name="Alizarin-outline7">
      <style:paragraph-properties fo:margin-left="0cm" fo:margin-right="0cm" fo:margin-top="0cm" fo:margin-bottom="0.089cm" fo:text-indent="0cm"/>
      <style:text-properties fo:font-size="12.6999998092651pt" style:font-size-asian="10.5pt" style:font-size-complex="10.5pt"/>
    </style:style>
    <style:style style:name="Alizarin-outline9" style:family="presentation" style:parent-style-name="Alizarin-outline8">
      <style:paragraph-properties fo:margin-left="0cm" fo:margin-right="0cm" fo:margin-top="0cm" fo:margin-bottom="0.089cm" fo:text-indent="0cm"/>
      <style:text-properties fo:font-size="12.6999998092651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9.1000003814697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1f1f1"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list-style-name="M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5"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Mgr8"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gr9" style:family="graphic" style:parent-style-name="standard">
      <style:graphic-properties draw:stroke="none" draw:fill="none" draw:fill-color="#ffffff" fo:min-height="10.798cm" loext:decorative="false"/>
    </style:style>
    <style:style style:name="Mgr10" style:family="graphic" style:parent-style-name="standard">
      <style:graphic-properties draw:textarea-vertical-align="middle" fo:min-height="0cm" fo:min-width="0cm" loext:decorative="false"/>
    </style:style>
    <style:style style:name="Mgr11" style:family="graphic" style:parent-style-name="standard">
      <style:graphic-properties draw:stroke="none" draw:fill-color="#f44336" draw:textarea-vertical-align="middle" draw:auto-grow-height="false" fo:min-height="1.111cm" fo:min-width="0.861cm" loext:decorative="false"/>
    </style:style>
    <style:style style:name="Mgr12" style:family="graphic" style:parent-style-name="standard">
      <style:graphic-properties draw:stroke="none" draw:fill="none" draw:fill-color="#ffffff" fo:min-height="11.543cm" loext:decorative="false"/>
    </style:style>
    <style:style style:name="Mpr1" style:family="presentation" style:parent-style-name="Blank-backgroundobjects">
      <style:graphic-properties draw:fill-color="#b4c7dc" draw:textarea-vertical-align="middle" draw:auto-grow-height="false" fo:min-height="1.5cm" fo:min-width="25.5cm" loext:decorative="false"/>
    </style:style>
    <style:style style:name="Mpr2" style:family="presentation" style:parent-style-name="Blank-backgroundobjects"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pr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6"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VF-backgroundobjects">
      <style:graphic-properties draw:stroke="none" draw:fill="none" draw:fill-color="#ffffff" draw:auto-grow-height="false" fo:min-height="1.485cm" loext:decorative="false"/>
      <style:paragraph-properties style:writing-mode="lr-tb"/>
    </style:style>
    <style:style style:name="Mpr9" style:family="presentation" style:parent-style-name="SVF-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backgroundobjects">
      <style:graphic-properties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4c7dc"/>
      <style:paragraph-properties fo:text-align="center"/>
    </style:style>
    <style:style style:name="MP6" style:family="paragraph">
      <loext:graphic-properties draw:fill="solid" draw:fill-color="#f1f1f1"/>
      <style:paragraph-properties fo:text-align="start" style:font-independent-line-spacing="true"/>
      <style:text-properties fo:font-size="18pt"/>
    </style:style>
    <style:style style:name="MP7" style:family="paragraph">
      <style:paragraph-properties fo:margin-left="0cm" fo:margin-right="0.189cm" fo:margin-top="0.035cm" fo:margin-bottom="0cm" fo:line-height="100%" fo:text-align="end" fo:text-indent="0cm" style:writing-mode="lr-tb"/>
      <style:text-properties fo:font-size="18pt"/>
    </style:style>
    <style:style style:name="MP8" style:family="paragraph">
      <style:paragraph-properties fo:margin-left="0cm" fo:margin-right="0.014cm" fo:margin-top="0cm" fo:margin-bottom="0cm" fo:line-height="100%" fo:text-align="end" fo:text-indent="0cm" style:writing-mode="lr-tb"/>
      <style:text-properties fo:font-size="18pt"/>
    </style:style>
    <style:style style:name="MP9" style:family="paragraph">
      <loext:graphic-properties draw:fill="none"/>
      <style:paragraph-properties fo:margin-left="0cm" fo:margin-right="0.189cm" fo:margin-top="0.035cm" fo:margin-bottom="0cm" fo:line-height="100%" fo:text-align="end" fo:text-indent="0cm" style:writing-mode="lr-tb" style:font-independent-line-spacing="true"/>
      <style:text-properties fo:font-size="18pt"/>
    </style:style>
    <style:style style:name="MP10" style:family="paragraph">
      <style:paragraph-properties fo:margin-left="0cm" fo:margin-right="0cm" fo:margin-top="0.035cm" fo:margin-bottom="0cm" fo:line-height="100%" fo:text-align="start" fo:text-indent="0cm" style:writing-mode="lr-tb"/>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draw:fill-color="#ffffff"/>
      <style:paragraph-properties fo:margin-left="0cm" fo:margin-right="0cm" fo:margin-top="0.035cm" fo:margin-bottom="0cm" fo:line-height="100%" fo:text-align="start" fo:text-indent="0cm"/>
    </style:style>
    <style:style style:name="MP13" style:family="paragraph">
      <style:paragraph-properties fo:margin-left="0.035cm" fo:margin-right="0cm" fo:margin-top="0cm" fo:margin-bottom="0cm" fo:line-height="0.707cm" fo:text-align="start" fo:text-indent="0cm"/>
    </style:style>
    <style:style style:name="MP14"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 fo:font-size="20pt" fo:letter-spacing="-0.002cm" fo:font-weight="bold" style:letter-kerning="true" style:font-size-asian="20pt" style:font-weight-asian="bold" style:font-name-complex="Calibri" style:font-size-complex="20pt" style:font-weight-complex="bold"/>
    </style:style>
    <style:style style:name="MP15" style:family="paragraph">
      <loext:graphic-properties draw:fill="none"/>
      <style:paragraph-properties fo:text-align="center"/>
    </style:style>
    <style:style style:name="MP16" style:family="paragraph">
      <style:paragraph-properties fo:text-align="center"/>
    </style:style>
    <style:style style:name="MP17" style:family="paragraph">
      <loext:graphic-properties draw:fill="none" draw:fill-color="#ffffff"/>
      <style:paragraph-properties fo:text-align="center"/>
      <style:text-properties fo:font-size="6pt" style:font-size-asian="6pt" style:font-size-complex="6pt"/>
    </style:style>
    <style:style style:name="MP18" style:family="paragraph">
      <loext:graphic-properties draw:fill="none" draw:fill-color="#ffffff"/>
    </style:style>
    <style:style style:name="MP19" style:family="paragraph">
      <style:paragraph-properties fo:text-align="center" style:writing-mode="lr-tb"/>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P21" style:family="paragraph">
      <style:paragraph-properties fo:text-align="end"/>
    </style:style>
    <style:style style:name="MP22" style:family="paragraph">
      <loext:graphic-properties draw:fill-color="#f44336"/>
      <style:paragraph-properties fo:text-align="center"/>
    </style:style>
    <style:style style:name="MP23" style:family="paragraph">
      <style:paragraph-properties fo:text-align="center" style:writing-mode="lr-tb"/>
    </style:style>
    <style:style style:name="MP24"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variant="normal" fo:text-transform="none" fo:color="#244060" loext:opacity="100%" style:text-line-through-style="none" style:text-line-through-type="none" style:text-position="0% 100%" style:font-name="Calibri" fo:font-size="20pt" fo:letter-spacing="-0.004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3" style:family="text">
      <style:text-properties fo:font-variant="normal" fo:text-transform="none" fo:color="#244060" loext:opacity="100%" style:text-line-through-style="none" style:text-line-through-type="none" style:text-position="0% 100%" style:font-name="Calibri" fo:font-size="20pt" fo:letter-spacing="-0.016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4" style:family="text">
      <style:text-properties fo:font-variant="normal" fo:text-transform="none" fo:color="#244060" loext:opacity="100%" style:text-line-through-style="none" style:text-line-through-type="none" style:text-position="0% 100%" style:font-name="Calibri" fo:font-size="20pt" fo:letter-spacing="normal"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 fo:font-size="20pt" fo:letter-spacing="-0.002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6" style:family="text">
      <style:text-properties fo:font-variant="normal" fo:text-transform="none" fo:color="#244060" loext:opacity="100%" style:text-line-through-style="none" style:text-line-through-type="none" style:text-position="0% 100%" style:font-name="Calibri" fo:font-size="20pt" fo:letter-spacing="-0.007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7" style:family="text">
      <style:text-properties fo:font-variant="normal" fo:text-transform="none" fo:color="#244060" loext:opacity="100%" style:text-line-through-style="none" style:text-line-through-type="none" style:text-position="0% 100%" style:font-name="Calibri" fo:font-size="20pt" fo:letter-spacing="-0.009cm"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8" style:family="text">
      <style:text-properties fo:font-variant="normal" fo:text-transform="none" fo:color="#244060" loext:opacity="100%" style:text-line-through-style="none" style:text-line-through-type="none" style:text-position="0% 100%" style:font-name="Calibri" fo:font-size="20pt" fo:font-style="normal" style:text-underline-style="none" fo:font-weight="bold" fo:background-color="transparent" style:font-size-asian="20pt" style:font-style-asian="normal" style:font-weight-asian="bold" style:font-name-complex="Calibri" style:font-size-complex="20pt" style:font-style-complex="normal" style:font-weight-complex="bold"/>
    </style:style>
    <style:style style:name="MT9" style:family="text">
      <style:text-properties fo:color="#622422" loext:opacity="100%" style:font-name="Calibri" fo:font-size="20pt" fo:letter-spacing="-0.002cm" fo:font-weight="bold" style:letter-kerning="true" style:font-size-asian="20pt" style:font-weight-asian="bold" style:font-name-complex="Calibri" style:font-size-complex="20pt" style:font-weight-complex="bold"/>
    </style:style>
    <style:style style:name="MT10"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5.5cm" svg:height="1.5cm" svg:x="0cm" svg:y="17.5cm">
        <text:p/>
        <draw:enhanced-geometry svg:viewBox="0 0 21600 21600" draw:type="rectangle" draw:enhanced-path="M 0 0 L 21600 0 21600 21600 0 21600 0 0 Z N"/>
      </draw:custom-shape>
      <draw:custom-shape draw:name="bg object 16" draw:style-name="Mgr3" draw:text-style-name="MP6" draw:layer="backgroundobjects" svg:width="24.203cm" svg:height="1.966cm" svg:x="0.699cm" svg:y="0.524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frame presentation:style-name="Blank-title" draw:layer="backgroundobjects" svg:width="22.859cm" svg:height="2.334cm" svg:x="1.5cm" svg:y="2.666cm" presentation:class="title" presentation:placeholder="true">
        <draw:text-box/>
      </draw:frame>
      <draw:frame presentation:style-name="Blank-outline1" draw:layer="backgroundobjects" svg:width="21.73cm" svg:height="6.543cm" svg:x="1.27cm" svg:y="5.457cm" presentation:class="outline" presentation:placeholder="true">
        <draw:text-box/>
      </draw:frame>
      <draw:custom-shape draw:name="object 16_0" draw:style-name="Mgr4" draw:text-style-name="MP9" draw:layer="backgroundobjects" svg:width="3.67cm" svg:height="1.73cm" svg:x="20.964cm" svg:y="0.524cm">
        <text:p text:style-name="MP7"><text:span text:style-name="MT2">CURS</text:span><text:span text:style-name="MT3"> 21</text:span><text:span text:style-name="MT4">/22</text:span></text:p>
        <text:p text:style-name="MP8"><text:span text:style-name="MT4">CE - C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2" draw:layer="backgroundobjects" svg:width="12.5cm" svg:height="1.665cm" svg:x="3.427cm" svg:y="0.664cm">
        <draw:text-box>
          <text:p text:style-name="MP10"><text:span text:style-name="MT2">IES</text:span><text:span text:style-name="MT5"> SANT</text:span><text:span text:style-name="MT6"> </text:span><text:span text:style-name="MT5">VICENT FERRER</text:span><text:span text:style-name="MT7"> </text:span><text:span text:style-name="MT2">(ALGEMESÍ)</text:span></text:p>
          <text:p text:style-name="MP11"><text:span text:style-name="MT8">INCIDENTS DE CIBERSEGURETAT</text:span></text:p>
        </draw:text-box>
      </draw:frame>
      <draw:frame draw:name="object 19_0" presentation:style-name="Mpr2" draw:text-style-name="MP14" draw:layer="backgroundobjects" svg:width="11.467cm" svg:height="0.708cm" svg:x="7.5cm" svg:y="18cm">
        <draw:text-box>
          <text:p text:style-name="MP13"><text:span text:style-name="MT9">UNITAT 03 <text:s text:c="2"/>INVESTIGACIÓ d’IC</text:span></text:p>
        </draw:text-box>
      </draw:frame>
      <draw:frame draw:style-name="Mgr6" draw:text-style-name="MP15" draw:layer="backgroundobjects" svg:width="2.459cm" svg:height="2.039cm" svg:x="0.577cm" svg:y="0.529cm">
        <draw:image xlink:href="Pictures/100000000000020E000001B4494AA734.png" xlink:type="simple" xlink:show="embed" xlink:actuate="onLoad" draw:mime-type="image/png">
          <text:p/>
        </draw:image>
      </draw:frame>
      <draw:frame draw:style-name="Mgr7" draw:text-style-name="MP17" draw:layer="backgroundobjects" svg:width="7.728cm" svg:height="0.892cm" svg:x="0.272cm" svg:y="17.608cm">
        <draw:text-box>
          <text:p text:style-name="MP16"><text:span text:style-name="MT10">Aquesta obra de Enrique Iborra està subjecta a una llicència de</text:span><text:span text:style-name="MT10"><text:a xlink:href="http://creativecommons.org/licenses/by-sa/4.0/" xlink:type="simple">Reconeixement-CompartirIgual 4.0 Internacional de Creative Commons</text:a></text:span></text:p>
        </draw:text-box>
      </draw:frame>
      <draw:frame draw:style-name="Mgr8" draw:text-style-name="MP16" draw:layer="backgroundobjects" svg:width="1.551cm" svg:height="0.546cm" svg:x="3.45cm" svg:y="18.334cm">
        <draw:image xlink:href="Pictures/10000001000000580000001F4EE5900C.png" xlink:type="simple" xlink:show="embed" xlink:actuate="onLoad" draw:mime-type="image/png">
          <text:p/>
        </draw:image>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2.859cm" svg:height="3.18cm" svg:x="1.27cm" svg:y="0.759cm" presentation:class="title" presentation:placeholder="true">
        <draw:text-box/>
      </draw:frame>
      <draw:frame draw:style-name="Mgr9" draw:text-style-name="MP18" draw:layer="backgroundobjects" svg:width="22.859cm" svg:height="11.048cm" svg:x="1.27cm" svg:y="4.457cm">
        <draw:text-box>
          <text:p/>
        </draw:text-box>
      </draw:frame>
      <draw:frame presentation:style-name="Mpr5" draw:text-style-name="MP2" draw:layer="backgroundobjects" svg:width="5.917cm" svg:height="1.312cm" svg:x="1.27cm" svg:y="17.354cm" presentation:class="date-time">
        <draw:text-box>
          <text:p text:style-name="MP1"><text:span text:style-name="MT1"><presentation:date-time/></text:span></text:p>
        </draw:text-box>
      </draw:frame>
      <draw:frame presentation:style-name="Mpr5" draw:text-style-name="MP20" draw:layer="backgroundobjects" svg:width="8.051cm" svg:height="1.312cm" svg:x="8.686cm" svg:y="17.354cm" presentation:class="footer">
        <draw:text-box>
          <text:p text:style-name="MP19"><text:span text:style-name="MT1"><presentation:footer/></text:span></text:p>
        </draw:text-box>
      </draw:frame>
      <draw:frame presentation:style-name="Mpr5" draw:text-style-name="MP4" draw:layer="backgroundobjects" svg:width="5.917cm" svg:height="1.312cm" svg:x="18.211cm" svg:y="17.35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VF"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VF-title" draw:layer="backgroundobjects" svg:width="22.859cm" svg:height="3.18cm" svg:x="1.27cm" svg:y="0.76cm" presentation:class="title" presentation:placeholder="true">
        <draw:text-box/>
      </draw:frame>
      <draw:frame presentation:style-name="SVF-outline1" draw:layer="backgroundobjects" svg:width="22.859cm" svg:height="11.048cm" svg:x="1.27cm" svg:y="4.457cm" presentation:class="outline" presentation:placeholder="true">
        <draw:text-box/>
      </draw:frame>
      <presentation:notes style:page-layout-name="PM0">
        <draw:page-thumbnail presentation:style-name="SVF-title" draw:layer="backgroundobjects" svg:width="14.848cm" svg:height="11.136cm" svg:x="3.075cm" svg:y="2.257cm" presentation:class="page"/>
        <draw:frame presentation:style-name="SVF-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6" draw:layer="backgroundobjects" svg:width="24.493cm" svg:height="3.024cm" svg:x="0.001cm" svg:y="0.604cm">
        <text:p/>
        <draw:enhanced-geometry svg:viewBox="0 0 21600 21600" draw:type="rectangle" draw:enhanced-path="M 0 0 L 21600 0 21600 21600 0 21600 0 0 Z N"/>
      </draw:custom-shape>
      <draw:custom-shape draw:style-name="Mgr10" draw:text-style-name="MP21" draw:layer="backgroundobjects" svg:width="6.35cm" svg:height="1.361cm" svg:x="19.05cm" svg:y="17.235cm">
        <text:p/>
        <draw:enhanced-geometry svg:viewBox="0 0 21600 21600" draw:type="rectangle" draw:enhanced-path="M 0 0 L 21600 0 21600 21600 0 21600 0 0 Z N"/>
      </draw:custom-shape>
      <draw:custom-shape draw:style-name="Mgr10" draw:text-style-name="MP16" draw:layer="backgroundobjects" svg:width="16.328cm" svg:height="1.361cm" svg:x="2.267cm" svg:y="17.235cm">
        <text:p/>
        <draw:enhanced-geometry svg:viewBox="0 0 21600 21600" draw:type="rectangle" draw:enhanced-path="M 0 0 L 21600 0 21600 21600 0 21600 0 0 Z N"/>
      </draw:custom-shape>
      <draw:custom-shape draw:style-name="Mgr11" draw:text-style-name="MP22"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419cm" svg:x="0.907cm" svg:y="0.907cm" presentation:class="title" presentation:placeholder="true">
        <draw:text-box/>
      </draw:frame>
      <draw:frame draw:style-name="Mgr12" draw:text-style-name="MP18" draw:layer="backgroundobjects" svg:width="23.132cm" svg:height="11.793cm" svg:x="0.907cm" svg:y="4.535cm">
        <draw:text-box>
          <text:p/>
        </draw:text-box>
      </draw:frame>
      <draw:custom-shape draw:style-name="Mgr10" draw:text-style-name="MP21" draw:layer="backgroundobjects" svg:width="1.361cm" svg:height="1.361cm" svg:x="0.453cm" svg:y="17.235cm">
        <text:p/>
        <draw:enhanced-geometry svg:viewBox="0 0 21600 21600" draw:type="rectangle" draw:enhanced-path="M 0 0 L 21600 0 21600 21600 0 21600 0 0 Z N"/>
      </draw:custom-shape>
      <draw:frame presentation:style-name="Mpr10" draw:text-style-name="MP16" draw:layer="backgroundobjects" svg:width="3.175cm" svg:height="1.361cm" svg:x="-0.453cm" svg:y="17.235cm" presentation:class="page-number">
        <draw:text-box>
          <text:p text:style-name="MP23"><text:page-number>&lt;número&gt;</text:page-number></text:p>
        </draw:text-box>
      </draw:frame>
      <draw:frame presentation:style-name="Mpr11" draw:text-style-name="MP15" draw:layer="backgroundobjects" svg:width="16.329cm" svg:height="1.361cm" svg:x="2.267cm" svg:y="17.235cm" presentation:class="footer">
        <draw:text-box>
          <text:p text:style-name="MP23"><presentation:footer/></text:p>
        </draw:text-box>
      </draw:frame>
      <draw:frame presentation:style-name="Mpr10" draw:text-style-name="MP21" draw:layer="backgroundobjects" svg:width="5.896cm" svg:height="1.315cm" svg:x="19.05cm" svg:y="17.235cm" presentation:class="date-time">
        <draw:text-box>
          <text:p text:style-name="MP24"><presentation:date-time/></text:p>
        </draw:text-box>
      </draw:frame>
      <draw:frame presentation:style-name="Alizarin-outline1" draw:layer="backgroundobjects" svg:width="22.859cm" svg:height="11.048cm" svg:x="1.27cm" svg:y="4.457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C-UD03</dc:title>
    <meta:creation-date>2021-09-17T12:45:34.110000000</meta:creation-date>
    <meta:editing-duration>PT3H56M</meta:editing-duration>
    <meta:generator>LibreOffice/7.6.4.1$Windows_X86_64 LibreOffice_project/e19e193f88cd6c0525a17fb7a176ed8e6a3e2aa1</meta:generator>
    <meta:editing-cycles>39</meta:editing-cycles>
    <dc:date>2024-03-04T17:18:49.978000000</dc:date>
    <meta:document-statistic meta:object-count="176"/>
    <meta:user-defined meta:name="AppVersion">12.0000</meta:user-defined>
    <meta:user-defined meta:name="Created" meta:value-type="date">2020-08-06T00:00:00</meta:user-defined>
    <meta:user-defined meta:name="Creator">Microsoft® PowerPoint® 2010</meta:user-defined>
    <meta:user-defined meta:name="LastSaved" meta:value-type="date">2021-09-17T00:00:00</meta:user-defined>
    <meta:user-defined meta:name="PresentationFormat" meta:value-type="string">On-screen Show (4:3)</meta:user-defined>
  </office:meta>
</office:document-meta>
</file>