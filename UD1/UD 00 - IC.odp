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E000001B4494AA734.png" manifest:media-type="image/png"/>
  <manifest:file-entry manifest:full-path="Pictures/100000000000055A000000B42A72FF98.png" manifest:media-type="image/png"/>
  <manifest:file-entry manifest:full-path="Pictures/10000000000003E7000001E72E6AB9A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toneSerif" svg:font-family="StoneSerif" style:font-family-generic="roman" style:font-pitch="variable"/>
    <style:font-face style:name="StoneSerif-Italic" svg:font-family="StoneSerif-Italic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267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632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343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99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Blank-subtitle">
      <style:graphic-properties draw:fill-color="#ffffff" draw:auto-grow-height="true" fo:min-height="8.48cm" loext:decorative="false"/>
      <style:paragraph-properties style:writing-mode="lr-tb"/>
    </style:style>
    <style:style style:name="pr3" style:family="presentation" style:parent-style-name="Blank-subtitle">
      <style:graphic-properties draw:fill-color="#ffffff" draw:auto-grow-height="true" fo:min-height="7.525cm" loext:decorative="false"/>
      <style:paragraph-properties style:writing-mode="lr-tb"/>
    </style:style>
    <style:style style:name="pr4" style:family="presentation" style:parent-style-name="Blank-subtitle">
      <style:graphic-properties draw:fill-color="#ffffff" draw:auto-grow-height="true" fo:min-height="9.599cm" loext:decorative="false"/>
      <style:paragraph-properties style:writing-mode="lr-tb"/>
    </style:style>
    <style:style style:name="pr5" style:family="presentation" style:parent-style-name="Blank-subtitle">
      <style:graphic-properties draw:fill-color="#ffffff" draw:auto-grow-height="true" fo:min-height="12.134cm" loext:decorative="false"/>
      <style:paragraph-properties style:writing-mode="lr-tb"/>
    </style:style>
    <style:style style:name="P1" style:family="paragraph">
      <style:paragraph-properties fo:margin-left="0.035cm" fo:margin-right="0.014cm" fo:margin-top="0.034cm" fo:margin-bottom="0cm" fo:line-height="100%" fo:text-align="center" fo:text-indent="1.18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2" style:family="paragraph">
      <loext:graphic-properties draw:fill="none"/>
      <style:paragraph-properties fo:margin-left="0.035cm" fo:margin-right="0.014cm" fo:margin-top="0.034cm" fo:margin-bottom="0cm" fo:line-height="100%" fo:text-align="center" fo:text-indent="1.18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paragraph-properties fo:text-align="center"/>
      <style:text-properties fo:font-size="31.5pt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paragraph-properties fo:margin-left="0cm" fo:margin-right="0cm" fo:text-align="center" fo:text-indent="0cm" style:punctuation-wrap="hanging"/>
    </style:style>
    <style:style style:name="P11" style:family="paragraph">
      <loext:graphic-properties draw:fill-color="#ffffff"/>
      <style:paragraph-properties fo:margin-left="0cm" fo:margin-right="0cm" fo:text-align="center" fo:text-indent="0cm" style:punctuation-wrap="hanging"/>
      <style:text-properties style:font-name="Consolas" fo:font-size="18.1000003814697pt" fo:font-weight="bold" style:font-name-complex="Consolas" style:font-size-complex="15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style:font-name="Consolas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622422" loext:opacity="100%" style:text-line-through-style="none" style:text-line-through-type="none" style:text-position="0% 100%" style:font-name="Calibri" fo:font-size="40pt" fo:font-style="normal" style:text-underline-style="none" fo:font-weight="bold" fo:background-color="transparent" style:font-size-asian="40pt" style:font-style-asian="normal" style:font-weight-asian="bold" style:font-name-complex="Calibri" style:font-size-complex="40pt" style:font-style-complex="normal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31.5pt" fo:font-weight="bold" style:font-weight-complex="bold"/>
    </style:style>
    <style:style style:name="T5" style:family="text">
      <style:text-properties fo:font-size="15pt" style:font-size-complex="15pt"/>
    </style:style>
    <style:style style:name="T6" style:family="text">
      <style:text-properties style:font-name="StoneSerif-Italic" fo:font-size="15pt" fo:font-style="italic" style:font-name-complex="StoneSerif-Italic" style:font-size-complex="15pt"/>
    </style:style>
    <style:style style:name="T7" style:family="text">
      <style:text-properties style:font-name="StoneSerif" fo:font-size="15pt" style:font-name-complex="StoneSerif" style:font-size-complex="15pt"/>
    </style:style>
    <style:style style:name="T8" style:family="text">
      <style:text-properties style:font-name="Consolas" fo:font-size="15pt" style:font-name-complex="Consolas" style:font-size-complex="15pt"/>
    </style:style>
    <style:style style:name="T9" style:family="text">
      <style:text-properties fo:font-size="15pt" fo:font-weight="bold" style:font-size-complex="15pt" style:font-weight-complex="bold"/>
    </style:style>
    <style:style style:name="T10" style:family="text">
      <style:text-properties fo:color="#1c1c1c" loext:opacity="100%" style:font-name="Consolas" fo:font-size="15pt" fo:font-weight="250" style:letter-kerning="true" style:font-size-asian="26pt" style:font-weight-asian="250" style:font-name-complex="Consolas" style:font-size-complex="15pt" style:font-weight-complex="250"/>
    </style:style>
    <style:style style:name="T11" style:family="text">
      <style:text-properties style:font-name="Consolas"/>
    </style:style>
    <style:style style:name="T12" style:family="text">
      <style:text-properties fo:color="#1c1c1c" loext:opacity="100%" style:font-name="Consolas" fo:font-size="22pt" fo:font-weight="bold" style:letter-kerning="true" style:font-size-asian="22pt" style:font-weight-asian="bold" style:font-name-complex="Consolas" style:font-size-complex="22pt" style:font-weight-complex="bold"/>
    </style:style>
    <style:style style:name="T13" style:family="text">
      <style:text-properties fo:color="#1c1c1c" loext:opacity="100%" style:font-name="Consolas" fo:font-size="18pt" fo:font-weight="250" style:letter-kerning="true" style:font-size-asian="32pt" style:font-weight-asian="250" style:font-name-complex="Consolas" style:font-size-complex="18pt" style:font-weight-complex="250"/>
    </style:style>
    <text:list-style style:name="L1">
      <text:list-level-style-bullet text:level="1" text:bullet-char="●">
        <style:list-level-properties text:min-label-width="0.6cm"/>
        <style:text-properties fo:font-family="StarSymbol" fo:color="#6224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11">
        <office:forms form:automatic-focus="false" form:apply-design-mode="false"/>
        <draw:custom-shape draw:name="object 17" draw:style-name="gr1" draw:text-style-name="P2" draw:layer="layout" svg:width="19.5cm" svg:height="1.728cm" svg:x="2.5cm" svg:y="3.328cm">
          <text:p text:style-name="P1"><text:span text:style-name="T1">Cybersecurity incid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19cm" svg:height="5.517cm" svg:x="3cm" svg:y="11cm">
          <draw:text-box>
            <text:p text:style-name="P3"><text:span text:style-name="T2">Definition ( </text:span><text:span text:style-name="T2"><text:a xlink:href="https://www.uv.mx/csirt/que-es-un-incidente-de-ciberseguridad/" xlink:type="simple">uv.mx</text:a></text:span><text:span text:style-name="T2"><text:s/>)</text:span></text:p>
            <text:p text:style-name="P4">A Cybersecurity incident is an unexpected or unwanted event or series of events that have a significant likelihood of compromising business operations; causing a loss or improper use of information, partial or total interruption of the Systems, being the most common, infection by malware, phishing, etc.</text:p>
          </draw:text-box>
        </draw:frame>
        <draw:frame draw:style-name="gr3" draw:text-style-name="P6" draw:layer="layout" svg:width="20cm" svg:height="3.882cm" svg:x="3cm" svg:y="6cm">
          <draw:text-box>
            <text:p text:style-name="P3"><text:span text:style-name="T2">Definition</text:span><text:span text:style-name="T3"> <text:s/>( </text:span><text:span text:style-name="T3"><text:a xlink:href="https://www.incibe.es/sites/default/files/contenidos/guias/doc/guia_glosario_ciberseguridad_metad.pdf" xlink:type="simple">INCIBE</text:a></text:span><text:span text:style-name="T3"><text:s/>)</text:span></text:p>
            <text:p text:style-name="P4">Any event affecting the confidentiality, integrity or availability of the Company's information assets, for example: unauthorized access or attempted access to systems, use, disclosure, modification or destruction of information.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11">
        <office:forms form:automatic-focus="false" form:apply-design-mode="false"/>
        <draw:custom-shape draw:name="object 1" draw:style-name="gr5" draw:text-style-name="P2" draw:layer="layout" svg:width="19.5cm" svg:height="1.728cm" svg:x="2.5cm" svg:y="3.328cm">
          <text:p text:style-name="P1"><text:span text:style-name="T1">Cybersecurity incid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6" draw:layer="layout" svg:width="20cm" svg:height="4.593cm" svg:x="3cm" svg:y="6cm">
          <draw:text-box>
            <text:p text:style-name="P3"><text:span text:style-name="T2">Definition</text:span><text:span text:style-name="T3"> <text:s/>( </text:span><text:span text:style-name="T3"><text:a xlink:href="http://www.faqs.org/rfcs/rfc2828.html" xlink:type="simple">rfc 2828</text:a></text:span><text:span text:style-name="T3"><text:s/>)</text:span></text:p>
            <text:p text:style-name="P4">A security-relevant system event in which the system's security policy is disobeyed or violated.</text:p>
            <text:p text:style-name="P4">Any adverse event that compromises any aspect of the computer or network security</text:p>
          </draw:text-box>
        </draw:frame>
        <draw:frame draw:style-name="gr6" draw:text-style-name="P6" draw:layer="layout" svg:width="20cm" svg:height="4.593cm" svg:x="3cm" svg:y="11cm">
          <draw:text-box>
            <text:p text:style-name="P3"><text:span text:style-name="T2">Definition</text:span><text:span text:style-name="T3"> <text:s text:c="2"/></text:span></text:p>
            <text:p text:style-name="P4">An incident is something stressful, that causes a lot of damage to a victim and that the team that must manage it alters their daily work routine, with what they have impact for everyone involved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nk" presentation:presentation-page-layout-name="AL2T0">
        <office:forms form:automatic-focus="false" form:apply-design-mode="false"/>
        <draw:frame presentation:style-name="pr2" draw:text-style-name="P8" draw:layer="layout" svg:width="21.73cm" svg:height="8.48cm" svg:x="1.27cm" svg:y="4.489cm" presentation:class="subtitle">
          <draw:text-box>
            <text:p text:style-name="P3"><text:span text:style-name="T4">Cheswick, W </text:span></text:p>
            <text:p text:style-name="P3"><text:span text:style-name="T5">"</text:span><text:span text:style-name="T6">Firewalls and Internet Security.</text:span></text:p>
            <text:p text:style-name="P3"><text:span text:style-name="T6">Repelling the Wily Hacker</text:span><text:span text:style-name="T7">,</text:span><text:span text:style-name="T5">"</text:span></text:p>
            <text:p text:style-name="P3"><text:span text:style-name="T5"/></text:p>
            <text:p text:style-name="P3"><text:span text:style-name="T5"/></text:p>
            <text:p text:style-name="P3"><text:span text:style-name="T8">"There is no absolute security."</text:span></text:p>
            <text:p text:style-name="P3"><text:span text:style-name="T8"/></text:p>
            <text:p text:style-name="P3"><text:span text:style-name="T8">"Security is always an economic issue."</text:span></text:p>
            <text:p text:style-name="P3"><text:span text:style-name="T8"/></text:p>
            <text:p text:style-name="P3"><text:span text:style-name="T8">"An attacker doesn't go through security, he goes around it."</text:span></text:p>
            <text:p text:style-name="P3"><text:span text:style-name="T5"/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" presentation:presentation-page-layout-name="AL2T0">
        <office:forms form:automatic-focus="false" form:apply-design-mode="false"/>
        <draw:frame presentation:style-name="pr3" draw:text-style-name="P8" draw:layer="layout" svg:width="21.73cm" svg:height="7.525cm" svg:x="1.27cm" svg:y="4.966cm" presentation:class="subtitle">
          <draw:text-box>
            <text:p text:style-name="P3"><text:span text:style-name="T9"/></text:p>
            <text:p text:style-name="P3"><text:span text:style-name="T5"/></text:p>
            <text:p text:style-name="P3"><text:span text:style-name="T8">"It's a bad idea to rely on 'security by obscurity'."</text:span></text:p>
            <text:p text:style-name="P3"><text:span text:style-name="T8"/></text:p>
            <text:p text:style-name="P3"><text:span text:style-name="T8">"Keep it simple."</text:span></text:p>
            <text:p text:style-name="P3"><text:span text:style-name="T8"/></text:p>
            <text:p text:style-name="P3"><text:span text:style-name="T8">"Don't give a person or program more privileges than are strictly necessary."</text:span></text:p>
            <text:p text:style-name="P3"><text:span text:style-name="T8"/></text:p>
            <text:p text:style-name="P3"><text:span text:style-name="T8">"Safety should be an integral part of the original designs."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ank" presentation:presentation-page-layout-name="AL2T0">
        <office:forms form:automatic-focus="false" form:apply-design-mode="false"/>
        <draw:frame presentation:style-name="pr4" draw:text-style-name="P11" draw:layer="layout" svg:width="23.132cm" svg:height="9.599cm" svg:x="0.907cm" svg:y="4.535cm" presentation:class="subtitle" presentation:user-transformed="true">
          <draw:text-box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>"If you don't run a program, it doesn't matter if it has security flaws."</text:span></text:p>
            <text:p text:style-name="P10"><text:span text:style-name="T10"/></text:p>
            <text:p text:style-name="P10"><text:span text:style-name="T10">"A program or protocol is unsafe until proven otherwise."</text:span></text:p>
            <text:p text:style-name="P10"><text:span text:style-name="T10"/></text:p>
            <text:p text:style-name="P10"><text:span text:style-name="T10">"A chain is only as strong as its weakest link."</text:span></text:p>
            <text:p text:style-name="P10"><text:span text:style-name="T10"/></text:p>
            <text:p text:style-name="P10"><text:span text:style-name="T10"/></text:p>
            <text:p text:style-name="P10"><text:span text:style-name="T10"/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 presentation:presentation-page-layout-name="AL1T11">
        <office:forms form:automatic-focus="false" form:apply-design-mode="false"/>
        <draw:custom-shape draw:name="object 6" draw:style-name="gr7" draw:text-style-name="P2" draw:layer="layout" svg:width="19.5cm" svg:height="1.728cm" svg:x="2.5cm" svg:y="3.328cm">
          <text:p text:style-name="P1"><text:span text:style-name="T1">Cybersecurity incid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24.165cm" svg:height="1.174cm" svg:x="0.835cm" svg:y="8.5cm">
          <draw:image xlink:href="Pictures/100000000000055A000000B42A72FF98.png" xlink:type="simple" xlink:show="embed" xlink:actuate="onLoad" draw:mime-type="image/png">
            <text:p/>
          </draw:image>
        </draw:frame>
        <draw:frame draw:style-name="gr9" draw:text-style-name="P13" draw:layer="layout" svg:width="24cm" svg:height="1.521cm" svg:x="1cm" svg:y="6.479cm">
          <draw:text-box>
            <text:p><text:span text:style-name="T11">There are two types of companies. Those who have been hacked and those who still don't know they have been hacked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 presentation:presentation-page-layout-name="AL1T11">
        <office:forms form:automatic-focus="false" form:apply-design-mode="false"/>
        <draw:custom-shape draw:name="object 3" draw:style-name="gr10" draw:text-style-name="P2" draw:layer="layout" svg:width="19.5cm" svg:height="1.728cm" svg:x="2.5cm" svg:y="3.328cm">
          <text:p text:style-name="P1"><text:span text:style-name="T1">Cybersecurity incid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2" draw:layer="layout" svg:width="20.516cm" svg:height="10cm" svg:x="2cm" svg:y="6.5cm">
          <draw:image xlink:href="Pictures/10000000000003E7000001E72E6AB9A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 presentation:presentation-page-layout-name="AL1T11">
        <office:forms form:automatic-focus="false" form:apply-design-mode="false"/>
        <draw:custom-shape draw:name="object 2" draw:style-name="gr12" draw:text-style-name="P2" draw:layer="layout" svg:width="19.5cm" svg:height="1.728cm" svg:x="2.5cm" svg:y="3.328cm">
          <text:p text:style-name="P1"><text:span text:style-name="T1">Cybersecurity incid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1" draw:layer="layout" svg:width="23.132cm" svg:height="12.134cm" svg:x="1cm" svg:y="5.384cm">
          <draw:text-box>
            <text:p text:style-name="P10"><text:span text:style-name="T10"/></text:p>
            <text:p text:style-name="P10"><text:span text:style-name="T12">Objectives of the module</text:span></text:p>
            <text:p text:style-name="P10"><text:span text:style-name="T13"/></text:p>
            <text:p text:style-name="P10"><text:span text:style-name="T13">Know how to create a safety culture in the company</text:span></text:p>
            <text:p text:style-name="P10"><text:span text:style-name="T13"/></text:p>
            <text:p text:style-name="P10"><text:span text:style-name="T13">Hardening of "people"</text:span></text:p>
            <text:p text:style-name="P10"><text:span text:style-name="T13"/></text:p>
            <text:p text:style-name="P10"><text:span text:style-name="T13">Detection of incidents</text:span></text:p>
            <text:p text:style-name="P10"><text:span text:style-name="T13"/></text:p>
            <text:p text:style-name="P10"><text:span text:style-name="T13">Know how to create a security / alert plan</text:span></text:p>
            <text:p text:style-name="P10"><text:span text:style-name="T13"/></text:p>
            <text:p text:style-name="P10"><text:span text:style-name="T13">Document, document, document</text:span></text:p>
            <text:p text:style-name="P10"><text:span text:style-name="T13"/></text:p>
            <text:p text:style-name="P10"><text:span text:style-name="T13">Compliance</text:span></text:p>
            <text:p text:style-name="P10"><text:span text:style-name="T13"/></text:p>
            <text:p text:style-name="P10"><text:span text:style-name="T13">Communicate incidents appropriately</text:span></text:p>
            <text:p text:style-name="P10"><text:span text:style-name="T12"/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toneSerif" svg:font-family="StoneSerif" style:font-family-generic="roman" style:font-pitch="variable"/>
    <style:font-face style:name="StoneSerif-Italic" svg:font-family="StoneSerif-Italic" style:font-family-generic="roman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style:rfc-language-tag="ca-ES-valencia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b3cac7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indent="0cm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indent="0cm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indent="0cm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83cm" fo:margin-bottom="0cm" fo:text-indent="0cm"/>
      <style:text-properties fo:font-size="33.9000015258789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62cm" fo:margin-bottom="0cm" fo:text-indent="0cm"/>
      <style:text-properties fo:font-size="29.1000003814697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41cm" fo:margin-bottom="0cm" fo:text-indent="0cm"/>
      <style:text-properties fo:font-size="24.2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3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VF-background" style:family="presentation">
      <style:graphic-properties draw:stroke="none" draw:fill="none"/>
      <style:text-properties style:letter-kerning="true"/>
    </style:style>
    <style:style style:name="SV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V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VF-outline1" style:family="presentation">
      <style:graphic-properties draw:stroke="none" draw:fill="none" draw:auto-grow-height="false" draw:fit-to-size="false" style:shrink-to-fit="true">
        <text:list-style style:name="SV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VF-outline2" style:family="presentation" style:parent-style-name="SVF-outline1">
      <style:paragraph-properties fo:margin-top="0.4cm" fo:margin-bottom="0cm"/>
      <style:text-properties fo:font-size="28pt" style:font-size-asian="28pt" style:font-size-complex="28pt"/>
    </style:style>
    <style:style style:name="SVF-outline3" style:family="presentation" style:parent-style-name="SVF-outline2">
      <style:paragraph-properties fo:margin-top="0.3cm" fo:margin-bottom="0cm"/>
      <style:text-properties fo:font-size="24pt" style:font-size-asian="24pt" style:font-size-complex="24pt"/>
    </style:style>
    <style:style style:name="SVF-outline4" style:family="presentation" style:parent-style-name="SVF-outline3">
      <style:paragraph-properties fo:margin-top="0.2cm" fo:margin-bottom="0cm"/>
      <style:text-properties fo:font-size="20pt" style:font-size-asian="20pt" style:font-size-complex="20pt"/>
    </style:style>
    <style:style style:name="SVF-outline5" style:family="presentation" style:parent-style-name="SVF-outline4">
      <style:paragraph-properties fo:margin-top="0.1cm" fo:margin-bottom="0cm"/>
      <style:text-properties fo:font-size="20pt" style:font-size-asian="20pt" style:font-size-complex="20pt"/>
    </style:style>
    <style:style style:name="SVF-outline6" style:family="presentation" style:parent-style-name="SVF-outline5">
      <style:paragraph-properties fo:margin-top="0.1cm" fo:margin-bottom="0cm"/>
      <style:text-properties fo:font-size="20pt" style:font-size-asian="20pt" style:font-size-complex="20pt"/>
    </style:style>
    <style:style style:name="SVF-outline7" style:family="presentation" style:parent-style-name="SVF-outline6">
      <style:paragraph-properties fo:margin-top="0.1cm" fo:margin-bottom="0cm"/>
      <style:text-properties fo:font-size="20pt" style:font-size-asian="20pt" style:font-size-complex="20pt"/>
    </style:style>
    <style:style style:name="SVF-outline8" style:family="presentation" style:parent-style-name="SVF-outline7">
      <style:paragraph-properties fo:margin-top="0.1cm" fo:margin-bottom="0cm"/>
      <style:text-properties fo:font-size="20pt" style:font-size-asian="20pt" style:font-size-complex="20pt"/>
    </style:style>
    <style:style style:name="SVF-outline9" style:family="presentation" style:parent-style-name="SVF-outline8">
      <style:paragraph-properties fo:margin-top="0.1cm" fo:margin-bottom="0cm"/>
      <style:text-properties fo:font-size="20pt" style:font-size-asian="20pt" style:font-size-complex="20pt"/>
    </style:style>
    <style:style style:name="SVF-subtitle" style:family="presentation">
      <style:graphic-properties draw:stroke="none" draw:fill="none" draw:textarea-vertical-align="middle">
        <text:list-style style:name="SV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VF-title" style:family="presentation">
      <style:graphic-properties draw:stroke="none" draw:fill="none" draw:textarea-vertical-align="middle">
        <text:list-style style:name="SV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 style:writing-mode="lr-tb"/>
      <style:paragraph-properties style:text-autospace="none" style:punctuation-wrap="simple" loext:tab-stop-distance="0cm" style:writing-mode="lr-tb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64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3.6000003814697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61cm" fo:text-indent="0cm"/>
      <style:text-properties style:font-name="Source Sans Pro Light" fo:font-family="'Source Sans Pro Light'" style:font-style-name="細字" style:font-family-generic="swiss" style:font-pitch="variable" fo:font-size="20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7cm" fo:text-indent="0cm"/>
      <style:text-properties fo:font-size="16.299999237060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81cm" fo:text-indent="0cm"/>
      <style:text-properties fo:font-size="14.5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9cm" fo:text-indent="0cm"/>
      <style:text-properties fo:font-size="14.5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9cm" fo:text-indent="0cm"/>
      <style:text-properties fo:font-size="14.5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9cm" fo:text-indent="0cm"/>
      <style:text-properties fo:font-size="14.5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89cm" fo:text-indent="0cm"/>
      <style:text-properties fo:font-size="12.6999998092651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89cm" fo:text-indent="0cm"/>
      <style:text-properties fo:font-size="12.6999998092651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9.1000003814697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b3cac7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none" draw:fill-color="#fffde7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1f1f1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Mgr4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 loext:decorative="false"/>
      <style:paragraph-properties style:writing-mode="lr-tb"/>
    </style:style>
    <style:style style:name="Mgr5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1.415cm" loext:decorative="false"/>
      <style:paragraph-properties style:writing-mode="lr-tb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7" style:family="graphic" style:parent-style-name="standard">
      <style:graphic-properties draw:stroke="none" draw:fill="none" draw:fill-color="#ffffff" fo:min-height="10.798cm" loext:decorative="false"/>
    </style:style>
    <style:style style:name="Mgr8" style:family="graphic" style:parent-style-name="standard">
      <style:graphic-properties draw:textarea-vertical-align="middle" fo:min-height="0cm" fo:min-width="0cm" loext:decorative="false"/>
    </style:style>
    <style:style style:name="Mgr9" style:family="graphic" style:parent-style-name="standard">
      <style:graphic-properties draw:stroke="none" draw:fill-color="#f44336" draw:textarea-vertical-align="middle" draw:auto-grow-height="false" fo:min-height="1.111cm" fo:min-width="0.861cm" loext:decorative="false"/>
    </style:style>
    <style:style style:name="Mgr10" style:family="graphic" style:parent-style-name="standard">
      <style:graphic-properties draw:stroke="none" draw:fill="none" draw:fill-color="#ffffff" fo:min-height="11.543cm" loext:decorative="false"/>
    </style:style>
    <style:style style:name="Mpr1" style:family="presentation" style:parent-style-name="Blank-backgroundobjects">
      <style:graphic-properties draw:fill-color="#b4c7dc" draw:textarea-vertical-align="middle" draw:auto-grow-height="false" fo:min-height="1.5cm" fo:min-width="25.5cm" loext:decorative="false"/>
    </style:style>
    <style:style style:name="Mpr2" style:family="presentation" style:parent-style-name="Blank-backgroundobjects" style:list-style-name="ML4">
      <style:graphic-properties draw:stroke="none" svg:stroke-width="0cm" draw:fill="none" draw:fill-color="#ffffff" draw:textarea-vertical-align="top" draw:auto-grow-height="true" draw:fit-to-size="false" style:shrink-to-fit="false" fo:min-height="0.708cm" fo:padding-top="0cm" fo:padding-bottom="0cm" fo:padding-left="0cm" fo:padding-right="0cm" fo:wrap-option="no-wrap" loext:decorative="false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6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VF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SVF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Alizarin-backgroundobjects">
      <style:graphic-properties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 loext:decorative="false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Alizari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4c7dc"/>
      <style:paragraph-properties fo:text-align="center"/>
    </style:style>
    <style:style style:name="MP6" style:family="paragraph">
      <loext:graphic-properties draw:fill="solid" draw:fill-color="#f1f1f1"/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.189cm" fo:margin-top="0.035cm" fo:margin-bottom="0cm" fo:line-height="100%" fo:text-align="end" fo:text-indent="0cm" style:writing-mode="lr-tb"/>
      <style:text-properties fo:font-size="18pt"/>
    </style:style>
    <style:style style:name="MP8" style:family="paragraph">
      <loext:graphic-properties draw:fill="none"/>
      <style:paragraph-properties fo:margin-left="0cm" fo:margin-right="0.189cm" fo:margin-top="0.035cm" fo:margin-bottom="0cm" fo:line-height="100%" fo:text-align="end" fo:text-indent="0cm" style:writing-mode="lr-tb" style:font-independent-line-spacing="true"/>
      <style:text-properties fo:font-size="18pt"/>
    </style:style>
    <style:style style:name="MP9" style:family="paragraph">
      <style:paragraph-properties fo:margin-left="0cm" fo:margin-right="0cm" fo:margin-top="0.035cm" fo:margin-bottom="0cm" fo:line-height="100%" fo:text-align="start" fo:text-indent="0cm" style:writing-mode="lr-tb"/>
    </style:style>
    <style:style style:name="M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1" style:family="paragraph">
      <loext:graphic-properties draw:fill="none" draw:fill-color="#ffffff"/>
      <style:paragraph-properties fo:margin-left="0cm" fo:margin-right="0cm" fo:margin-top="0.035cm" fo:margin-bottom="0cm" fo:line-height="100%" fo:text-align="start" fo:text-indent="0cm"/>
    </style:style>
    <style:style style:name="MP12" style:family="paragraph">
      <style:paragraph-properties fo:margin-left="0.035cm" fo:margin-right="0cm" fo:margin-top="0cm" fo:margin-bottom="0cm" fo:line-height="0.707cm" fo:text-align="center" fo:text-indent="0cm"/>
    </style:style>
    <style:style style:name="MP13" style:family="paragraph">
      <loext:graphic-properties draw:fill="none" draw:fill-color="#ffffff"/>
      <style:paragraph-properties fo:margin-left="0.035cm" fo:margin-right="0cm" fo:margin-top="0cm" fo:margin-bottom="0cm" fo:line-height="0.707cm" fo:text-align="center" fo:text-indent="0cm" style:font-independent-line-spacing="false"/>
      <style:text-properties fo:color="#622422" loext:opacity="100%" style:font-name="Calibri" fo:font-size="20pt" fo:letter-spacing="-0.002cm" fo:font-weight="bold" style:letter-kerning="true" style:font-size-asian="20pt" style:font-weight-asian="bold" style:font-name-complex="Calibri" style:font-size-complex="20pt" style:font-weight-complex="bold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loext:graphic-properties draw:fill="none" draw:fill-color="#ffffff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center"/>
    </style:style>
    <style:style style:name="MP19" style:family="paragraph">
      <style:paragraph-properties fo:text-align="end"/>
    </style:style>
    <style:style style:name="MP20" style:family="paragraph">
      <loext:graphic-properties draw:fill-color="#f44336"/>
      <style:paragraph-properties fo:text-align="center"/>
    </style:style>
    <style:style style:name="MP21" style:family="paragraph">
      <style:paragraph-properties fo:text-align="center" style:writing-mode="lr-tb"/>
    </style:style>
    <style:style style:name="MP22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letter-spacing="normal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MT3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letter-spacing="-0.004cm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MT4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letter-spacing="-0.002cm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MT5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letter-spacing="-0.007cm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MT6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letter-spacing="-0.009cm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MT7" style:family="text">
      <style:text-properties fo:font-variant="normal" fo:text-transform="none" fo:color="#244060" loext:opacity="100%" style:text-line-through-style="none" style:text-line-through-type="none" style:text-position="0% 100%" style:font-name="Calibri" fo:font-size="20pt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MT8" style:family="text">
      <style:text-properties fo:color="#622422" loext:opacity="100%" style:font-name="Calibri" fo:font-size="20pt" fo:letter-spacing="-0.002cm" fo:font-weight="bold" style:letter-kerning="true" style:font-size-asian="20pt" style:font-weight-asian="bold" style:font-name-complex="Calibri" style:font-size-complex="2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244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6224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5.5cm" svg:height="1.5cm" svg:x="0cm" svg:y="17.5cm">
        <text:p/>
        <draw:enhanced-geometry svg:viewBox="0 0 21600 21600" draw:type="rectangle" draw:enhanced-path="M 0 0 L 21600 0 21600 21600 0 21600 0 0 Z N"/>
      </draw:custom-shape>
      <draw:custom-shape draw:name="bg object 16" draw:style-name="Mgr3" draw:text-style-name="MP6" draw:layer="backgroundobjects" svg:width="24.203cm" svg:height="1.966cm" svg:x="0.699cm" svg:y="0.524cm">
        <text:p/>
        <draw:enhanced-geometry draw:mirror-horizontal="false" draw:mirror-vertical="false" svg:viewBox="0 0 0 0" drawooo:sub-view-size="8713470 708025" draw:text-areas="0 0 ?f0 ?f1" draw:type="ooxml-non-primitive" draw:enhanced-path="M 8712962 0 L 0 0 0 707885 8712962 707885 8712962 0 Z N">
          <draw:equation draw:name="f0" draw:formula="logwidth"/>
          <draw:equation draw:name="f1" draw:formula="logheight"/>
        </draw:enhanced-geometry>
      </draw:custom-shape>
      <draw:frame presentation:style-name="Blank-title" draw:layer="backgroundobjects" svg:width="22.859cm" svg:height="2.334cm" svg:x="1.5cm" svg:y="3cm" presentation:class="title" presentation:placeholder="true">
        <draw:text-box/>
      </draw:frame>
      <draw:frame presentation:style-name="Blank-outline1" draw:layer="backgroundobjects" svg:width="21.73cm" svg:height="6.543cm" svg:x="1.27cm" svg:y="5.457cm" presentation:class="outline" presentation:placeholder="true">
        <draw:text-box/>
      </draw:frame>
      <draw:custom-shape draw:name="object 16_0" draw:style-name="Mgr4" draw:text-style-name="MP8" draw:layer="backgroundobjects" svg:width="3.67cm" svg:height="0.883cm" svg:x="20.964cm" svg:y="0.524cm">
        <text:p text:style-name="MP7"><text:span text:style-name="MT2">CE - CET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5" draw:text-style-name="MP11" draw:layer="backgroundobjects" svg:width="12.5cm" svg:height="1.665cm" svg:x="4cm" svg:y="0.71cm">
        <draw:text-box>
          <text:p text:style-name="MP9"><text:span text:style-name="MT3">IES</text:span><text:span text:style-name="MT4"> SANT</text:span><text:span text:style-name="MT5"> </text:span><text:span text:style-name="MT4">VICENT FERRER</text:span><text:span text:style-name="MT6"> </text:span><text:span text:style-name="MT3">(ALGEMESÍ)</text:span></text:p>
          <text:p text:style-name="MP10"><text:span text:style-name="MT7">Cybersecurity incidents</text:span></text:p>
        </draw:text-box>
      </draw:frame>
      <draw:frame draw:name="object 19_0" presentation:style-name="Mpr2" draw:text-style-name="MP13" draw:layer="backgroundobjects" svg:width="17.967cm" svg:height="0.708cm" svg:x="3.533cm" svg:y="18cm">
        <draw:text-box>
          <text:p text:style-name="MP12"><text:span text:style-name="MT8">INTRODUCTION – Cybersecurity incidents</text:span></text:p>
        </draw:text-box>
      </draw:frame>
      <draw:frame draw:style-name="Mgr6" draw:text-style-name="MP14" draw:layer="backgroundobjects" svg:width="2.373cm" svg:height="1.966cm" svg:x="0.699cm" svg:y="0.524cm">
        <draw:image xlink:href="Pictures/100000000000020E000001B4494AA734.png" xlink:type="simple" xlink:show="embed" xlink:actuate="onLoad" draw:mime-type="image/png">
          <text:p/>
        </draw:image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2.859cm" svg:height="3.18cm" svg:x="1.27cm" svg:y="0.759cm" presentation:class="title" presentation:placeholder="true">
        <draw:text-box/>
      </draw:frame>
      <draw:frame draw:style-name="Mgr7" draw:text-style-name="MP15" draw:layer="backgroundobjects" svg:width="22.859cm" svg:height="11.048cm" svg:x="1.27cm" svg:y="4.457cm">
        <draw:text-box>
          <text:p/>
        </draw:text-box>
      </draw:frame>
      <draw:frame presentation:style-name="Mpr5" draw:text-style-name="MP2" draw:layer="backgroundobjects" svg:width="5.917cm" svg:height="1.312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7" draw:layer="backgroundobjects" svg:width="8.051cm" svg:height="1.312cm" svg:x="8.686cm" svg:y="17.354cm" presentation:class="footer">
        <draw:text-box>
          <text:p text:style-name="MP16"><text:span text:style-name="MT1"><presentation:footer/></text:span></text:p>
        </draw:text-box>
      </draw:frame>
      <draw:frame presentation:style-name="Mpr5" draw:text-style-name="MP4" draw:layer="backgroundobjects" svg:width="5.917cm" svg:height="1.312cm" svg:x="18.211cm" svg:y="17.354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Predetermin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VF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VF-title" draw:layer="backgroundobjects" svg:width="22.859cm" svg:height="3.18cm" svg:x="1.27cm" svg:y="0.76cm" presentation:class="title" presentation:placeholder="true">
        <draw:text-box/>
      </draw:frame>
      <draw:frame presentation:style-name="SVF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VF-title" draw:layer="backgroundobjects" svg:width="14.848cm" svg:height="11.136cm" svg:x="3.075cm" svg:y="2.257cm" presentation:class="page"/>
        <draw:frame presentation:style-name="SVF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18" draw:layer="backgroundobjects" svg:width="24.493cm" svg:height="3.024cm" svg:x="0.001cm" svg:y="0.604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6.35cm" svg:height="1.361cm" svg:x="19.05cm" svg:y="17.235cm">
        <text:p/>
        <draw:enhanced-geometry svg:viewBox="0 0 21600 21600" draw:type="rectangle" draw:enhanced-path="M 0 0 L 21600 0 21600 21600 0 21600 0 0 Z N"/>
      </draw:custom-shape>
      <draw:custom-shape draw:style-name="Mgr8" draw:text-style-name="MP18" draw:layer="backgroundobjects" svg:width="16.328cm" svg:height="1.361cm" svg:x="2.267cm" svg:y="17.235cm">
        <text:p/>
        <draw:enhanced-geometry svg:viewBox="0 0 21600 21600" draw:type="rectangle" draw:enhanced-path="M 0 0 L 21600 0 21600 21600 0 21600 0 0 Z N"/>
      </draw:custom-shape>
      <draw:custom-shape draw:style-name="Mgr9" draw:text-style-name="MP20" draw:layer="backgroundobjects" svg:width="1.361cm" svg:height="1.361cm" svg:x="0.453cm" svg:y="17.23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3.586cm" svg:height="2.419cm" svg:x="0.907cm" svg:y="0.907cm" presentation:class="title" presentation:placeholder="true">
        <draw:text-box/>
      </draw:frame>
      <draw:frame draw:style-name="Mgr10" draw:text-style-name="MP15" draw:layer="backgroundobjects" svg:width="23.132cm" svg:height="11.793cm" svg:x="0.907cm" svg:y="4.535cm">
        <draw:text-box>
          <text:p/>
        </draw:text-box>
      </draw:frame>
      <draw:custom-shape draw:style-name="Mgr8" draw:text-style-name="MP19" draw:layer="backgroundobjects" svg:width="1.361cm" svg:height="1.361cm" svg:x="0.453cm" svg:y="17.235cm">
        <text:p/>
        <draw:enhanced-geometry svg:viewBox="0 0 21600 21600" draw:type="rectangle" draw:enhanced-path="M 0 0 L 21600 0 21600 21600 0 21600 0 0 Z N"/>
      </draw:custom-shape>
      <draw:frame presentation:style-name="Mpr10" draw:text-style-name="MP18" draw:layer="backgroundobjects" svg:width="3.175cm" svg:height="1.361cm" svg:x="-0.453cm" svg:y="17.235cm" presentation:class="page-number">
        <draw:text-box>
          <text:p text:style-name="MP21"><text:page-number>&lt;número&gt;</text:page-number></text:p>
        </draw:text-box>
      </draw:frame>
      <draw:frame presentation:style-name="Mpr11" draw:text-style-name="MP14" draw:layer="backgroundobjects" svg:width="16.329cm" svg:height="1.361cm" svg:x="2.267cm" svg:y="17.235cm" presentation:class="footer">
        <draw:text-box>
          <text:p text:style-name="MP21"><presentation:footer/></text:p>
        </draw:text-box>
      </draw:frame>
      <draw:frame presentation:style-name="Mpr10" draw:text-style-name="MP19" draw:layer="backgroundobjects" svg:width="5.896cm" svg:height="1.315cm" svg:x="19.05cm" svg:y="17.235cm" presentation:class="date-time">
        <draw:text-box>
          <text:p text:style-name="MP22"><presentation:date-time/></text:p>
        </draw:text-box>
      </draw:frame>
      <draw:frame presentation:style-name="Alizarin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CE-CETI-IC</dc:title>
    <meta:creation-date>2021-09-17T12:45:34.110000000</meta:creation-date>
    <meta:editing-duration>PT2H5M34S</meta:editing-duration>
    <meta:generator>LibreOffice/24.8.2.1$Windows_X86_64 LibreOffice_project/0f794b6e29741098670a3b95d60478a65d05ef13</meta:generator>
    <meta:editing-cycles>32</meta:editing-cycles>
    <dc:date>2024-10-03T16:51:00.373000000</dc:date>
    <meta:print-date>2024-10-03T16:49:53.607000000</meta:print-date>
    <meta:printed-by>Archivos PDF</meta:printed-by>
    <meta:document-statistic meta:object-count="93"/>
    <meta:user-defined meta:name="AppVersion">12.0000</meta:user-defined>
    <meta:user-defined meta:name="Created" meta:value-type="date">2020-08-06T00:00:00</meta:user-defined>
    <meta:user-defined meta:name="Creator">Microsoft® PowerPoint® 2010</meta:user-defined>
    <meta:user-defined meta:name="LastSaved" meta:value-type="date">2021-09-17T00:00:00</meta:user-defined>
    <meta:user-defined meta:name="PresentationFormat" meta:value-type="string">On-screen Show (4:3)</meta:user-defined>
  </office:meta>
</office:document-meta>
</file>