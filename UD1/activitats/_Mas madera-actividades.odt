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00000021CADC975B81CFA0241.png" manifest:media-type="image/png"/>
  <manifest:file-entry manifest:full-path="Pictures/100000000000020E000001B4A98736F05B1CE62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47c4da" style:font-size-asian="10pt" style:font-size-complex="10pt"/>
    </style:style>
    <style:style style:name="P2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47c4da" style:font-size-asian="10pt" style:font-size-complex="10pt"/>
    </style:style>
    <style:style style:name="P3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47c4da"/>
    </style:style>
    <style:style style:name="P4" style:family="paragraph" style:parent-style-name="Standard">
      <style:paragraph-properties fo:text-align="start" style:justify-single-word="false"/>
      <style:text-properties style:font-name="Calibri" fo:font-size="16pt" fo:language="en" fo:country="GB" fo:font-weight="bold" officeooo:rsid="004cfdad" officeooo:paragraph-rsid="004cfda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6pt" fo:language="en" fo:country="GB" fo:font-weight="bold" officeooo:rsid="002188a7" officeooo:paragraph-rsid="0039b482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4c5187" style:font-size-asian="12pt" style:font-weight-asian="normal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4b0aa3" officeooo:paragraph-rsid="00508b0b" style:font-size-asian="12pt" style:font-weight-asian="normal" style:font-size-complex="12pt"/>
    </style:style>
    <style:style style:name="P8" style:family="paragraph">
      <style:paragraph-properties fo:text-align="center"/>
    </style:style>
    <style:style style:name="T1" style:family="text">
      <style:text-properties fo:language="zxx" fo:country="none" officeooo:rsid="009ecadd" style:language-asian="zxx" style:country-asian="none" style:language-complex="zxx" style:country-complex="none"/>
    </style:style>
    <style:style style:name="T2" style:family="text">
      <style:text-properties fo:language="zxx" fo:country="none" officeooo:rsid="0069844e" style:language-asian="zxx" style:country-asian="none" style:language-complex="zxx" style:country-complex="none"/>
    </style:style>
    <style:style style:name="T3" style:family="text">
      <style:text-properties fo:language="zxx" fo:country="none" fo:font-weight="bold" officeooo:rsid="0069844e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9ecadd" style:font-size-asian="10pt" style:font-size-complex="10pt"/>
    </style:style>
    <style:style style:name="T6" style:family="text">
      <style:text-properties fo:font-size="10pt" fo:language="zxx" fo:country="none" officeooo:rsid="0069844e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4c5187" style:font-size-asian="10pt" style:font-weight-asian="normal" style:font-size-complex="10pt" style:font-weight-complex="normal"/>
    </style:style>
    <style:style style:name="T9" style:family="text">
      <style:text-properties officeooo:rsid="009ecadd"/>
    </style:style>
    <style:style style:name="T10" style:family="text">
      <style:text-properties style:font-name="Calibri" fo:font-size="16pt" fo:font-weight="bold" officeooo:rsid="003d30c7" style:font-size-asian="16pt" style:font-weight-asian="bold" style:font-size-complex="16pt" style:font-weight-complex="bold"/>
    </style:style>
    <style:style style:name="T11" style:family="text">
      <style:text-properties officeooo:rsid="004c5187"/>
    </style:style>
    <style:style style:name="T12" style:family="text">
      <style:text-properties officeooo:rsid="00508b0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Calibri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cursos per preparar activitys</text:p>
      <text:p text:style-name="P5"><text:s/></text:p>
      <text:p text:style-name="P6"><text:span text:style-name="Strong_20_Emphasis"><text:span text:style-name="T11">Xifrat</text:span></text:span><text:span text:style-name="T10"/></text:p>
      <text:p text:style-name="P6"><text:span text:style-name="Strong_20_Emphasis"><text:span text:style-name="T8">en google drive</text:span></text:span><text:span text:style-name="T10"/></text:p>
      <text:p text:style-name="P6"><text:a xlink:type="simple" xlink:href="https://www.welivesecurity.com/es/recursos-herramientas/como-encriptar-datos-google-drive/" text:style-name="Internet_20_link" text:visited-style-name="Visited_20_Internet_20_Link"><text:span text:style-name="Strong_20_Emphasis"><text:span text:style-name="T7">https://www.welivesecurity.com/es/recursos-herramientas/como-encriptar-datos-google-drive/</text:span></text:span></text:a><text:span text:style-name="T10"/></text:p>
      <text:p text:style-name="P6"><text:span text:style-name="Strong_20_Emphasis"><text:span text:style-name="T8">GPG</text:span></text:span><text:span text:style-name="T10"/></text:p>
      <text:p text:style-name="P6"><text:a xlink:type="simple" xlink:href="https://hipertextual.com/2013/08/que-es-pgp-y-para-que-sirve" text:style-name="Internet_20_link" text:visited-style-name="Visited_20_Internet_20_Link"><text:span text:style-name="Strong_20_Emphasis"><text:span text:style-name="T7">https://hipertextual.com/2013/08/que-es-pgp-y-para-que-sirve</text:span></text:span></text:a><text:span text:style-name="T10"/></text:p>
      <text:p text:style-name="P6"><text:span text:style-name="Strong_20_Emphasis"><text:span text:style-name="T8">GPG</text:span></text:span><text:span text:style-name="T10"/></text:p>
      <text:p text:style-name="P6"><text:a xlink:type="simple" xlink:href="https://blog.desdelinux.net/breve-guia-para-encriptar-archivos-desde-el-terminal/" text:style-name="Internet_20_link" text:visited-style-name="Visited_20_Internet_20_Link"><text:span text:style-name="Strong_20_Emphasis"><text:span text:style-name="T7">https://blog.desdelinux.net/breve-guia-para-encriptar-archivos-desde-el-terminal/</text:span></text:span></text:a><text:span text:style-name="T10"/></text:p>
      <text:p text:style-name="P6"><text:span text:style-name="Strong_20_Emphasis"><text:span text:style-name="T8">LUKS</text:span></text:span><text:span text:style-name="T10"/></text:p>
      <text:p text:style-name="P6"><text:a xlink:type="simple" xlink:href="https://bytelearning.blogspot.com/2017/06/como-cifrar-disco-linux-luks.html" text:style-name="Internet_20_link" text:visited-style-name="Visited_20_Internet_20_Link"><text:span text:style-name="Strong_20_Emphasis"><text:span text:style-name="T7">https://bytelearning.blogspot.com/2017/06/como-cifrar-disco-linux-luks.html</text:span></text:span></text:a><text:span text:style-name="T10"/></text:p>
      <text:p text:style-name="P6"><text:span text:style-name="Strong_20_Emphasis"><text:span text:style-name="T8">ASH</text:span></text:span><text:span text:style-name="T10"/></text:p>
      <text:p text:style-name="P6"><text:a xlink:type="simple" xlink:href="https://www.linuxadictos.com/ash-cifrar-ficheros-directorios-linux-una-forma-facil.html" text:style-name="Internet_20_link" text:visited-style-name="Visited_20_Internet_20_Link"><text:span text:style-name="Strong_20_Emphasis"><text:span text:style-name="T7">https://www.linuxadictos.com/ash-cifrar-ficheros-directorios-linux-una-forma-facil.html</text:span></text:span></text:a><text:span text:style-name="T10"/></text:p>
      <text:p text:style-name="P6"><text:span text:style-name="Strong_20_Emphasis"><text:span text:style-name="T8">GPG</text:span></text:span><text:span text:style-name="T10"/></text:p>
      <text:p text:style-name="P6"><text:a xlink:type="simple" xlink:href="https://blog.desdelinux.net/breve-guia-para-encriptar-archivos-desde-el-terminal/" text:style-name="Internet_20_link" text:visited-style-name="Visited_20_Internet_20_Link"><text:span text:style-name="Strong_20_Emphasis"><text:span text:style-name="T7">https://blog.desdelinux.net/breve-guia-para-encriptar-archivos-desde-el-terminal/</text:span></text:span></text:a><text:span text:style-name="T10"/></text:p>
      <text:p text:style-name="P6"><text:span text:style-name="Strong_20_Emphasis"><text:span text:style-name="T8">Desde Android</text:span></text:span><text:span text:style-name="T10"/></text:p>
      <text:p text:style-name="P6"><text:a xlink:type="simple" xlink:href="https://www.solvetic.com/tutoriales/article/4485-como-encriptar-desencriptar-archivos-en-movil-android/" text:style-name="Internet_20_link" text:visited-style-name="Visited_20_Internet_20_Link"><text:span text:style-name="Strong_20_Emphasis"><text:span text:style-name="T7">https://www.solvetic.com/tutoriales/article/4485-como-encriptar-desencriptar-archivos-en-movil-android/</text:span></text:span></text:a><text:span text:style-name="T10"/></text:p>
      <text:p text:style-name="P6"><text:a xlink:type="simple" xlink:href="https://play.google.com/store/apps/details?id=com.codexapps.andrognito&amp;pli=1" text:style-name="Internet_20_link" text:visited-style-name="Visited_20_Internet_20_Link"><text:span text:style-name="Strong_20_Emphasis"><text:span text:style-name="T7">https://play.google.com/store/apps/details?id=com.codexapps.andrognito&amp;pli=1</text:span></text:span></text:a><text:span text:style-name="T10"/></text:p>
      <text:p text:style-name="P6"><text:span text:style-name="Strong_20_Emphasis"><text:span text:style-name="T8">Cryptmount</text:span></text:span><text:span text:style-name="T10"/></text:p>
      <text:p text:style-name="P6"><text:a xlink:type="simple" xlink:href="https://www.solvetic.com/tutoriales/article/4994-como-encriptar-sistemas-de-archivos-en-linux-con-cryptmount/" text:style-name="Internet_20_link" text:visited-style-name="Visited_20_Internet_20_Link"><text:span text:style-name="Strong_20_Emphasis"><text:span text:style-name="T7">https://www.solvetic.com/tutoriales/article/4994-como-encriptar-sistemas-de-archivos-en-linux-con-cryptmount/</text:span></text:span></text:a><text:span text:style-name="T10"/></text:p>
      <text:p text:style-name="P6"><text:span text:style-name="Strong_20_Emphasis"><text:span text:style-name="T8">ENCFS</text:span></text:span><text:span text:style-name="T10"/></text:p>
      <text:p text:style-name="P6"><text:a xlink:type="simple" xlink:href="https://www.solvetic.com/tutoriales/article/5483-como-encriptar-datos-con-encfs-en-ubuntu-18-04-linux/" text:style-name="Internet_20_link" text:visited-style-name="Visited_20_Internet_20_Link"><text:span text:style-name="Strong_20_Emphasis"><text:span text:style-name="T7">https://www.solvetic.com/tutoriales/article/5483-como-encriptar-datos-con-encfs-en-ubuntu-18-04-linux/</text:span></text:span></text:a><text:span text:style-name="T10"/></text:p>
      <text:p text:style-name="P6"><text:span text:style-name="Strong_20_Emphasis"><text:span text:style-name="T8">Veracrypt</text:span></text:span><text:span text:style-name="T10"/></text:p>
      <text:p text:style-name="P6"><text:a xlink:type="simple" xlink:href="https://www.solvetic.com/tutoriales/article/5765-como-utilizar-veracrypt-para-encriptar-archivos-carpetas/" text:style-name="Internet_20_link" text:visited-style-name="Visited_20_Internet_20_Link"><text:span text:style-name="Strong_20_Emphasis"><text:span text:style-name="T7">https://www.solvetic.com/tutoriales/article/5765-como-utilizar-veracrypt-para-encriptar-archivos-carpetas/</text:span></text:span></text:a><text:span text:style-name="T10"/></text:p>
      <text:p text:style-name="P6"><text:span text:style-name="Strong_20_Emphasis"><text:span text:style-name="T8">Encryptfs</text:span></text:span><text:span text:style-name="T10"/></text:p>
      <text:p text:style-name="P6"><text:a xlink:type="simple" xlink:href="https://www.solvetic.com/tutoriales/article/2936-como-encriptar-directorios-con-ecryptfs-en-linux/" text:style-name="Internet_20_link" text:visited-style-name="Visited_20_Internet_20_Link"><text:span text:style-name="Strong_20_Emphasis"><text:span text:style-name="T7">https://www.solvetic.com/tutoriales/article/2936-como-encriptar-directorios-con-ecryptfs-en-linux/</text:span></text:span></text:a><text:span text:style-name="T10"/></text:p>
      <text:p text:style-name="P6"><text:a xlink:type="simple" xlink:href="https://noticiasseguridad.com/seguridad-informatica/como-proteger-con-contrasena-y-cifrar-archivos-y-carpetas-en-windows-10-sin-usar-software-adicional/" text:style-name="Internet_20_link" text:visited-style-name="Visited_20_Internet_20_Link"><text:span text:style-name="Strong_20_Emphasis"><text:span text:style-name="T7">https://noticiasseguridad.com/seguridad-informatica/como-proteger-con-contrasena-y-cifrar-archivos-y-carpetas-en-windows-10-sin-usar-software-adicional/</text:span></text:span></text:a><text:span text:style-name="T10"/></text:p>
      <text:p text:style-name="P6"><text:span text:style-name="Strong_20_Emphasis"><text:span text:style-name="T8">gocryptfs</text:span></text:span><text:span text:style-name="T10"/></text:p>
      <text:p text:style-name="P6"><text:a xlink:type="simple" xlink:href="https://www.solvetic.com/tutoriales/article/8797-como-cifrar-archivos-con-gocryptfs-en-linux-encriptar/" text:style-name="Internet_20_link" text:visited-style-name="Visited_20_Internet_20_Link"><text:span text:style-name="Strong_20_Emphasis"><text:span text:style-name="T7">https://www.solvetic.com/tutoriales/article/8797-como-cifrar-archivos-con-gocryptfs-en-linux-encriptar/</text:span></text:span></text:a><text:span text:style-name="T10"/></text:p>
      <text:p text:style-name="P6"><text:span text:style-name="Strong_20_Emphasis"/></text:p>
      <text:p text:style-name="P6"><text:span text:style-name="Strong_20_Emphasis"><text:span text:style-name="T7">Programas de cifrado:</text:span></text:span><text:span text:style-name="T10"/></text:p>
      <text:p text:style-name="P6"><text:span text:style-name="Strong_20_Emphasis"/></text:p>
      <text:p text:style-name="P6"><text:span text:style-name="Strong_20_Emphasis"><text:span text:style-name="T7">🔒VeraCrypt - Cifrado de discos y archivos. Derivación del proyecto TrueCrypt </text:span></text:span><text:a xlink:type="simple" xlink:href="https://veracrypt.codeplex.com/" text:style-name="Internet_20_link" text:visited-style-name="Visited_20_Internet_20_Link"><text:span text:style-name="Strong_20_Emphasis"><text:span text:style-name="T7">https://veracrypt.codeplex.com/</text:span></text:span></text:a><text:span text:style-name="T10"/></text:p>
      <text:p text:style-name="P6"><text:span text:style-name="Strong_20_Emphasis"><text:span text:style-name="T7">🔒GNU Privacy Guard - Cifrado de correo electrónico </text:span></text:span><text:a xlink:type="simple" xlink:href="https://www.gnupg.org/" text:style-name="Internet_20_link" text:visited-style-name="Visited_20_Internet_20_Link"><text:span text:style-name="Strong_20_Emphasis"><text:span text:style-name="T7">https://www.gnupg.org/</text:span></text:span></text:a><text:span text:style-name="T10"/></text:p>
      <text:p text:style-name="P6"><text:span text:style-name="Strong_20_Emphasis"><text:span text:style-name="T7">🔒PeaZip - Cifrado de archivos </text:span></text:span><text:a xlink:type="simple" xlink:href="http://www.peazip.org/" text:style-name="Internet_20_link" text:visited-style-name="Visited_20_Internet_20_Link"><text:span text:style-name="Strong_20_Emphasis"><text:span text:style-name="T7">http://www.peazip.org/</text:span></text:span></text:a><text:span text:style-name="T10"/></text:p>
      <text:p text:style-name="P6"><text:span text:style-name="Strong_20_Emphasis"><text:span text:style-name="T7">🔒Cryptomator - Cifrado para archivos en la nube </text:span></text:span><text:a xlink:type="simple" xlink:href="https://cryptomator.org/" text:style-name="Internet_20_link" text:visited-style-name="Visited_20_Internet_20_Link"><text:span text:style-name="Strong_20_Emphasis"><text:span text:style-name="T7">https://cryptomator.org/</text:span></text:span></text:a><text:span text:style-name="T10"/></text:p>
      <text:p text:style-name="P6"><text:span text:style-name="Strong_20_Emphasis"><text:span text:style-name="T7">🔒MiniLock - Extensión para Chrome para poner contraseñas a archivos.</text:span></text:span><text:span text:style-name="T10"/></text:p>
      <text:p text:style-name="P6"><text:span text:style-name="Strong_20_Emphasis"><text:span text:style-name="T7">🔒AES Crypt - Cifrados de 256 bits. </text:span></text:span><text:a xlink:type="simple" xlink:href="https://www.aescrypt.com/" text:style-name="Internet_20_link" text:visited-style-name="Visited_20_Internet_20_Link"><text:span text:style-name="Strong_20_Emphasis"><text:span text:style-name="T7">https://www.aescrypt.com/</text:span></text:span></text:a><text:span text:style-name="T10"/></text:p>
      <text:p text:style-name="P6"><text:span text:style-name="Strong_20_Emphasis"><text:span text:style-name="T7">🔒DiskCrytor - Cifrado para discos</text:span></text:span><text:span text:style-name="T10"/></text:p>
      <text:p text:style-name="P6"><text:span text:style-name="Strong_20_Emphasis"/></text:p>
      <text:p text:style-name="P6"><text:span text:style-name="Strong_20_Emphasis"><text:span text:style-name="T7">Menciono TrueCrypt por que durante mucho tiempo fue una herramienta muy valorada y extendida, incluso en el mundo empresarial. Fue así hasta que inexperadamente se anuncio el cierre a través de la página oficial del proyecto: "Las sospechas tras el cierre de TrueCrypt" vía @eldiario</text:span></text:span><text:span text:style-name="T10"/></text:p>
      <text:p text:style-name="P6"><text:span text:style-name="Strong_20_Emphasis"><text:span text:style-name="T7">📃 </text:span></text:span><text:a xlink:type="simple" xlink:href="http://www.eldiario.es/turing/criptografia/misterioso-cierre-TrueCrypt_0_265624085.html" text:style-name="Internet_20_link" text:visited-style-name="Visited_20_Internet_20_Link"><text:span text:style-name="Strong_20_Emphasis"><text:span text:style-name="T7">http://www.eldiario.es/turing/criptografia/misterioso-cierre-TrueCrypt_0_265624085.html</text:span></text:span></text:a><text:span text:style-name="T10"/></text:p>
      <text:p text:style-name="P6"><text:span text:style-name="Strong_20_Emphasis"/></text:p>
      <text:p text:style-name="P6"><text:span text:style-name="Strong_20_Emphasis"><text:span text:style-name="T7">Tutorial VeraCrypt para Linux: 🛠 </text:span></text:span><text:a xlink:type="simple" xlink:href="https://securityinabox.org/es/guide/veracrypt/linux/" text:style-name="Internet_20_link" text:visited-style-name="Visited_20_Internet_20_Link"><text:span text:style-name="Strong_20_Emphasis"><text:span text:style-name="T7">https://securityinabox.org/es/guide/veracrypt/linux/</text:span></text:span></text:a><text:span text:style-name="T10"/></text:p>
      <text:p text:style-name="P6"><text:span text:style-name="Strong_20_Emphasis"><text:span text:style-name="T7"><text:s/>y para windows: 🛠 </text:span></text:span><text:a xlink:type="simple" xlink:href="https://securityinabox.org/es/guide/veracrypt/windows/" text:style-name="Internet_20_link" text:visited-style-name="Visited_20_Internet_20_Link"><text:span text:style-name="Strong_20_Emphasis"><text:span text:style-name="T7">https://securityinabox.org/es/guide/veracrypt/windows/</text:span></text:span></text:a><text:span text:style-name="T10"/></text:p>
      <text:p text:style-name="P6"><text:span text:style-name="Strong_20_Emphasis"/></text:p>
      <text:p text:style-name="P6"><text:span text:style-name="Strong_20_Emphasis"><text:span text:style-name="T7">eCryptfs en Linux: https://t.me/seguridadinformatic4/905</text:span></text:span><text:span text:style-name="T10"/></text:p>
      <text:p text:style-name="P6"><text:span text:style-name="Strong_20_Emphasis"><text:span text:style-name="T7">Cryptmount en Linux: </text:span></text:span><text:a xlink:type="simple" xlink:href="https://t.me/seguridadinformatic4/735" text:style-name="Internet_20_link" text:visited-style-name="Visited_20_Internet_20_Link"><text:span text:style-name="Strong_20_Emphasis"><text:span text:style-name="T7">https://t.me/seguridadinformatic4/735</text:span></text:span></text:a><text:span text:style-name="T10"/></text:p>
      <text:p text:style-name="P6"><text:a xlink:type="simple" xlink:href="https://www.linuxadictos.com/cryptmount-una-utilidad-para-crear-sistemas-de-ficheros-cifrados-en-linux.html" text:style-name="Internet_20_link" text:visited-style-name="Visited_20_Internet_20_Link"><text:span text:style-name="Strong_20_Emphasis"><text:span text:style-name="T7">https://www.linuxadictos.com/cryptmount-una-utilidad-para-crear-sistemas-de-ficheros-cifrados-en-linux.html</text:span></text:span></text:a><text:span text:style-name="T10"/></text:p>
      <text:p text:style-name="P6"><text:span text:style-name="Strong_20_Emphasis"><text:span text:style-name="T7">EncryptPad en Linux: </text:span></text:span><text:a xlink:type="simple" xlink:href="https://t.me/seguridadinformatic4/717" text:style-name="Internet_20_link" text:visited-style-name="Visited_20_Internet_20_Link"><text:span text:style-name="Strong_20_Emphasis"><text:span text:style-name="T7">https://t.me/seguridadinformatic4/717</text:span></text:span></text:a><text:span text:style-name="T10"/></text:p>
      <text:p text:style-name="P6"><text:a xlink:type="simple" xlink:href="https://www.linuxadictos.com/encryptpad-visualiza-y-edita-texto-de-forma-simetrica-cifrada-en-linux.html" text:style-name="Internet_20_link" text:visited-style-name="Visited_20_Internet_20_Link"><text:span text:style-name="Strong_20_Emphasis"><text:span text:style-name="T7">https://www.linuxadictos.com/encryptpad-visualiza-y-edita-texto-de-forma-simetrica-cifrada-en-linux.html</text:span></text:span></text:a><text:span text:style-name="T10"/></text:p>
      <text:p text:style-name="P6"><text:span text:style-name="Strong_20_Emphasis"><text:span text:style-name="T7">Veracrypt: https://t.me/seguridadinformatic4/663</text:span></text:span><text:span text:style-name="T10"/></text:p>
      <text:p text:style-name="P6"><text:span text:style-name="Strong_20_Emphasis"><text:span text:style-name="T7">Encfs en Linux: https://t.me/seguridadinformatic4/583</text:span></text:span><text:span text:style-name="T10"/></text:p>
      <text:p text:style-name="P6"><text:span text:style-name="Strong_20_Emphasis"><text:span text:style-name="T7">LUKS y otros en Linux: </text:span></text:span><text:a xlink:type="simple" xlink:href="https://t.me/seguridadinformatic4/300" text:style-name="Internet_20_link" text:visited-style-name="Visited_20_Internet_20_Link"><text:span text:style-name="Strong_20_Emphasis"><text:span text:style-name="T7">https://t.me/seguridadinformatic4/300</text:span></text:span></text:a><text:span text:style-name="T10"/></text:p>
      <text:p text:style-name="P6"><text:soft-page-break/><text:span text:style-name="Strong_20_Emphasis"/></text:p>
      <text:p text:style-name="P6"><text:span text:style-name="Strong_20_Emphasis"/></text:p>
      <text:p text:style-name="P7"><text:span text:style-name="Strong_20_Emphasis"><text:span text:style-name="T12">PHISHING</text:span></text:span><text:span text:style-name="T7"/></text:p>
      <text:p text:style-name="P7"><text:span text:style-name="Strong_20_Emphasis"><text:span text:style-name="T14"/></text:span></text:p>
      <text:p text:style-name="P7"><text:a xlink:type="simple" xlink:href="https://awesomeopensource.com/projects/phishing" text:style-name="Internet_20_link" text:visited-style-name="Visited_20_Internet_20_Link"><text:span text:style-name="Strong_20_Emphasis"><text:span text:style-name="T14">https://awesomeopensource.com/projects/phishing</text:span></text:span></text:a><text:span text:style-name="T7"/></text:p>
      <text:p text:style-name="P7"><text:a xlink:type="simple" xlink:href="https://resources.infosecinstitute.com/topics/phishing/top-9-free-phishing-simulators/" text:style-name="Internet_20_link" text:visited-style-name="Visited_20_Internet_20_Link"><text:span text:style-name="Strong_20_Emphasis"><text:span text:style-name="T14">https://resources.infosecinstitute.com/topics/phishing/top-9-free-phishing-simulators/</text:span></text:span></text:a><text:span text:style-name="T7"/></text:p>
      <text:p text:style-name="P7"><text:a xlink:type="simple" xlink:href="https://rayscyberlab.org/home/projects/fresh-phish-framework/" text:style-name="Internet_20_link" text:visited-style-name="Visited_20_Internet_20_Link"><text:span text:style-name="Strong_20_Emphasis"><text:span text:style-name="T14">https://rayscyberlab.org/home/projects/fresh-phish-framework/</text:span></text:span></text:a><text:span text:style-name="T7"/></text:p>
      <text:p text:style-name="P7"><text:a xlink:type="simple" xlink:href="https://www.kaspersky.es/blog/reset-notification-scam/26945/" text:style-name="Internet_20_link" text:visited-style-name="Visited_20_Internet_20_Link"><text:span text:style-name="Strong_20_Emphasis"><text:span text:style-name="T14">https://www.kaspersky.es/blog/reset-notification-scam/26945/</text:span></text:span></text:a><text:span text:style-name="T7"/></text:p>
      <text:p text:style-name="P7"><text:span text:style-name="Strong_20_Emphasis"><text:span text:style-name="T14"/></text:span></text:p>
      <text:p text:style-name="P7"><text:a xlink:type="simple" xlink:href="https://www.genbeta.com/actualidad/este-kit-phishing-permite-a-crear-ventanas-emergentes-chrome-falsas-para-robar-tu-informacion" text:style-name="Internet_20_link" text:visited-style-name="Visited_20_Internet_20_Link"><text:span text:style-name="Strong_20_Emphasis"><text:span text:style-name="T14">https://www.genbeta.com/actualidad/este-kit-phishing-permite-a-crear-ventanas-emergentes-chrome-falsas-para-robar-tu-informacion</text:span></text:span></text:a><text:span text:style-name="T7"/></text:p>
      <text:p text:style-name="P7"><text:span text:style-name="Strong_20_Emphasis"><text:span text:style-name="T14"/></text:span></text:p>
      <text:p text:style-name="P7"><text:span text:style-name="Strong_20_Emphasis"><text:span text:style-name="T14"/></text:span></text:p>
      <text:p text:style-name="P7"><text:span text:style-name="Strong_20_Emphasis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Arial" fo:font-family="Arial" style:font-family-generic="swiss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47c4da" style:font-size-asian="10pt" style:font-size-complex="10pt"/>
    </style:style>
    <style:style style:name="MP2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47c4da"/>
    </style:style>
    <style:style style:name="MP3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47c4da" style:font-size-asian="10pt" style:font-size-complex="10pt"/>
    </style:style>
    <style:style style:name="MP4" style:family="paragraph">
      <style:paragraph-properties fo:text-align="center"/>
    </style:style>
    <style:style style:name="MT1" style:family="text">
      <style:text-properties fo:language="zxx" fo:country="none" officeooo:rsid="009ecadd" style:language-asian="zxx" style:country-asian="none" style:language-complex="zxx" style:country-complex="none"/>
    </style:style>
    <style:style style:name="MT2" style:family="text">
      <style:text-properties fo:language="zxx" fo:country="none" officeooo:rsid="0069844e" style:language-asian="zxx" style:country-asian="none" style:language-complex="zxx" style:country-complex="non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officeooo:rsid="009ecadd" style:font-size-asian="10pt" style:font-size-complex="10pt"/>
    </style:style>
    <style:style style:name="MT5" style:family="text">
      <style:text-properties fo:font-size="10pt" fo:language="zxx" fo:country="none" officeooo:rsid="0069844e" style:font-size-asian="10pt" style:language-asian="zxx" style:country-asian="none" style:font-size-complex="10pt" style:language-complex="zxx" style:country-complex="none"/>
    </style:style>
    <style:style style:name="MT6" style:family="text">
      <style:text-properties officeooo:rsid="009ecadd"/>
    </style:style>
    <style:style style:name="MT7" style:family="text">
      <style:text-properties fo:language="zxx" fo:country="none" fo:font-weight="bold" officeooo:rsid="0069844e" style:language-asian="zxx" style:country-asian="none" style:font-weight-asian="bold" style:language-complex="zxx" style:country-complex="none" style:font-weight-complex="bold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88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 Copy 1" text:anchor-type="paragraph" svg:x="13.993cm" svg:y="-0.263cm" svg:width="2.988cm" svg:height="1.528cm" draw:z-index="1"><draw:image xlink:href="Pictures/10000000000002D00000021CADC975B81CFA0241.png" xlink:type="simple" xlink:show="embed" xlink:actuate="onLoad" draw:mime-type="image/png"/></draw:frame><draw:frame draw:style-name="Mfr2" draw:name="Imagen3" text:anchor-type="char" svg:x="-0.295cm" svg:y="-0.381cm" svg:width="1.842cm" svg:height="1.526cm" draw:z-index="5"><draw:image xlink:href="Pictures/100000000000020E000001B4A98736F05B1CE62A.png" xlink:type="simple" xlink:show="embed" xlink:actuate="onLoad" draw:mime-type="image/png"/></draw:frame><text:tab/>IES <text:span text:style-name="MT1">Sant Vicent Ferrer<text:tab/></text:span><text:span text:style-name="MT2">CICLE: ASIX</text:span></text:p>
        <text:p text:style-name="MP2"><text:span text:style-name="MT3"><text:tab/></text:span><text:span text:style-name="MT4">Parc Salvador Castell, 16<text:tab/></text:span><text:span text:style-name="MT5">MODALITAT: SEMIPRESENCIAL</text:span></text:p>
        <text:p text:style-name="MP3"><draw:line text:anchor-type="paragraph" draw:z-index="3" draw:name="Línea 1" draw:style-name="Mgr1" draw:text-style-name="MP4" svg:x1="0.058cm" svg:y1="0.515cm" svg:x2="16.912cm" svg:y2="0.506cm"><text:p/></draw:line><text:tab/>46<text:span text:style-name="MT6">680</text:span> <text:span text:style-name="MT1">Algemesí<text:tab/></text:span><text:span text:style-name="MT7">MÒDUL: SAD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0-28T11:48:44.715000000</meta:creation-date>
    <meta:generator>LibreOffice/7.5.2.2$Windows_X86_64 LibreOffice_project/53bb9681a964705cf672590721dbc85eb4d0c3a2</meta:generator>
    <meta:editing-duration>PT1H3M33S</meta:editing-duration>
    <meta:editing-cycles>8</meta:editing-cycles>
    <meta:keyword>Política Plan Auditoria</meta:keyword>
    <dc:subject>Compromiso y Cultura de la Ciberseguridad</dc:subject>
    <dc:title>Documentos de Ciberseguridad</dc:title>
    <dc:date>2023-10-13T15:53:42.140000000</dc:date>
    <meta:document-statistic meta:table-count="0" meta:image-count="2" meta:object-count="0" meta:page-count="2" meta:paragraph-count="58" meta:word-count="202" meta:character-count="3511" meta:non-whitespace-character-count="3361"/>
  </office:meta>
</office:document-meta>
</file>