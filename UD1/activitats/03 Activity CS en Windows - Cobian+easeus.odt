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21CADC975B81CFA0241.png" manifest:media-type="image/png"/>
  <manifest:file-entry manifest:full-path="Pictures/10000000000002CE000000D5D7B67E28353D3DCD.png" manifest:media-type="image/png"/>
  <manifest:file-entry manifest:full-path="Pictures/100000000000020E000001B4A98736F05B1CE62A.png" manifest:media-type="image/png"/>
  <manifest:file-entry manifest:full-path="Pictures/10000000000000840000005A472D413E5DBA8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1e0814" style:font-size-asian="10pt" style:font-size-complex="10pt"/>
    </style:style>
    <style:style style:name="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1e0814"/>
    </style:style>
    <style:style style:name="P3" style:family="paragraph" style:parent-style-name="Standard">
      <style:text-properties style:rfc-language-tag="ca-ES-valencia" fo:language="ca" fo:country="ES" officeooo:rsid="000edccb" officeooo:paragraph-rsid="001f3d7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rsid="000edccb" officeooo:paragraph-rsid="000edccb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en" fo:country="US" officeooo:rsid="000529a5" officeooo:paragraph-rsid="000529a5"/>
    </style:style>
    <style:style style:name="P6" style:family="paragraph" style:parent-style-name="Standard">
      <style:text-properties fo:language="en" fo:country="US" officeooo:rsid="001bc374" officeooo:paragraph-rsid="001e0814"/>
    </style:style>
    <style:style style:name="P7" style:family="paragraph" style:parent-style-name="Standard">
      <style:text-properties fo:language="en" fo:country="US" officeooo:rsid="000edccb" officeooo:paragraph-rsid="001103c2"/>
    </style:style>
    <style:style style:name="P8" style:family="paragraph" style:parent-style-name="Standard">
      <style:text-properties fo:language="en" fo:country="US" officeooo:rsid="000edccb" officeooo:paragraph-rsid="000edccb"/>
    </style:style>
    <style:style style:name="P9" style:family="paragraph" style:parent-style-name="Standard">
      <style:text-properties fo:language="en" fo:country="US" officeooo:rsid="000edccb" officeooo:paragraph-rsid="001f3d7d"/>
    </style:style>
    <style:style style:name="P10" style:family="paragraph" style:parent-style-name="Standard">
      <style:text-properties fo:language="en" fo:country="US" officeooo:rsid="000edccb" officeooo:paragraph-rsid="0021075f"/>
    </style:style>
    <style:style style:name="P11" style:family="paragraph" style:parent-style-name="Standard">
      <style:text-properties fo:language="en" fo:country="US" officeooo:rsid="000fa36f" officeooo:paragraph-rsid="000ee64a"/>
    </style:style>
    <style:style style:name="P12" style:family="paragraph" style:parent-style-name="Standard">
      <style:text-properties fo:language="en" fo:country="US" officeooo:rsid="0014b417" officeooo:paragraph-rsid="001103c2"/>
    </style:style>
    <style:style style:name="P13" style:family="paragraph" style:parent-style-name="Standard">
      <style:text-properties fo:language="en" fo:country="US" officeooo:rsid="0014b417" officeooo:paragraph-rsid="001f3d7d"/>
    </style:style>
    <style:style style:name="P14" style:family="paragraph" style:parent-style-name="Standard">
      <style:text-properties fo:language="en" fo:country="US" officeooo:rsid="0014b417" officeooo:paragraph-rsid="000ee64a"/>
    </style:style>
    <style:style style:name="P15" style:family="paragraph" style:parent-style-name="Standard">
      <style:text-properties fo:language="en" fo:country="US" officeooo:rsid="001f3d7d" officeooo:paragraph-rsid="001f3d7d"/>
    </style:style>
    <style:style style:name="P16" style:family="paragraph" style:parent-style-name="Standard">
      <style:text-properties style:font-name="Calibri" fo:font-size="12pt" fo:language="en" fo:country="US" officeooo:rsid="0014b417" officeooo:paragraph-rsid="0021075f" style:font-size-asian="12pt" style:font-size-complex="12pt"/>
    </style:style>
    <style:style style:name="P17" style:family="paragraph" style:parent-style-name="Standard">
      <style:text-properties style:font-name="Calibri" fo:font-size="12pt" fo:language="en" fo:country="US" officeooo:rsid="0014b417" officeooo:paragraph-rsid="00229e92" style:font-size-asian="12pt" style:font-size-complex="12pt"/>
    </style:style>
    <style:style style:name="P18" style:family="paragraph" style:parent-style-name="Standard">
      <style:text-properties officeooo:rsid="000edccb" officeooo:paragraph-rsid="000edccb"/>
    </style:style>
    <style:style style:name="P19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1e0814" style:font-size-asian="10pt" style:font-size-complex="10pt"/>
    </style:style>
    <style:style style:name="P20" style:family="paragraph">
      <style:paragraph-properties fo:text-align="center"/>
    </style:style>
    <style:style style:name="T1" style:family="text">
      <style:text-properties fo:language="zxx" fo:country="none" officeooo:rsid="009ecadd" style:language-asian="zxx" style:country-asian="none" style:language-complex="zxx" style:country-complex="none"/>
    </style:style>
    <style:style style:name="T2" style:family="text">
      <style:text-properties fo:language="zxx" fo:country="none" officeooo:rsid="0069844e" style:language-asian="zxx" style:country-asian="none" style:language-complex="zxx" style:country-complex="none"/>
    </style:style>
    <style:style style:name="T3" style:family="text">
      <style:text-properties fo:language="zxx" fo:country="none" officeooo:rsid="00237c07" style:language-asian="zxx" style:country-asian="none" style:language-complex="zxx" style:country-complex="none"/>
    </style:style>
    <style:style style:name="T4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9ecadd" style:font-size-asian="10pt" style:font-size-complex="10pt"/>
    </style:style>
    <style:style style:name="T7" style:family="text">
      <style:text-properties fo:font-size="10pt" officeooo:rsid="00237c07" style:font-size-asian="10pt" style:font-size-complex="10pt"/>
    </style:style>
    <style:style style:name="T8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T9" style:family="text">
      <style:text-properties officeooo:rsid="009ecadd"/>
    </style:style>
    <style:style style:name="T10" style:family="text">
      <style:text-properties officeooo:rsid="001bc37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ed1e6"/>
    </style:style>
    <style:style style:name="T13" style:family="text">
      <style:text-properties officeooo:rsid="0021075f"/>
    </style:style>
    <style:style style:name="T14" style:family="text">
      <style:text-properties fo:language="en" fo:country="US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<text:span text:style-name="T10">t</text:span><text:span text:style-name="T13">y</text:span>: Cobian Backup<draw:frame draw:style-name="fr1" draw:name="Imagen2" text:anchor-type="char" svg:x="13.873cm" svg:y="-0.113cm" svg:width="2.328cm" svg:height="1.588cm" draw:z-index="1"><draw:image xlink:href="Pictures/10000000000000840000005A472D413E5DBA8D5E.png" xlink:type="simple" xlink:show="embed" xlink:actuate="onLoad" draw:mime-type="image/png"/></draw:frame> <text:span text:style-name="T12">11</text:span></text:p>
      <text:p text:style-name="P5"/>
      <text:p text:style-name="P6">Use a virtual machine with W10 Professional 64bits.</text:p>
      <text:p text:style-name="P6">Create a folder on the desktop</text:p>
      <text:p text:style-name="P6">Prepare 4 folders inside the created folder. (Call them: ONE, TWO, THREE, FOUR)</text:p>
      <text:p text:style-name="P6">Prepare 2 text files with content in each folder, call them whatever you want.</text:p>
      <text:p text:style-name="P6">Visualize and observe the "Attributes" Field/Column of the files involved in the practice.</text:p>
      <text:p text:style-name="P6">What information do they have? That means?</text:p>
      <text:p text:style-name="P7"/>
      <text:p text:style-name="P10">Use <text:a xlink:type="simple" xlink:href="https://exactas.uba.ar/uti/wp-content/uploads/2014/10/trabajo_cobian_backup.pdf" text:style-name="Internet_20_link" text:visited-style-name="Visited_20_Internet_20_Link">Sagrario Pedraza</text:a>'s manual to install the Cobian Backup 11 utility.</text:p>
      <text:p text:style-name="P7">Pay attention to the Volume Shadow Copy Check, <text:span text:style-name="T15">uncheck it!</text:span></text:p>
      <text:p text:style-name="P18"><draw:frame draw:style-name="fr1" draw:name="Imagen1" text:anchor-type="char" svg:x="1.198cm" svg:y="0.307cm" svg:width="11.994cm" svg:height="3.558cm" draw:z-index="0"><draw:image xlink:href="Pictures/10000000000002CE000000D5D7B67E28353D3DC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ote that the tasks will run on their own. Let them do it when it's their turn, <text:span text:style-name="T11">don't run them manually.</text:span></text:p>
      <text:p text:style-name="P8"/>
      <text:p text:style-name="P8">Create your first task:</text:p>
      <text:p text:style-name="P8">Schedule an incremental copy every 10 min.</text:p>
      <text:p text:style-name="P8">Indicates that the copy is made from the created folders, and the destination is in a folder within Documents. You can also target another hard drive (if your computer has one)</text:p>
      <text:p text:style-name="P8">Let the program run the first copy. Observe the result.</text:p>
      <text:p text:style-name="P8">In the time between copies, modify some file, add another file.</text:p>
      <text:p text:style-name="P8">See the folders created.</text:p>
      <text:p text:style-name="P8">are there empty folders? do you need how can this be fixed?</text:p>
      <text:p text:style-name="P8"/>
      <text:p text:style-name="P8"/>
      <text:p text:style-name="P11">Create a task with more options.</text:p>
      <text:p text:style-name="P11">Analyze each of the task windows.</text:p>
      <text:p text:style-name="P11">Use the pre-copy (close a program) and post-copy (turn off the computer) execution options.</text:p>
      <text:p text:style-name="P11">Use a filter to not copy video files.</text:p>
      <text:p text:style-name="P11">Use file encryption. (indicate the encryption key)</text:p>
      <text:p text:style-name="P11">When the copy is created, what format do they have? How can they be deciphered?</text:p>
      <text:p text:style-name="P11"/>
      <text:p text:style-name="P14">Learn to observe and interpret logs, which in Cobian are called Diaries</text:p>
      <text:p text:style-name="P14">Configure the application to send the logs to your email account</text:p>
      <text:p text:style-name="P14"/>
      <text:p text:style-name="P14">Open the menu Tools – Options</text:p>
      <text:p text:style-name="P14">Study the “Diary” and “Mail” tabs</text:p>
      <text:p text:style-name="P14">Configure to have the Journal sent to your email.</text:p>
      <text:p text:style-name="P14"/>
      <text:p text:style-name="P14">Set up an incremental copy, which keeps 2 full copies and performs a full one every 2 incrementals.</text:p>
      <text:p text:style-name="P14">Manually run repeated copies to observe how it is creating complete and deleting obsolete copies.</text:p>
      <text:p text:style-name="P12"/>
      <text:p text:style-name="P12"/>
      <text:p text:style-name="P12"/>
      <text:p text:style-name="P12"/>
      <text:p text:style-name="P12"><text:soft-page-break/></text:p>
      <text:p text:style-name="P15">Download the free version of EaseUS backup software</text:p>
      <text:p text:style-name="P3"><text:a xlink:type="simple" xlink:href="https://es.easeus.com/backup-software/todo-backup-free.html" text:style-name="Internet_20_link" text:visited-style-name="Visited_20_Internet_20_Link"><text:span text:style-name="T14">https://es.easeus.com/backup-software/todo-backup-free.html</text:span></text:a></text:p>
      <text:p text:style-name="P9"/>
      <text:p text:style-name="P13">Install, configure and schedule a backup of the previously created folders.</text:p>
      <text:p text:style-name="P13">Let the copy run, and check the results.</text:p>
      <text:p text:style-name="P13">Compare the two products (cobian and easeUS)</text:p>
      <text:p text:style-name="P13"/>
      <text:p text:style-name="P16">Document the entire process in pdf format. </text:p>
      <text:p text:style-name="P16">Sign it with your digital certificate. </text:p>
      <text:p text:style-name="P17">And don't forget to follow the instructions in the Aules document "How to do a <text:span text:style-name="T13">class assignment</text:span>"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1e0814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1e0814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1e0814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language="zxx" fo:country="none" officeooo:rsid="00237c07" style:language-asian="zxx" style:country-asian="none" style:language-complex="zxx" style:country-complex="none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9ecadd" style:font-size-asian="10pt" style:font-size-complex="10pt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693cm" fo:margin-bottom="1.36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26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3"><draw:image xlink:href="Pictures/10000000000002D00000021CADC975B81CFA0241.png" xlink:type="simple" xlink:show="embed" xlink:actuate="onLoad" draw:mime-type="image/png"/></draw:frame><draw:frame draw:style-name="Mfr2" draw:name="Imagen3" text:anchor-type="char" svg:x="-0.295cm" svg:y="-0.381cm" svg:width="1.842cm" svg:height="1.526cm" draw:z-index="7"><draw:image xlink:href="Pictures/100000000000020E000001B4A98736F05B1CE62A.png" xlink:type="simple" xlink:show="embed" xlink:actuate="onLoad" draw:mime-type="image/png"/></draw:frame><text:tab/>IES <text:span text:style-name="MT1">Sant Vicent Ferrer<text:tab/></text:span><text:span text:style-name="MT2">C</text:span><text:span text:style-name="MT3">URS D'ESPECIALITZACIÓ: CETI</text:span></text:p>
        <text:p text:style-name="MP2"><text:span text:style-name="MT4"><text:tab/></text:span><text:span text:style-name="MT5">Parc Salvador Castell, 16<text:tab/></text:span></text:p>
        <text:p text:style-name="MP3"><draw:line text:anchor-type="paragraph" draw:z-index="5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CYBERSECURITY INCID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2.2$Windows_X86_64 LibreOffice_project/53bb9681a964705cf672590721dbc85eb4d0c3a2</meta:generator>
    <dc:date>2023-10-13T15:49:08.447000000</dc:date>
    <meta:editing-duration>PT1H29M37S</meta:editing-duration>
    <meta:editing-cycles>23</meta:editing-cycles>
    <meta:document-statistic meta:table-count="0" meta:image-count="4" meta:object-count="0" meta:page-count="2" meta:paragraph-count="41" meta:word-count="399" meta:character-count="2406" meta:non-whitespace-character-count="2041"/>
  </office:meta>
</office:document-meta>
</file>