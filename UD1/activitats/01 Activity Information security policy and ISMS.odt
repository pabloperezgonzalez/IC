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E0000013065F56EDA.png" manifest:media-type="image/png"/>
  <manifest:file-entry manifest:full-path="Pictures/10000000000002D00000021C9B1E6A4E.png" manifest:media-type="image/png"/>
  <manifest:file-entry manifest:full-path="Pictures/100000000000020E000001B4494AA7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en" fo:country="GB" officeooo:paragraph-rsid="0039b482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6pt" fo:language="en" fo:country="GB" fo:font-weight="bold" officeooo:rsid="00476c89" officeooo:paragraph-rsid="00476c89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da540" style:font-size-asian="12pt" style:font-weight-asian="normal" style:font-size-complex="12pt"/>
    </style:style>
    <style:style style:name="P5" style:family="paragraph" style:parent-style-name="Standard">
      <style:text-properties officeooo:paragraph-rsid="003da540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76c89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57eb4" style:font-size-asian="12pt" style:font-weight-asian="normal" style:font-size-complex="12pt"/>
    </style:style>
    <style:style style:name="P8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eb7be" style:font-size-asian="12pt" style:font-weight-asian="normal" style:font-size-complex="12pt"/>
    </style:style>
    <style:style style:name="P9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fa048" style:font-size-asian="12pt" style:font-weight-asian="normal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size="16pt" fo:font-weight="bold" officeooo:rsid="000304ea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188a7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e4122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n" fo:country="GB" fo:font-style="normal" style:text-underline-style="none" fo:font-weight="normal" officeooo:rsid="00476c89" style:text-blinking="false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Calibri" fo:letter-spacing="normal" fo:language="en" fo:country="GB" fo:font-style="normal" fo:font-weight="normal" officeooo:rsid="00476c89" style:text-blinking="false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style:font-name="Calibri" fo:letter-spacing="normal" fo:language="en" fo:country="GB" fo:font-style="normal" fo:font-weight="normal" officeooo:rsid="00557eb4" style:text-blinking="false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s" fo:country="ES" fo:font-style="normal" style:text-underline-style="none" fo:font-weight="normal" officeooo:rsid="003d30c7" style:text-blinking="false" fo:background-color="#fffff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/text:p>
      <text:p text:style-name="P2">Information security policy and ISMS</text:p>
      <text:p text:style-name="P3"><draw:frame draw:style-name="fr1" draw:name="Imagen2" text:anchor-type="char" svg:x="11.075cm" svg:y="0.266cm" svg:width="5.057cm" svg:height="3.713cm" draw:z-index="3"><draw:image xlink:href="Pictures/100000000000019E0000013065F56EDA.png" xlink:type="simple" xlink:show="embed" xlink:actuate="onLoad" draw:mime-type="image/png"/></draw:frame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5"><text:span text:style-name="Strong_20_Emphasis"><text:span text:style-name="T5">Visit the website</text:span></text:span></text:p>
      <text:p text:style-name="P6"><text:a xlink:type="simple" xlink:href="https://blog.hackmetrix.com/politica-del-sgsi/" text:style-name="Internet_20_link" text:visited-style-name="Visited_20_Internet_20_Link"><text:span text:style-name="Strong_20_Emphasis"><text:span text:style-name="T6">https://blog.hackmetrix.com/politica-del-sgsi/</text:span></text:span></text:a></text:p>
      <text:p text:style-name="P6"><text:span text:style-name="Strong_20_Emphasis"><text:span text:style-name="T6"/></text:span></text:p>
      <text:p text:style-name="P6"><text:span text:style-name="Strong_20_Emphasis"><text:span text:style-name="T6">Download the template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Prepare an information security policy document for a company for which you will invent a name</text:span></text:span></text:p>
      <text:p text:style-name="P7"><text:span text:style-name="Strong_20_Emphasis"><text:span text:style-name="T7">(You must invent more stuffs for fill the template).</text:span></text:span></text:p>
      <text:p text:style-name="P7"><text:span text:style-name="Strong_20_Emphasis"><text:span text:style-name="T7">Take care of the presentation. Improve it. <text:line-break/> <text:line-break/></text:span></text:span><text:span text:style-name="Strong_20_Emphasis"><text:span text:style-name="T6">Deliver the final result in a document in PDF format, with metadata about the work, and signed electronically.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Attach the empty template </text:span></text:span><text:span text:style-name="Strong_20_Emphasis"><text:span text:style-name="T7">too. (in the original format)</text:span></text:span></text:p>
      <text:p text:style-name="P6"><text:span text:style-name="Strong_20_Emphasis"><text:span text:style-name="T6"/></text:span></text:p>
      <text:p text:style-name="P7"><text:span text:style-name="Strong_20_Emphasis"><text:span text:style-name="T7">Look for more templates in the Internet.</text:span></text:span></text:p>
      <text:p text:style-name="P7"><text:span text:style-name="Strong_20_Emphasis"><text:span text:style-name="T7">Attach a document with three or four links to templates of IS policy document that you consider the bests.</text:span></text:span></text:p>
      <text:p text:style-name="P6"><text:span text:style-name="Strong_20_Emphasis"><text:span text:style-name="T6"/></text:span></text:p>
      <text:p text:style-name="P8"><text:span text:style-name="Strong_20_Emphasis"><text:span text:style-name="T8"/></text:span></text:p>
      <text:p text:style-name="P8"><text:span text:style-name="Strong_20_Emphasis"/></text:p>
      <text:p text:style-name="P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e4122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e4122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5070af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5070af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8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0"><draw:image xlink:href="Pictures/10000000000002D00000021C9B1E6A4E.png" xlink:type="simple" xlink:show="embed" xlink:actuate="onLoad" draw:mime-type="image/png"/></draw:frame><draw:frame draw:style-name="Mfr2" draw:name="Imagen3" text:anchor-type="char" svg:x="-0.295cm" svg:y="-0.381cm" svg:width="1.842cm" svg:height="1.526cm" draw:z-index="2"><draw:image xlink:href="Pictures/100000000000020E000001B4494AA734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Ó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1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CY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1:48:44.715000000</meta:creation-date>
    <meta:generator>LibreOffice/24.8.2.1$Windows_X86_64 LibreOffice_project/0f794b6e29741098670a3b95d60478a65d05ef13</meta:generator>
    <meta:editing-duration>PT1H11M25S</meta:editing-duration>
    <meta:editing-cycles>16</meta:editing-cycles>
    <meta:keyword>Política Plan Auditoria</meta:keyword>
    <dc:subject>Compromiso y Cultura de la Ciberseguridad</dc:subject>
    <dc:title>Documentos de Ciberseguridad</dc:title>
    <dc:date>2024-10-28T19:35:18.522000000</dc:date>
    <meta:print-date>2024-10-28T19:34:48.354000000</meta:print-date>
    <meta:printed-by>Archivos PDF</meta:printed-by>
    <meta:document-statistic meta:table-count="0" meta:image-count="3" meta:object-count="0" meta:page-count="1" meta:paragraph-count="14" meta:word-count="114" meta:character-count="759" meta:non-whitespace-character-count="650"/>
  </office:meta>
</office:document-meta>
</file>