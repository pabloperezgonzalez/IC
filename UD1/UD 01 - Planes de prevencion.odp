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1B4A98736F05B1CE62A.png" manifest:media-type="image/png"/>
  <manifest:file-entry manifest:full-path="Pictures/100000000000018F0000016A59751F98A08C1AEA.png" manifest:media-type="image/png"/>
  <manifest:file-entry manifest:full-path="Pictures/10000001000000580000001F092341A529859909.png" manifest:media-type="image/png"/>
  <manifest:file-entry manifest:full-path="Pictures/10000000000002BA00000118FC950DAD8453E10C.png" manifest:media-type="image/png"/>
  <manifest:file-entry manifest:full-path="Pictures/10000000000001F400000151CF4E01E101E0F9E7.png" manifest:media-type="image/png"/>
  <manifest:file-entry manifest:full-path="Pictures/10000000000002DF000002076D33D80A6BFDC497.png" manifest:media-type="image/png"/>
  <manifest:file-entry manifest:full-path="Pictures/10000000000002B20000004F37F5A79738337E51.png" manifest:media-type="image/png"/>
  <manifest:file-entry manifest:full-path="Pictures/1000000000000229000000E289BAE20633C236C8.png" manifest:media-type="image/png"/>
  <manifest:file-entry manifest:full-path="Pictures/1000000000000152000000B63FCC794D5D02DAD5.png" manifest:media-type="image/png"/>
  <manifest:file-entry manifest:full-path="Pictures/10000000000002B40000004F15099356AAFDDF1B.png" manifest:media-type="image/png"/>
  <manifest:file-entry manifest:full-path="Pictures/10000001000001800000017BD47526378D842885.png" manifest:media-type="image/png"/>
  <manifest:file-entry manifest:full-path="Pictures/10000000000002B500000095A6CA02BDD88709F0.png" manifest:media-type="image/png"/>
  <manifest:file-entry manifest:full-path="Pictures/10000000000001E90000023FDC11C685CDACD6EC.png" manifest:media-type="image/png"/>
  <manifest:file-entry manifest:full-path="Pictures/10000000000001DC000001D6F1E6524F3ADCF76E.png" manifest:media-type="image/png"/>
  <manifest:file-entry manifest:full-path="Pictures/1000000000000305000002FB381ED4AD55C95E65.png" manifest:media-type="image/png"/>
  <manifest:file-entry manifest:full-path="Pictures/100000000000018600000258F5B318E39266F6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09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072cm"/>
      <style:paragraph-properties style:writing-mode="lr-tb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07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P6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.035cm" fo:margin-right="0.014cm" fo:margin-top="0.034cm" fo:margin-bottom="0cm" fo:line-height="100%" fo:text-align="center" fo:text-indent="1.18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.169cm" fo:margin-right="0.155cm" fo:margin-top="0.002cm" fo:margin-bottom="0cm" fo:line-height="100%" fo:text-align="start" fo:text-indent="0cm" style:writing-mode="lr-tb"/>
      <style:text-properties fo:font-size="18pt"/>
    </style:style>
    <style:style style:name="P13" style:family="paragraph">
      <style:paragraph-properties fo:margin-left="0.169cm" fo:margin-right="0.155cm" fo:margin-top="0cm" fo:margin-bottom="0cm" fo:line-height="100%" fo:text-align="center" fo:text-indent="0cm" style:writing-mode="lr-tb"/>
      <style:text-properties fo:font-size="18pt"/>
    </style:style>
    <style:style style:name="P14" style:family="paragraph">
      <loext:graphic-properties draw:fill="none"/>
      <style:paragraph-properties fo:margin-left="0.169cm" fo:margin-right="0.155cm" fo:margin-top="0.034cm" fo:margin-bottom="0cm" fo:line-height="100%" fo:text-align="center" fo:text-indent="0cm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fo:margin-left="0.169cm" fo:margin-right="0.155cm" fo:margin-top="0.034cm" fo:margin-bottom="0cm" fo:text-align="center" fo:text-indent="0cm"/>
    </style:style>
    <style:style style:name="P17" style:family="paragraph">
      <loext:graphic-properties draw:fill="none" draw:fill-color="#ffffff"/>
      <style:paragraph-properties fo:margin-left="0.169cm" fo:margin-right="0.155cm" fo:margin-top="0.034cm" fo:margin-bottom="0cm" fo:text-align="center" fo:text-indent="0cm" style:writing-mode="lr-tb"/>
      <style:text-properties fo:color="#158466" loext:opacity="100%" loext:color-lum-mod="100%" loext:color-lum-off="0%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4000" loext:opacity="100%" loext:color-lum-mod="100%" loext:color-lum-off="0%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.169cm" fo:margin-right="0.155cm" fo:margin-top="0.034cm" fo:margin-bottom="0cm" fo:text-indent="0cm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margin-left="0.169cm" fo:margin-right="0.155cm" fo:margin-top="0.034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.169cm" fo:margin-right="0.155cm" fo:margin-top="0.034cm" fo:margin-bottom="0cm" fo:line-height="100%" fo:text-align="start" fo:text-indent="0cm" style:writing-mode="lr-tb"/>
      <style:text-properties fo:color="#ff4000" loext:opacity="100%" loext:color-lum-mod="100%" loext:color-lum-off="0%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355269" loext:opacity="100%" loext:color-lum-mod="100%" loext:color-lum-off="0%" fo:font-size="12pt" style:text-underline-style="solid" style:text-underline-width="auto" style:text-underline-color="font-color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color="#ff4000" loext:opacity="100%" loext:color-lum-mod="100%" loext:color-lum-off="0%" style:font-name="Calibri2" fo:font-size="26pt" style:font-size-asian="26pt" style:font-size-complex="26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ff4000" loext:opacity="100%" loext:color-lum-mod="100%" loext:color-lum-off="0%" style:font-name="Calibri2" fo:font-size="26pt" style:font-size-asian="26pt" style:font-size-complex="26pt"/>
    </style:style>
    <style:style style:name="P29" style:family="paragraph">
      <loext:graphic-properties draw:fill="none" draw:fill-color="#ffffff"/>
      <style:paragraph-properties style:writing-mode="lr-tb"/>
      <style:text-properties fo:color="#355269" loext:opacity="100%" loext:color-lum-mod="100%" loext:color-lum-off="0%" fo:font-size="12pt" style:text-underline-style="solid" style:text-underline-width="auto" style:text-underline-color="font-colo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bf0041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text-align="end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text-properties fo:font-size="36pt" style:font-size-asian="36pt" style:font-size-complex="36pt"/>
    </style:style>
    <style:style style:name="P3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Calibri2" fo:font-size="36pt" fo:font-weight="bold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loext:color-lum-mod="100%" loext:color-lum-off="0%" style:font-name="Calibri2" fo:font-size="32pt" fo:font-weight="bold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3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9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0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0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02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1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2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3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Calibri1" style:font-size-complex="27.5pt" style:font-style-complex="normal" style:font-weight-complex="normal"/>
    </style:style>
    <style:style style:name="T14" style:family="text">
      <style:text-properties fo:font-variant="normal" fo:text-transform="none" fo:color="#974707" loext:opacity="100%" style:text-line-through-style="none" style:text-line-through-type="none" style:text-position="0% 100%" style:font-name="Calibri1" fo:font-size="28pt" fo:letter-spacing="-0.009cm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5" style:family="text">
      <style:text-properties fo:color="#158466" loext:opacity="100%" style:font-name="Calibri1" fo:font-size="28pt" fo:font-weight="bold" style:font-size-asian="28pt" style:font-weight-asian="bold" style:font-name-complex="Calibri1" style:font-size-complex="28pt" style:font-weight-complex="bold"/>
    </style:style>
    <style:style style:name="T16" style:family="text">
      <style:text-properties fo:color="#ff4000" loext:opacity="100%"/>
    </style:style>
    <style:style style:name="T17" style:family="text">
      <style:text-properties fo:color="#001f5f" loext:opacity="100%" style:font-name="Calibri1" fo:font-size="28pt" fo:font-weight="bold" style:font-size-asian="28pt" style:font-weight-asian="bold" style:font-name-complex="Calibri1" style:font-size-complex="28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4000" loext:opacity="100%" style:font-name="Calibri1" fo:font-size="28pt" fo:font-weight="bold" style:font-size-asian="28pt" style:font-weight-asian="bold" style:font-name-complex="Calibri1" style:font-size-complex="28pt" style:font-weight-complex="bold"/>
    </style:style>
    <style:style style:name="T20" style:family="text">
      <style:text-properties fo:color="#355269" loext:opacity="100%" fo:font-size="12pt" style:text-underline-style="solid" style:text-underline-width="auto" style:text-underline-color="font-color" style:font-size-asian="14pt" style:font-size-complex="14pt"/>
    </style:style>
    <style:style style:name="T21" style:family="text">
      <style:text-properties fo:color="#ff4000" loext:opacity="100%" style:font-name="Calibri2" fo:font-size="26pt" style:font-size-asian="26pt" style:font-size-complex="26pt"/>
    </style:style>
    <style:style style:name="T22" style:family="text">
      <style:text-properties fo:color="#c9211e" loext:opacity="100%" style:font-name="Calibri2" fo:font-size="26pt" style:font-size-asian="26pt" style:font-size-complex="26pt"/>
    </style:style>
    <style:style style:name="T23" style:family="text">
      <style:text-properties fo:color="#355269" loext:opacity="100%" fo:font-size="12pt" style:text-underline-style="solid" style:text-underline-width="auto" style:text-underline-color="font-color"/>
    </style:style>
    <style:style style:name="T24" style:family="text">
      <style:text-properties fo:font-variant="normal" fo:text-transform="none" fo:color="#158466" loext:opacity="100%" style:text-line-through-style="none" style:text-line-through-type="none" style:text-position="0% 100%" style:font-name="Calibri1" fo:font-size="2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25" style:family="text">
      <style:text-properties fo:color="#bf0041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8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#ffff00" style:font-size-asian="28pt" style:font-style-asian="normal" style:font-weight-asian="bold" style:font-name-complex="Calibri1" style:font-size-complex="28pt" style:font-style-complex="normal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color="#c9211e" loext:opacity="100%" style:font-name="Calibri2" fo:font-size="36pt" fo:font-weight="bold" style:font-size-asian="36pt" style:font-size-complex="36pt"/>
    </style:style>
    <style:style style:name="T31" style:family="text">
      <style:text-properties fo:color="#158466" loext:opacity="100%" style:font-name="Calibri2" fo:font-size="32pt" fo:font-weight="bold" style:font-size-asian="32pt" style:font-size-complex="32pt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6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1f5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1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053cm" svg:y="0.362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6" draw:layer="layout" svg:width="3.67cm" svg:height="1.73cm" svg:x="20.959cm" svg:y="0.362cm">
          <text:p text:style-name="P4"><text:span text:style-name="T1">CURS</text:span><text:span text:style-name="T6"> 21</text:span><text:span text:style-name="T7">/22</text:span></text:p>
          <text:p text:style-name="P5"><text:span text:style-name="T7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8" draw:layer="layout" svg:width="19.5cm" svg:height="3.455cm" svg:x="2.5cm" svg:y="3.328cm">
          <text:p text:style-name="P7"><text:span text:style-name="T8">UNITAT</text:span><text:span text:style-name="T9"> </text:span><text:span text:style-name="T10">01</text:span></text:p>
          <text:p text:style-name="P7"><text:span text:style-name="T11">PREVENCIÓ I <text:s/>CONSCIENCIA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1.745cm" svg:height="7.916cm" svg:x="7cm" svg:y="9cm">
          <draw:image xlink:href="Pictures/10000000000001F400000151CF4E01E101E0F9E7.png" xlink:type="simple" xlink:show="embed" xlink:actuate="onLoad" draw:mime-type="image/png">
            <text:p/>
          </draw:image>
        </draw:frame>
        <draw:frame draw:style-name="gr4" draw:text-style-name="P9" draw:layer="layout" svg:width="2.085cm" svg:height="1.728cm" svg:x="0.415cm" svg:y="0.362cm">
          <draw:image xlink:href="Pictures/100000000000020E000001B4A98736F05B1CE6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4" draw:style-name="gr6" draw:text-style-name="P14" draw:layer="layout" svg:width="21.5cm" svg:height="9.632cm" svg:x="2cm" svg:y="4.744cm">
          <text:list text:style-name="L3">
            <text:list-item>
              <text:p text:style-name="P11"><text:span text:style-name="T12">Principis generals en matèria de ciberseguretat</text:span></text:p>
            </text:list-item>
            <text:list-item>
              <text:p text:style-name="P11"><text:span text:style-name="T12">Normativa de protecció del lloc de treball</text:span></text:p>
            </text:list-item>
            <text:list-item>
              <text:p text:style-name="P11"><text:span text:style-name="T12">Pla de formació i conscienciació en MC</text:span></text:p>
            </text:list-item>
            <text:list-item>
              <text:p text:style-name="P11"><text:span text:style-name="T12">Materials de formació i conscienciació</text:span></text:p>
            </text:list-item>
            <text:list-item>
              <text:p text:style-name="P11"><text:span text:style-name="T12">Auditories internes de compliment en matèria de prevenció</text:span></text:p>
            </text:list-item>
          </text:list>
          <text:p text:style-name="P12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office:forms form:automatic-focus="false" form:apply-design-mode="false"/>
        <draw:custom-shape draw:name="object 1" draw:style-name="gr7" draw:text-style-name="P15" draw:layer="layout" svg:width="21.5cm" svg:height="1.22cm" svg:x="2cm" svg:y="3.28cm">
          <text:p text:style-name="P11"><text:span text:style-name="T12">Principis generals en matèria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cm" svg:height="3.28cm" svg:x="2cm" svg:y="6cm">
          <draw:text-box>
            <text:p text:style-name="P16"><text:span text:style-name="T15">Confidencialitat</text:span></text:p>
            <text:p text:style-name="P16"><text:span text:style-name="T15">Integritat</text:span></text:p>
            <text:p text:style-name="P16"><text:span text:style-name="T15">Disponibilitat</text:span></text:p>
          </draw:text-box>
        </draw:frame>
        <draw:frame draw:style-name="gr4" draw:text-style-name="P9" draw:layer="layout" svg:width="7.037cm" svg:height="6.384cm" svg:x="14cm" svg:y="5cm">
          <draw:image xlink:href="Pictures/100000000000018F0000016A59751F98A08C1AEA.png" xlink:type="simple" xlink:show="embed" xlink:actuate="onLoad" draw:mime-type="image/png">
            <text:p/>
          </draw:image>
        </draw:frame>
        <draw:frame draw:style-name="gr9" draw:text-style-name="P19" draw:layer="layout" svg:width="9.5cm" svg:height="1.673cm" svg:x="2cm" svg:y="13.5cm">
          <draw:text-box>
            <text:p text:style-name="P18"><text:span text:style-name="T16">Seguretat de la informació</text:span></text:p>
            <text:p text:style-name="P18"><text:span text:style-name="T16">Seguretat informàtica</text:span></text:p>
          </draw:text-box>
        </draw:frame>
        <draw:frame draw:style-name="gr4" draw:text-style-name="P9" draw:layer="layout" svg:width="7cm" svg:height="4.943cm" svg:x="14cm" svg:y="12.057cm">
          <draw:image xlink:href="Pictures/10000000000002DF000002076D33D80A6BFDC49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1">
        <office:forms form:automatic-focus="false" form:apply-design-mode="false"/>
        <draw:custom-shape draw:name="object 2" draw:style-name="gr10" draw:text-style-name="P15" draw:layer="layout" svg:width="21.5cm" svg:height="2.405cm" svg:x="2cm" svg:y="3.28cm">
          <text:p text:style-name="P11"><text:span text:style-name="T12">Bones pràctiques per aconseguir els Principis generals en matèria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0.5cm" svg:height="6.343cm" svg:x="3cm" svg:y="7cm">
          <draw:text-box>
            <text:p text:style-name="P16"><text:span text:style-name="T15">Política de control d’accés tancat per defecte</text:span></text:p>
            <text:p text:style-name="P16"><text:span text:style-name="T15">Política de mínims privilegis</text:span></text:p>
            <text:p text:style-name="P16"><text:span text:style-name="T15">Segregació de funcions</text:span></text:p>
            <text:p text:style-name="P16"><text:span text:style-name="T15">Defensa en profunditat</text:span></text:p>
            <text:p text:style-name="P16"><text:span text:style-name="T15">Formació en ciberseguretat</text:span></text:p>
            <text:p text:style-name="P16"><text:span text:style-name="T15">Auditories de ciberseguretat</text:span></text:p>
          </draw:text-box>
        </draw:frame>
        <draw:frame draw:style-name="gr9" draw:text-style-name="P20" draw:layer="layout" svg:width="19cm" svg:height="1.673cm" svg:x="2cm" svg:y="14.5cm">
          <draw:text-box>
            <text:p>Comencem a vore que necessitarem la col·laboració d’estaments superiors.....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office:forms form:automatic-focus="false" form:apply-design-mode="false"/>
        <draw:custom-shape draw:name="object 3" draw:style-name="gr12" draw:text-style-name="P15" draw:layer="layout" svg:width="21.5cm" svg:height="1.22cm" svg:x="2cm" svg:y="3.28cm">
          <text:p text:style-name="P11"><text:span text:style-name="T12">Govern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4.5cm" svg:height="5.322cm" svg:x="5.5cm" svg:y="6cm">
          <draw:text-box>
            <text:p text:style-name="P21"><text:span text:style-name="T17">IS</text:span></text:p>
            <text:p text:style-name="P16"><text:span text:style-name="T15">CEO</text:span></text:p>
            <text:p text:style-name="P16"><text:span text:style-name="T15">CSO</text:span></text:p>
            <text:p text:style-name="P16"><text:span text:style-name="T15">CISO</text:span></text:p>
            <text:p text:style-name="P16"><text:span text:style-name="T15">Tècnic</text:span></text:p>
          </draw:text-box>
        </draw:frame>
        <draw:frame draw:style-name="gr9" draw:text-style-name="P23" draw:layer="layout" svg:width="19cm" svg:height="1.673cm" svg:x="2cm" svg:y="14.5cm">
          <draw:text-box>
            <text:list text:style-name="L6">
              <text:list-item>
                <text:p text:style-name="P22"><text:span text:style-name="T18">IS necessitarà la col·laboració d’estaments superiors...</text:span></text:p>
              </text:list-item>
            </text:list>
          </draw:text-box>
        </draw:frame>
        <draw:frame draw:style-name="gr14" draw:text-style-name="P25" draw:layer="layout" svg:width="4cm" svg:height="5.322cm" svg:x="15cm" svg:y="6.178cm">
          <draw:text-box>
            <text:p text:style-name="P24"><text:span text:style-name="T17">IT</text:span></text:p>
            <text:p text:style-name="P16"><text:span text:style-name="T19">CEO</text:span></text:p>
            <text:p text:style-name="P16"><text:span text:style-name="T19">CIO</text:span></text:p>
            <text:p text:style-name="P16"><text:span text:style-name="T19">CTO</text:span></text:p>
            <text:p text:style-name="P16"><text:span text:style-name="T19">Tècnic</text:span></text:p>
          </draw:text-box>
        </draw:frame>
        <draw:frame draw:style-name="gr15" draw:text-style-name="P26" draw:layer="layout" svg:width="19.5cm" svg:height="1cm" svg:x="3cm" svg:y="12cm">
          <draw:text-box>
            <text:p text:style-name="P18"><text:span text:style-name="T20"><text:a xlink:href="https://www.incibe.es/protege-tu-empresa/blog/ceo-ciso-cio-roles-ciberseguridad" xlink:type="simple">https://www.incibe.es/protege-tu-empresa/blog/ceo-ciso-cio-roles-ciberseguridad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19" draw:style-name="gr16" draw:text-style-name="P15" draw:layer="layout" svg:width="21.5cm" svg:height="1.22cm" svg:x="2cm" svg:y="3.28cm">
          <text:p text:style-name="P11"><text:span text:style-name="T12">Compromí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19.5cm" svg:height="2.259cm" svg:x="2.5cm" svg:y="6.199cm">
          <draw:text-box>
            <text:p text:style-name="P16"><text:span text:style-name="T15">Organització <text:s/>&lt;---&gt; <text:s/>Ciberseguretat</text:span></text:p>
            <text:p text:style-name="P16"><text:span text:style-name="T15"/></text:p>
          </draw:text-box>
        </draw:frame>
        <draw:frame draw:style-name="gr4" draw:text-style-name="P9" draw:layer="layout" svg:width="9.461cm" svg:height="5.093cm" svg:x="7cm" svg:y="8cm">
          <draw:image xlink:href="Pictures/1000000000000152000000B63FCC794D5D02DAD5.png" xlink:type="simple" xlink:show="embed" xlink:actuate="onLoad" draw:mime-type="image/png">
            <text:p/>
          </draw:image>
        </draw:frame>
        <draw:frame draw:style-name="gr18" draw:text-style-name="P27" draw:layer="layout" svg:width="21.5cm" svg:height="1.589cm" svg:x="2cm" svg:y="14.911cm">
          <draw:text-box>
            <text:p><text:span text:style-name="T21"><text:s/></text:span><text:span text:style-name="T21">--- Transmetre a l’organització aquest compromís ---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custom-shape draw:name="object 24" draw:style-name="gr19" draw:text-style-name="P15" draw:layer="layout" svg:width="21.5cm" svg:height="1.22cm" svg:x="2cm" svg:y="3.28cm">
          <text:p text:style-name="P11"><text:span text:style-name="T12">Cultura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draw:layer="layout" svg:width="19.5cm" svg:height="1.259cm" svg:x="2.5cm" svg:y="5.241cm">
          <draw:text-box>
            <text:p text:style-name="P16"><text:span text:style-name="T15">Organització <text:s/>&lt;---&gt; <text:s/>Organigrama</text:span></text:p>
          </draw:text-box>
        </draw:frame>
        <draw:frame draw:style-name="gr21" draw:text-style-name="P28" draw:layer="layout" svg:width="21.5cm" svg:height="2.089cm" svg:x="2cm" svg:y="14.911cm">
          <draw:text-box>
            <text:p text:style-name="P18"><text:span text:style-name="T21"><text:s/></text:span><text:span text:style-name="T21">--- Transmetre a l’organització aquest compromís ---</text:span></text:p>
            <text:p text:style-name="P18"><text:span text:style-name="T22">Tots els nivells !!</text:span></text:p>
          </draw:text-box>
        </draw:frame>
        <draw:frame draw:style-name="gr4" draw:text-style-name="P9" draw:layer="layout" svg:width="12.311cm" svg:height="4.938cm" svg:x="6.5cm" svg:y="8cm">
          <draw:image xlink:href="Pictures/10000000000002BA00000118FC950DAD8453E10C.png" xlink:type="simple" xlink:show="embed" xlink:actuate="onLoad" draw:mime-type="image/png">
            <text:p/>
          </draw:image>
        </draw:frame>
        <draw:frame draw:style-name="gr22" draw:text-style-name="P29" draw:layer="layout" svg:width="18.5cm" svg:height="0.725cm" svg:x="4cm" svg:y="13.5cm">
          <draw:text-box>
            <text:p><text:span text:style-name="T23"><text:a xlink:href="https://www.incibe.es/protege-tu-empresa/que-te-interesa/desarrollar-cultura-en-seguridad" xlink:type="simple">https://www.incibe.es/protege-tu-empresa/que-te-interesa/desarrollar-cultura-en-seguridad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custom-shape draw:name="object 25" draw:style-name="gr23" draw:text-style-name="P15" draw:layer="layout" svg:width="21.5cm" svg:height="1.22cm" svg:x="2cm" svg:y="3.28cm">
          <text:p text:style-name="P11"><text:span text:style-name="T12">Cultura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7" draw:layer="layout" svg:width="19.5cm" svg:height="1.259cm" svg:x="2.5cm" svg:y="5.241cm">
          <draw:text-box>
            <text:p text:style-name="P16"><text:span text:style-name="T15">Estàndar Internacional. Certificació</text:span></text:p>
          </draw:text-box>
        </draw:frame>
        <draw:frame draw:style-name="gr21" draw:text-style-name="P28" draw:layer="layout" svg:width="21.5cm" svg:height="2.089cm" svg:x="2cm" svg:y="14.911cm">
          <draw:text-box>
            <text:p text:style-name="P18"><text:span text:style-name="T21"><text:s/></text:span><text:span text:style-name="T21">--- Transmetre a l’organització aquest compromís ---</text:span></text:p>
            <text:p text:style-name="P18"><text:span text:style-name="T22">Tots els nivells !!</text:span></text:p>
          </draw:text-box>
        </draw:frame>
        <draw:frame draw:style-name="gr4" draw:text-style-name="P9" draw:layer="layout" svg:width="13.461cm" svg:height="5.5cm" svg:x="5.039cm" svg:y="7.5cm">
          <draw:image xlink:href="Pictures/1000000000000229000000E289BAE20633C23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office:forms form:automatic-focus="false" form:apply-design-mode="false"/>
        <draw:custom-shape draw:name="object 9" draw:style-name="gr25" draw:text-style-name="P15" draw:layer="layout" svg:width="21.5cm" svg:height="12.191cm" svg:x="2cm" svg:y="4.125cm">
          <text:p text:style-name="P11"><text:span text:style-name="T12">Vulnerabilitat</text:span></text:p>
          <text:p text:style-name="P11"><text:span text:style-name="T12">Amenaça</text:span></text:p>
          <text:p text:style-name="P11"><text:span text:style-name="T12">Atac</text:span></text:p>
          <text:p text:style-name="P11"><text:span text:style-name="T12">Explotació de l’atac</text:span></text:p>
          <text:p text:style-name="P11"><text:span text:style-name="T24">Protecció (activa, passiva)</text:span></text:p>
          <text:p text:style-name="P11"><text:span text:style-name="T24">Protecció (física, lògica)</text:span></text:p>
          <text:p text:style-name="P11"><text:span text:style-name="T24">Polítiques de ciberseguretat</text:span></text:p>
          <text:p text:style-name="P11"><text:span text:style-name="T24">Mecanismes de ciberseguretat</text:span></text:p>
          <text:p text:style-name="P11"><text:span text:style-name="T24">Estàndards de ciberseguretat</text:span></text:p>
          <text:p text:style-name="P1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0" draw:layer="layout" svg:width="11.5cm" svg:height="1.195cm" svg:x="7cm" svg:y="3cm">
          <draw:text-box>
            <text:p text:style-name="P18"><text:span text:style-name="T25">CONCEPT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11">
        <office:forms form:automatic-focus="false" form:apply-design-mode="false"/>
        <draw:custom-shape draw:name="object 13" draw:style-name="gr27" draw:text-style-name="P15" draw:layer="layout" svg:width="21.5cm" svg:height="8.534cm" svg:x="2cm" svg:y="4.125cm">
          <text:p text:style-name="P11"><text:span text:style-name="T12">Nivell de Perillositat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24">Nivell d’Impacte</text:span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0" draw:layer="layout" svg:width="11.5cm" svg:height="1.195cm" svg:x="7cm" svg:y="3cm">
          <draw:text-box>
            <text:p text:style-name="P18"><text:span text:style-name="T25">CONCEPTES</text:span></text:p>
          </draw:text-box>
        </draw:frame>
        <draw:frame draw:style-name="gr4" draw:text-style-name="P9" draw:layer="layout" svg:width="19.03cm" svg:height="2.171cm" svg:x="4.5cm" svg:y="6.329cm">
          <draw:image xlink:href="Pictures/10000000000002B40000004F15099356AAFDDF1B.png" xlink:type="simple" xlink:show="embed" xlink:actuate="onLoad" draw:mime-type="image/png">
            <text:p/>
          </draw:image>
        </draw:frame>
        <draw:frame draw:style-name="gr4" draw:text-style-name="P9" draw:layer="layout" svg:width="20.105cm" svg:height="2.3cm" svg:x="4.395cm" svg:y="12cm">
          <draw:image xlink:href="Pictures/10000000000002B20000004F37F5A79738337E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11">
        <office:forms form:automatic-focus="false" form:apply-design-mode="false"/>
        <draw:custom-shape draw:name="object 10" draw:style-name="gr28" draw:text-style-name="P15" draw:layer="layout" svg:width="21.5cm" svg:height="5.815cm" svg:x="2cm" svg:y="4.125cm">
          <text:p text:style-name="P11"><text:span text:style-name="T26">Elements a protegir:</text:span></text:p>
          <text:list text:style-name="L7">
            <text:list-item>
              <text:p text:style-name="P31"><text:span text:style-name="T27">Software</text:span></text:p>
            </text:list-item>
            <text:list-item>
              <text:p text:style-name="P31"><text:span text:style-name="T27">Hardware </text:span></text:p>
            </text:list-item>
            <text:list-item>
              <text:p text:style-name="P31"><text:span text:style-name="T27">Dades</text:span><text:span text:style-name="T26"> <text:s/>← El més important i difícil de recuperar</text:span></text:p>
            </text:list-item>
            <text:list-item>
              <text:p text:style-name="P31"><text:span text:style-name="T27">Comunicacions</text:span></text:p>
            </text:list-item>
            <text:list-item>
              <text:p text:style-name="P31"><text:span text:style-name="T27">Factor Humà</text:span></text:p>
            </text:list-item>
          </text:list>
          <text:p text:style-name="P1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0" draw:layer="layout" svg:width="11.5cm" svg:height="1.195cm" svg:x="7cm" svg:y="3cm">
          <draw:text-box>
            <text:p text:style-name="P18"><text:span text:style-name="T25">¿Que protegir?</text:span></text:p>
          </draw:text-box>
        </draw:frame>
        <draw:frame draw:name="Google Shape;100;p15" draw:style-name="gr29" draw:text-style-name="P32" draw:layer="layout" svg:width="9cm" svg:height="8.883cm" svg:x="15cm" svg:y="8.117cm">
          <draw:image xlink:href="Pictures/10000001000001800000017BD47526378D842885.png" xlink:type="simple" xlink:show="embed" xlink:actuate="onLoad" draw:mime-type="image/png">
            <text:p/>
          </draw:image>
        </draw:frame>
        <draw:frame draw:style-name="gr9" draw:text-style-name="P20" draw:layer="layout" svg:width="6cm" svg:height="1.673cm" svg:x="9cm" svg:y="14.827cm">
          <draw:text-box>
            <text:p text:style-name="P33">Nivells de profunditat</text:p>
          </draw:text-box>
        </draw:frame>
        <draw:frame draw:style-name="gr4" draw:text-style-name="P9" draw:layer="layout" svg:width="9.5cm" svg:height="2.042cm" svg:x="2.5cm" svg:y="9.5cm">
          <draw:image xlink:href="Pictures/10000000000002B500000095A6CA02BDD88709F0.png" xlink:type="simple" xlink:show="embed" xlink:actuate="onLoad" draw:mime-type="image/png">
            <text:p/>
          </draw:image>
        </draw:frame>
        <draw:frame draw:style-name="gr30" draw:text-style-name="P20" draw:layer="layout" svg:width="9cm" svg:height="4.517cm" svg:x="1cm" svg:y="12.327cm">
          <draw:text-box>
            <text:p><text:a xlink:href="https://www.ccma.cat/324/atac-informatic-greu-a-la-uab-que-afecta-tot-lentorn-virtual-de-la-universitat/noticia/3123248/" xlink:type="simple">atac-informatic-greu-a-la-uab</text:a></text:p>
            <text:p/>
            <text:p><text:a xlink:href="https://www.muyseguridad.net/2021/10/05/caida-de-facebook/" xlink:type="simple">caida-de-facebook</text:a></text:p>
            <text:p/>
            <text:p><text:a xlink:href="https://www.lavanguardia.com/tecnologia/20211016/7794770/roban-35-millones-dolares-clonando-voz-director-inteligencia-artificial-pmv.html" xlink:type="simple">robo 35mill$ deepfake</text:a>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office:forms form:automatic-focus="false" form:apply-design-mode="false"/>
        <draw:custom-shape draw:name="object 20" draw:style-name="gr31" draw:text-style-name="P15" draw:layer="layout" svg:width="21.5cm" svg:height="9.632cm" svg:x="2cm" svg:y="4.744cm">
          <text:list text:style-name="L3">
            <text:list-item>
              <text:p text:style-name="P11"><text:span text:style-name="T12">Principis generals en matèria de ciberseguretat</text:span></text:p>
            </text:list-item>
            <text:list-item>
              <text:p text:style-name="P11"><text:span text:style-name="T28">Normativa de protecció del lloc de treball</text:span></text:p>
            </text:list-item>
            <text:list-item>
              <text:p text:style-name="P11"><text:span text:style-name="T12">Pla de formació i conscienciació en MC</text:span></text:p>
            </text:list-item>
            <text:list-item>
              <text:p text:style-name="P11"><text:span text:style-name="T12">Materials de formació i conscienciació</text:span></text:p>
            </text:list-item>
            <text:list-item>
              <text:p text:style-name="P11"><text:span text:style-name="T12">Auditories internes de compliment en matèria de prevenció</text:span></text:p>
            </text:list-item>
          </text:list>
          <text:p text:style-name="P12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11">
        <office:forms form:automatic-focus="false" form:apply-design-mode="false"/>
        <draw:custom-shape draw:name="object 5" draw:style-name="gr32" draw:text-style-name="P15" draw:layer="layout" svg:width="21.5cm" svg:height="1.22cm" svg:x="2cm" svg:y="3.28cm">
          <text:p text:style-name="P11"><text:span text:style-name="T12">Normativa de protecció del lloc de treb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0" draw:layer="layout" svg:width="21cm" svg:height="2.015cm" svg:x="2cm" svg:y="14.5cm">
          <draw:text-box>
            <text:p><text:span text:style-name="T29"><text:a xlink:href="https://www.incibe.es/protege-tu-empresa/que-te-interesa/proteccion-puesto-trabajo" xlink:type="simple">https://www.incibe.es/protege-tu-empresa/que-te-interesa/proteccion-puesto-trabajo</text:a></text:span></text:p>
            <text:p><text:span text:style-name="T29"/></text:p>
            <text:p><text:span text:style-name="T29"><text:a xlink:href="https://www.incibe.es/extfrontinteco/img/File/empresas/kit_concienciacion/Pildoras_informativas/incibe__presentacin_3__el_puesto_de_trabajo__texto.pdf" xlink:type="simple">incibe.es kit_concienciacion/el_puesto_de_trabajo</text:a></text:span></text:p>
          </draw:text-box>
        </draw:frame>
        <draw:frame draw:style-name="gr34" draw:text-style-name="P20" draw:layer="layout" svg:width="19cm" svg:height="7.361cm" svg:x="2.5cm" svg:y="6cm">
          <draw:text-box>
            <text:list text:style-name="L5">
              <text:list-item>
                <text:p>Destrueix la informació mitjançant mecanismes segurs</text:p>
              </text:list-item>
              <text:list-item>
                <text:p>Mantín la confidencialitat de la informació de la teua empresa</text:p>
              </text:list-item>
              <text:list-item>
                <text:p>No publiques ni compartisques contrasenyes</text:p>
              </text:list-item>
              <text:list-item>
                <text:p>No conserves contrasenyes en llocs visibles</text:p>
              </text:list-item>
              <text:list-item>
                <text:p>Usa contrasenyes robustes</text:p>
              </text:list-item>
              <text:list-item>
                <text:p>Mantingues actualitzat el sistema operatiu i l'antivirus</text:p>
              </text:list-item>
              <text:list-item>
                <text:p>Bloqueja la sessió en absentar-te del lloc de treball</text:p>
              </text:list-item>
              <text:list-item>
                <text:p>Realitza un ús adequat dels dispositius extraïbles</text:p>
              </text:list-item>
              <text:list-item>
                <text:p>No alteres la configuració del teu equip corporatiu</text:p>
              </text:list-item>
              <text:list-item>
                <text:p>Controla l'ús de dispositius d'emmagatzematge personal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1">
        <office:forms form:automatic-focus="false" form:apply-design-mode="false"/>
        <draw:custom-shape draw:name="object 11" draw:style-name="gr35" draw:text-style-name="P15" draw:layer="layout" svg:width="21.5cm" svg:height="2.439cm" svg:x="2cm" svg:y="3.28cm">
          <text:p text:style-name="P11"><text:span text:style-name="T12">Normativa de protecció del lloc de treball</text:span></text:p>
          <text:p text:style-name="P11"><text:span text:style-name="T12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0" draw:layer="layout" svg:width="19cm" svg:height="3.806cm" svg:x="2.5cm" svg:y="8cm">
          <draw:text-box>
            <text:list text:style-name="L5">
              <text:list-item>
                <text:p>Manual de protecció del lloc de treball</text:p>
              </text:list-item>
              <text:list-item>
                <text:p>Manual de bones pràctiques</text:p>
              </text:list-item>
              <text:list-item>
                <text:p>Acord de confidencialitat</text:p>
              </text:list-item>
              <text:list-item>
                <text:p>Recordatoris</text:p>
              </text:list-item>
              <text:list-item>
                <text:p>Formació en matèria de ciberseguretat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11">
        <office:forms form:automatic-focus="false" form:apply-design-mode="false"/>
        <draw:custom-shape draw:name="object 18" draw:style-name="gr37" draw:text-style-name="P15" draw:layer="layout" svg:width="21.5cm" svg:height="1.22cm" svg:x="2cm" svg:y="3.28cm">
          <text:p text:style-name="P11"><text:span text:style-name="T12">Normativa de protecció del lloc de treb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6" draw:layer="layout" svg:width="5.634cm" svg:height="1.522cm" svg:x="8cm" svg:y="5.978cm">
          <draw:text-box>
            <text:list text:style-name="L5">
              <text:list-header>
                <text:p text:style-name="P35"><text:span text:style-name="T30">Insider</text:span></text:p>
              </text:list-header>
            </text:list>
          </draw:text-box>
        </draw:frame>
        <draw:frame draw:style-name="gr4" draw:text-style-name="P9" draw:layer="layout" svg:width="3.402cm" svg:height="4cm" svg:x="19.673cm" svg:y="5.5cm">
          <draw:image xlink:href="Pictures/10000000000001E90000023FDC11C685CDACD6EC.png" xlink:type="simple" xlink:show="embed" xlink:actuate="onLoad" draw:mime-type="image/png">
            <text:p/>
          </draw:image>
        </draw:frame>
        <draw:frame draw:style-name="gr4" draw:text-style-name="P9" draw:layer="layout" svg:width="5.264cm" svg:height="5.198cm" svg:x="13.634cm" svg:y="5cm">
          <draw:image xlink:href="Pictures/10000000000001DC000001D6F1E6524F3ADCF76E.png" xlink:type="simple" xlink:show="embed" xlink:actuate="onLoad" draw:mime-type="image/png">
            <text:p/>
          </draw:image>
        </draw:frame>
        <draw:frame draw:style-name="gr39" draw:text-style-name="P38" draw:layer="layout" svg:width="12cm" svg:height="2.513cm" svg:x="0.5cm" svg:y="14.487cm">
          <draw:text-box>
            <text:p text:style-name="P37"><text:span text:style-name="T31">DLP</text:span></text:p>
            <text:p text:style-name="P37"><text:span text:style-name="T31">Data Loss Prevention</text:span></text:p>
          </draw:text-box>
        </draw:frame>
        <draw:frame draw:style-name="gr4" draw:text-style-name="P9" draw:layer="layout" svg:width="5.563cm" svg:height="5.491cm" svg:x="0.937cm" svg:y="9.009cm">
          <draw:image xlink:href="Pictures/1000000000000305000002FB381ED4AD55C95E65.png" xlink:type="simple" xlink:show="embed" xlink:actuate="onLoad" draw:mime-type="image/png">
            <text:p/>
          </draw:image>
        </draw:frame>
        <draw:frame draw:style-name="gr40" draw:text-style-name="P20" draw:layer="layout" svg:width="9.5cm" svg:height="3.095cm" svg:x="15cm" svg:y="10.198cm">
          <draw:text-box>
            <text:p><text:a xlink:href="https://cadenaser.com/emisora/2021/10/11/ser_malaga/1633958218_550682.html" xlink:type="simple">/2021/10/11/ser_malaga/</text:a></text:p>
            <text:p/>
            <text:p><text:a xlink:href="https://sofecom.com/peor-enemigo-de-la-seguridad-informatica/" xlink:type="simple">peor-enemigo-de-la-seguridad-informatica</text:a></text:p>
            <text:p/>
          </draw:text-box>
        </draw:frame>
        <draw:frame draw:style-name="gr41" draw:text-style-name="P18" draw:layer="layout" svg:width="3.136cm" svg:height="4.825cm" svg:x="11cm" svg:y="9.175cm">
          <draw:image xlink:href="Pictures/100000000000018600000258F5B318E39266F6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11">
        <office:forms form:automatic-focus="false" form:apply-design-mode="false"/>
        <draw:custom-shape draw:name="object 21" draw:style-name="gr42" draw:text-style-name="P15" draw:layer="layout" svg:width="21.5cm" svg:height="9.632cm" svg:x="2cm" svg:y="4.744cm">
          <text:list text:style-name="L3">
            <text:list-item>
              <text:p text:style-name="P11"><text:span text:style-name="T12">Principis generals en matèria de ciberseguretat</text:span></text:p>
            </text:list-item>
            <text:list-item>
              <text:p text:style-name="P11"><text:span text:style-name="T12">Normativa de protecció del lloc de treball</text:span></text:p>
            </text:list-item>
            <text:list-item>
              <text:p text:style-name="P11"><text:span text:style-name="T28">Pla de formació i conscienciació en MC</text:span></text:p>
            </text:list-item>
            <text:list-item>
              <text:p text:style-name="P11"><text:span text:style-name="T12">Materials de formació i conscienciació</text:span></text:p>
            </text:list-item>
            <text:list-item>
              <text:p text:style-name="P11"><text:span text:style-name="T12">Auditories internes de compliment en matèria de prevenció</text:span></text:p>
            </text:list-item>
          </text:list>
          <text:p text:style-name="P12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1T11">
        <office:forms form:automatic-focus="false" form:apply-design-mode="false"/>
        <draw:custom-shape draw:name="object 6" draw:style-name="gr43" draw:text-style-name="P15" draw:layer="layout" svg:width="21.5cm" svg:height="2.405cm" svg:x="2cm" svg:y="3.28cm">
          <text:p text:style-name="P11"><text:span text:style-name="T12">Pla de formació i conscienciació en matèria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0" draw:layer="layout" svg:width="19cm" svg:height="5.939cm" svg:x="2.5cm" svg:y="6cm">
          <draw:text-box>
            <text:list text:style-name="L5">
              <text:list-item>
                <text:p>Establir una política de seguretat de empresa</text:p>
              </text:list-item>
              <text:list-item>
                <text:p>Difondre de manera adequada la política de seguretat</text:p>
              </text:list-item>
              <text:list-item>
                <text:p>Concretar un pla de formació</text:p>
              </text:list-item>
              <text:list-item>
                <text:p>Establir programes de formació específics</text:p>
              </text:list-item>
              <text:list-item>
                <text:p>Decidir una periodicitat de la formació</text:p>
              </text:list-item>
              <text:list-item>
                <text:p>Avaluar el aprenentatge obtingut</text:p>
              </text:list-item>
              <text:list-item>
                <text:p>Promoure una cultura de la seguretat de la informació (<text:span text:style-name="T32">tots els nivells</text:span>)</text:p>
              </text:list-item>
            </text:list>
          </draw:text-box>
        </draw:frame>
        <draw:frame draw:style-name="gr45" draw:text-style-name="P20" draw:layer="layout" svg:width="19.5cm" svg:height="0.962cm" svg:x="2.5cm" svg:y="14.5cm">
          <draw:text-box>
            <text:p><text:a xlink:href="https://www.incibe.es/sites/default/files/contenidos/politicas/documentos/concienciacion-y-formacion.pdf" xlink:type="simple">incibe.es - concienciacion-y-formacion.pdf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11">
        <office:forms form:automatic-focus="false" form:apply-design-mode="false"/>
        <draw:custom-shape draw:name="object 22" draw:style-name="gr46" draw:text-style-name="P15" draw:layer="layout" svg:width="21.5cm" svg:height="9.632cm" svg:x="2cm" svg:y="4.744cm">
          <text:list text:style-name="L3">
            <text:list-item>
              <text:p text:style-name="P11"><text:span text:style-name="T12">Principis generals en matèria de ciberseguretat</text:span></text:p>
            </text:list-item>
            <text:list-item>
              <text:p text:style-name="P11"><text:span text:style-name="T12">Normativa de protecció del lloc de treball</text:span></text:p>
            </text:list-item>
            <text:list-item>
              <text:p text:style-name="P11"><text:span text:style-name="T12">Pla de formació i conscienciació en MC</text:span></text:p>
            </text:list-item>
            <text:list-item>
              <text:p text:style-name="P11"><text:span text:style-name="T28">Materials de formació i conscienciació</text:span></text:p>
            </text:list-item>
            <text:list-item>
              <text:p text:style-name="P11"><text:span text:style-name="T12">Auditories internes de compliment en matèria de prevenció</text:span></text:p>
            </text:list-item>
          </text:list>
          <text:p text:style-name="P12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1T11">
        <office:forms form:automatic-focus="false" form:apply-design-mode="false"/>
        <draw:custom-shape draw:name="object 7" draw:style-name="gr47" draw:text-style-name="P15" draw:layer="layout" svg:width="21.5cm" svg:height="1.22cm" svg:x="2cm" svg:y="3.28cm">
          <text:p text:style-name="P11"><text:span text:style-name="T12">Materials de formació i consciencia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0" draw:layer="layout" svg:width="19cm" svg:height="7.361cm" svg:x="2.5cm" svg:y="6cm">
          <draw:text-box>
            <text:list text:style-name="L5">
              <text:list-item>
                <text:p>Vídeos, píndoles formatives</text:p>
              </text:list-item>
              <text:list-item>
                <text:p>Cartells informatius</text:p>
              </text:list-item>
              <text:list-item>
                <text:p>Cartells avisos</text:p>
              </text:list-item>
              <text:list-item>
                <text:p>Manual de bones pràctiques</text:p>
              </text:list-item>
              <text:list-item>
                <text:p>Xarrades</text:p>
              </text:list-item>
              <text:list-item>
                <text:p>Webinars</text:p>
              </text:list-item>
              <text:list-item>
                <text:p>Cursets (curts)</text:p>
              </text:list-item>
              <text:list-item>
                <text:p>Training</text:p>
              </text:list-item>
              <text:list-item>
                <text:p>Testing ( campanya )</text:p>
              </text:list-item>
              <text:list-item>
                <text:p>Recordatoris del CISO</text:p>
              </text:list-item>
            </text:list>
          </draw:text-box>
        </draw:frame>
        <draw:frame draw:style-name="gr45" draw:text-style-name="P20" draw:layer="layout" svg:width="20cm" svg:height="0.962cm" svg:x="2.5cm" svg:y="15.5cm">
          <draw:text-box>
            <text:p><text:span text:style-name="T29"><text:a xlink:href="https://derechodelared.com/documentacion-y-formacion-en-ciberseguridad/" xlink:type="simple">https://derechodelared.com/documentacion-y-formacion-en-ciberseguridad/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1T11">
        <office:forms form:automatic-focus="false" form:apply-design-mode="false"/>
        <draw:custom-shape draw:name="object 23" draw:style-name="gr48" draw:text-style-name="P15" draw:layer="layout" svg:width="21.5cm" svg:height="9.632cm" svg:x="2cm" svg:y="4.744cm">
          <text:list text:style-name="L3">
            <text:list-item>
              <text:p text:style-name="P11"><text:span text:style-name="T12">Principis generals en matèria de ciberseguretat</text:span></text:p>
            </text:list-item>
            <text:list-item>
              <text:p text:style-name="P11"><text:span text:style-name="T12">Normativa de protecció del lloc de treball</text:span></text:p>
            </text:list-item>
            <text:list-item>
              <text:p text:style-name="P11"><text:span text:style-name="T12">Pla de formació i conscienciació en MC</text:span></text:p>
            </text:list-item>
            <text:list-item>
              <text:p text:style-name="P11"><text:span text:style-name="T12">Materials de formació i conscienciació</text:span></text:p>
            </text:list-item>
            <text:list-item>
              <text:p text:style-name="P11"><text:span text:style-name="T28">Auditories internes de compliment en matèria de prevenció</text:span></text:p>
            </text:list-item>
          </text:list>
          <text:p text:style-name="P12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1T11">
        <office:forms form:automatic-focus="false" form:apply-design-mode="false"/>
        <draw:custom-shape draw:name="object 8" draw:style-name="gr49" draw:text-style-name="P15" draw:layer="layout" svg:width="21.5cm" svg:height="2.405cm" svg:x="2cm" svg:y="3.28cm">
          <text:p text:style-name="P11"><text:span text:style-name="T12">Auditories internes de compliment en matèria de prevenció <text:s/>(d’incid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0" draw:layer="layout" svg:width="23cm" svg:height="11.627cm" svg:x="1.5cm" svg:y="6cm">
          <draw:text-box>
            <text:list text:style-name="L5">
              <text:list-header>
                <text:p><text:span text:style-name="T33"/></text:p>
              </text:list-header>
            </text:list>
            <text:p text:style-name="P39"><text:span text:style-name="T34">Auditoria de seguretat de sistemes informàtics</text:span></text:p>
            <text:p text:style-name="P39"><text:span text:style-name="T34"/></text:p>
            <text:p text:style-name="P39"><text:span text:style-name="T34">Una auditoria de seguretat informàtica comprén l'anàlisi i gestió dels sistemes per a identificar i posteriorment corregir les diverses vulnerabilitats que puguen presentar-se en una revisió exhaustiva de les</text:span></text:p>
            <text:p text:style-name="P39"><text:span text:style-name="T34"/></text:p>
            <text:p text:style-name="P39"><text:span text:style-name="T34">Els resultats es detallen, s'arxiven i reporten als responsables els qui hauran d'establir mesures preventives i de reforç</text:span></text:p>
            <text:p text:style-name="P39"><text:span text:style-name="T34">Els objectius de l'auditoria: Els SI</text:span></text:p>
            <text:p text:style-name="P39"><text:span text:style-name="T35"/></text:p>
            <text:list text:style-name="L8">
              <text:list-item>
                <text:p text:style-name="P39"><text:span text:style-name="T34">Revisar la seguretat dels entorns i sistemes</text:span></text:p>
              </text:list-item>
              <text:list-item>
                <text:p text:style-name="P39"><text:span text:style-name="T34">Verificar el compliment de la normativa i legislació vigents</text:span></text:p>
              </text:list-item>
              <text:list-item>
                <text:p text:style-name="P39"><text:span text:style-name="T34">Elaborar un informe </text:span><text:span text:style-name="T35">independent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1T11">
        <office:forms form:automatic-focus="false" form:apply-design-mode="false"/>
        <draw:custom-shape draw:name="object 12" draw:style-name="gr51" draw:text-style-name="P15" draw:layer="layout" svg:width="21.5cm" svg:height="2.405cm" svg:x="2cm" svg:y="3.28cm">
          <text:p text:style-name="P11"><text:span text:style-name="T12">Auditories internes de compliment en matèria de prevenció (d’incid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0" draw:layer="layout" svg:width="23cm" svg:height="11.627cm" svg:x="1.5cm" svg:y="6cm">
          <draw:text-box>
            <text:list text:style-name="L5">
              <text:list-header>
                <text:p><text:span text:style-name="T33"/></text:p>
              </text:list-header>
            </text:list>
            <text:p text:style-name="P39"><text:span text:style-name="T34">Qualitats d’un auditor</text:span></text:p>
            <text:p text:style-name="P39"><text:span text:style-name="T34"/></text:p>
            <text:list text:continue-numbering="true" text:style-name="L5">
              <text:list-item>
                <text:p text:style-name="P39"><text:span text:style-name="T34">Ser imparcial, sincer i honest.</text:span></text:p>
              </text:list-item>
              <text:list-item>
                <text:p text:style-name="P39"><text:span text:style-name="T34">Ser discret i comprendre el concepte de confidencialitat.</text:span></text:p>
              </text:list-item>
              <text:list-item>
                <text:p text:style-name="P39"><text:span text:style-name="T34">Mantindre la ment oberta per a considerar idees i punts de vista alternatius.</text:span></text:p>
              </text:list-item>
              <text:list-item>
                <text:p text:style-name="P39"><text:span text:style-name="T34">Ser diplomàtic i tindre tacte en el tracte amb les diferents persones.</text:span></text:p>
              </text:list-item>
              <text:list-item>
                <text:p text:style-name="P39"><text:span text:style-name="T34">Ser ferm. ...</text:span></text:p>
              </text:list-item>
              <text:list-item>
                <text:p text:style-name="P39"><text:span text:style-name="T34">Tindre una alta capacitat d'observació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1T11">
        <office:forms form:automatic-focus="false" form:apply-design-mode="false"/>
        <draw:custom-shape draw:name="object 27" draw:style-name="gr52" draw:text-style-name="P15" draw:layer="layout" svg:width="21.5cm" svg:height="2.405cm" svg:x="2cm" svg:y="3.28cm">
          <text:p text:style-name="P11"><text:span text:style-name="T12">Auditories internes de compliment en matèria de prevenció (d’incid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0" draw:layer="layout" svg:width="23cm" svg:height="11.627cm" svg:x="1.5cm" svg:y="6cm">
          <draw:text-box>
            <text:list text:style-name="L5">
              <text:list-header>
                <text:p><text:span text:style-name="T33"/></text:p>
              </text:list-header>
            </text:list>
            <text:p text:style-name="P39"><text:span text:style-name="T34">Tipus d'auditoria</text:span></text:p>
            <text:p text:style-name="P39"><text:span text:style-name="T34"/></text:p>
            <text:list text:continue-numbering="true" text:style-name="L5">
              <text:list-item>
                <text:p text:style-name="P39"><text:span text:style-name="T36">Auditoria de compliment en matèria de prevenció</text:span></text:p>
              </text:list-item>
              <text:list-item>
                <text:p text:style-name="P39"><text:span text:style-name="T35">Auditoria de seguretat interna</text:span><text:span text:style-name="T34">:es contrasta el nivell de seguretat de les xarxes locals i corporatives de caràcter intern.</text:span></text:p>
              </text:list-item>
              <text:list-item>
                <text:p text:style-name="P39"><text:span text:style-name="T35">Auditories de seguretat perimetral</text:span><text:span text:style-name="T34">: s'estudia el perímetre de la xarxa local o corporativa, connectat a xarxes públiques</text:span></text:p>
              </text:list-item>
              <text:list-item>
                <text:p text:style-name="P39"><text:span text:style-name="T35">Test d'intrusió</text:span><text:span text:style-name="T34">:s'intenta accedir als sistemes, per a comprovar el nivell de resistència a la intrusió no desitjada</text:span></text:p>
              </text:list-item>
              <text:list-item>
                <text:p text:style-name="P39"><text:span text:style-name="T35">Anàlisi forense</text:span><text:span text:style-name="T34">: anàlisi posterior d'incidents mitjançant el qual es tracta de reconstruir com s'ha penetrat en el sistema al mateix temps que es valoren els danys ocasionats</text:span></text:p>
              </text:list-item>
              <text:list-item>
                <text:p text:style-name="P39"><text:span text:style-name="T35">Auditoria de codi d'aplicacions</text:span><text:span text:style-name="T34">: comprovar vulnerabilitats com la injecció de codi SQL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1T11">
        <office:forms form:automatic-focus="false" form:apply-design-mode="false"/>
        <draw:custom-shape draw:name="object 26" draw:style-name="gr53" draw:text-style-name="P15" draw:layer="layout" svg:width="21.5cm" svg:height="2.405cm" svg:x="2cm" svg:y="3.28cm">
          <text:p text:style-name="P11"><text:span text:style-name="T12">Auditories internes de compliment en matèria de prevenció (d’incid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0" draw:layer="layout" svg:width="21cm" svg:height="6.65cm" svg:x="2.5cm" svg:y="6cm">
          <draw:text-box>
            <text:list text:style-name="L5">
              <text:list-header>
                <text:p/>
              </text:list-header>
              <text:list-item>
                <text:p>Test de reconocimiento de phishing (<text:span text:style-name="T37"><text:a xlink:href="https://phishingquiz.withgoogle.com/?hl=es" xlink:type="simple">https://phishingquiz.withgoogle.com/?hl=es</text:a></text:span>)</text:p>
              </text:list-item>
              <text:list-item>
                <text:p>Campaña de phising (ético) <text:s/><text:span text:style-name="T38"><text:a xlink:href="https://getgophish.com/" xlink:type="simple">gophish</text:a></text:span></text:p>
              </text:list-item>
              <text:list-item>
                <text:p>Campaña de malware (simulado)</text:p>
              </text:list-item>
              <text:list-item>
                <text:p>Test de cumplimiento de Copias de seguridad</text:p>
              </text:list-item>
              <text:list-item>
                <text:p>Test de cumplimiento de Firewall</text:p>
              </text:list-item>
              <text:list-item>
                <text:p>Revisión de versiones SO y Aplicaciones</text:p>
              </text:list-item>
              <text:list-item>
                <text:p>Etc....</text:p>
                <text:p/>
              </text:list-item>
            </text:list>
          </draw:text-box>
        </draw:frame>
        <draw:frame draw:style-name="gr55" draw:text-style-name="P40" draw:layer="layout" svg:width="22.5cm" svg:height="2.471cm" svg:x="1.5cm" svg:y="15.529cm">
          <draw:text-box>
            <text:p><text:span text:style-name="T38"><text:a xlink:href="https://assets.kpmg/content/dam/kpmg/ar/pdf/2020/auditoria-interna-y-los-riesgos-de-ciberseguridad.pdf" xlink:type="simple">auditoria-interna-y-los-riesgos-de-ciberseguridad.pdf</text:a></text:span></text:p>
            <text:p><text:span text:style-name="T38"><text:a xlink:href="https://ctmaconsultores.com/que-es-una-auditoria-interna-de-ciberseguridad/" xlink:type="simple">https://ctmaconsultores.com/que-es-una-auditoria-interna-de-ciberseguridad/</text:a></text:span></text:p>
            <text:p><text:span text:style-name="T38"><text:a xlink:href="https://www.incibe.es/protege-tu-empresa/catalogo-de-ciberseguridad/listado-empresas/everis" xlink:type="simple">https://www.incibe.es/protege-tu-empresa/catalogo-de-ciberseguridad/listado-empresas/everis</text:a></text:span></text:p>
            <text:p><text:span text:style-name="T38"/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style:rfc-language-tag="ca-ES-valencia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1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1.852cm" fo:min-width="24.204cm" fo:padding-top="0cm" fo:padding-bottom="0cm" fo:padding-left="0cm" fo:padding-right="0cm" fo:wrap-option="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M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1.111cm" fo:min-width="0.861cm"/>
    </style:style>
    <style:style style:name="Mgr12" style:family="graphic" style:parent-style-name="standard">
      <style:graphic-properties draw:stroke="none" draw:fill="none" draw:fill-color="#ffffff" fo:min-height="11.543cm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0.708cm" fo:padding-top="0cm" fo:padding-bottom="0cm" fo:padding-left="0cm" fo:padding-right="0cm" fo:wrap-option="no-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MP9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 style:writing-mode="lr-tb"/>
    </style:style>
    <style:style style:name="MP13" style:family="paragraph">
      <style:paragraph-properties fo:margin-left="0.035cm" fo:margin-right="0cm" fo:margin-top="0cm" fo:margin-bottom="0cm" fo:line-height="0.707cm" fo:text-align="start" fo:text-indent="0cm"/>
    </style:style>
    <style:style style:name="MP14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writing-mode="lr-tb" style:font-independent-line-spacing="false"/>
      <style:text-properties fo:color="#622422" loext:opacity="100%" loext:color-lum-mod="100%" loext:color-lum-off="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center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/>
    </style:style>
    <style:style style:name="MP22" style:family="paragraph">
      <loext:graphic-properties draw:fill-color="#f44336"/>
      <style:paragraph-properties fo:text-align="center"/>
    </style:style>
    <style:style style:name="MP23" style:family="paragraph">
      <style:paragraph-properties fo:text-align="center" style:writing-mode="lr-tb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8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9" style:family="text">
      <style:text-properties fo:color="#622422" loext:opacity="10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T10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custom-shape presentation:style-name="Mpr1" draw:text-style-name="MP5" draw:layer="backgroundobjects" svg:width="25.5cm" svg:height="1.5cm" svg:x="-0.024cm" svg:y="17.584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851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9" draw:layer="backgroundobjects" svg:width="3.67cm" svg:height="1.73cm" svg:x="20.964cm" svg:y="0.524cm">
        <text:p text:style-name="MP7"><text:span text:style-name="MT2">CURS</text:span><text:span text:style-name="MT3"> 21</text:span><text:span text:style-name="MT4">/22</text:span></text:p>
        <text:p text:style-name="MP8"><text:span text:style-name="MT4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2" draw:layer="backgroundobjects" svg:width="12.5cm" svg:height="1.665cm" svg:x="3.5cm" svg:y="0.71cm">
        <draw:text-box>
          <text:p text:style-name="MP10"><text:span text:style-name="MT2">IES</text:span><text:span text:style-name="MT5"> SANT</text:span><text:span text:style-name="MT6"> </text:span><text:span text:style-name="MT5">VICENT FERRER</text:span><text:span text:style-name="MT7"> </text:span><text:span text:style-name="MT2">(ALGEMESÍ)</text:span></text:p>
          <text:p text:style-name="MP11"><text:span text:style-name="MT8">INCIDENTS DE CIBERSEGURETAT</text:span></text:p>
        </draw:text-box>
      </draw:frame>
      <draw:frame draw:name="object 19_0" presentation:style-name="Mpr2" draw:text-style-name="MP14" draw:layer="backgroundobjects" svg:width="11.467cm" svg:height="0.708cm" svg:x="11cm" svg:y="18cm">
        <draw:text-box>
          <text:p text:style-name="MP13"><text:span text:style-name="MT9">UNITAT 01 <text:s text:c="2"/>PLANS DE PREVENCIÓ</text:span></text:p>
        </draw:text-box>
      </draw:frame>
      <draw:frame draw:style-name="Mgr6" draw:text-style-name="MP15" draw:layer="backgroundobjects" svg:width="2.298cm" svg:height="1.905cm" svg:x="0.702cm" svg:y="0.516cm">
        <draw:image xlink:href="Pictures/100000000000020E000001B4A98736F05B1CE62A.png" xlink:type="simple" xlink:show="embed" xlink:actuate="onLoad" draw:mime-type="image/png">
          <text:p/>
        </draw:image>
      </draw:frame>
      <draw:frame draw:style-name="Mgr7" draw:text-style-name="MP15" draw:layer="backgroundobjects" svg:width="1.551cm" svg:height="0.546cm" svg:x="3.449cm" svg:y="18.334cm">
        <draw:image xlink:href="Pictures/10000001000000580000001F092341A529859909.png" xlink:type="simple" xlink:show="embed" xlink:actuate="onLoad" draw:mime-type="image/png">
          <text:p/>
        </draw:image>
      </draw:frame>
      <draw:frame draw:style-name="Mgr8" draw:text-style-name="MP17" draw:layer="backgroundobjects" svg:width="7.728cm" svg:height="0.892cm" svg:x="0.272cm" svg:y="17.608cm">
        <draw:text-box>
          <text:p text:style-name="MP16"><text:span text:style-name="MT10">Aquesta obra de Enrique Iborra està subjecta a una llicència de</text:span><text:span text:style-name="MT10"><text:a xlink:href="http://creativecommons.org/licenses/by-sa/4.0/" xlink:type="simple">Reconeixement-CompartirIgual 4.0 Internacional de Creative Commons</text:a></text:span></text:p>
        </draw:text-box>
      </draw:frame>
      <draw:frame draw:style-name="Mgr7" draw:text-style-name="MP15" draw:layer="backgroundobjects" svg:width="1.551cm" svg:height="0.546cm" svg:x="3.45cm" svg:y="18.334cm">
        <draw:image xlink:href="Pictures/10000001000000580000001F092341A529859909.png" xlink:type="simple" xlink:show="embed" xlink:actuate="onLoad" draw:mime-type="image/png">
          <text:p/>
        </draw:image>
      </draw:frame>
      <draw:frame draw:style-name="Mgr7" draw:text-style-name="MP15" draw:layer="backgroundobjects" svg:width="1.551cm" svg:height="0.546cm" svg:x="3.45cm" svg:y="18.334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9" draw:text-style-name="MP18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0" draw:layer="backgroundobjects" svg:width="8.051cm" svg:height="1.312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draw:custom-shape draw:style-name="Mgr10" draw:text-style-name="MP16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10" draw:text-style-name="MP21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10" draw:text-style-name="MP16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11" draw:text-style-name="MP22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2" draw:text-style-name="MP18" draw:layer="backgroundobjects" svg:width="23.132cm" svg:height="11.793cm" svg:x="0.907cm" svg:y="4.535cm">
        <draw:text-box>
          <text:p/>
        </draw:text-box>
      </draw:frame>
      <draw:custom-shape draw:style-name="Mgr10" draw:text-style-name="MP21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23" draw:layer="backgroundobjects" svg:width="3.175cm" svg:height="1.361cm" svg:x="-0.453cm" svg:y="17.235cm" presentation:class="page-number">
        <draw:text-box>
          <text:p text:style-name="MP23"><text:page-number>&lt;número&gt;</text:page-number></text:p>
        </draw:text-box>
      </draw:frame>
      <draw:frame presentation:style-name="Mpr11" draw:text-style-name="MP24" draw:layer="backgroundobjects" svg:width="16.329cm" svg:height="1.361cm" svg:x="2.267cm" svg:y="17.235cm" presentation:class="footer">
        <draw:text-box>
          <text:p text:style-name="MP23"><presentation:footer/></text:p>
        </draw:text-box>
      </draw:frame>
      <draw:frame presentation:style-name="Mpr10" draw:text-style-name="MP25" draw:layer="backgroundobjects" svg:width="5.896cm" svg:height="1.315cm" svg:x="19.05cm" svg:y="17.235cm" presentation:class="date-time">
        <draw:text-box>
          <text:p text:style-name="MP25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10-23T12:22:15.865000000</meta:creation-date>
    <meta:editing-duration>PT1H20M1S</meta:editing-duration>
    <meta:generator>LibreOffice/7.4.1.2$Windows_X86_64 LibreOffice_project/3c58a8f3a960df8bc8fd77b461821e42c061c5f0</meta:generator>
    <meta:editing-cycles>16</meta:editing-cycles>
    <dc:date>2022-11-04T15:05:11.033000000</dc:date>
    <meta:document-statistic meta:object-count="188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