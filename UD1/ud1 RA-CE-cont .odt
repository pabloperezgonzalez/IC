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F38184D4A4.jpg" manifest:media-type="image/jpeg"/>
  <manifest:file-entry manifest:full-path="Pictures/1000000000000258000001A17BAE893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serrat" svg:font-family="monserrat, sans-serif, sans-serif"/>
  </office:font-face-decls>
  <office:automatic-styles>
    <style:style style:name="Tabla18" style:family="table">
      <style:table-properties style:width="17.586cm" table:align="left" fo:background-color="transparent">
        <style:background-image/>
      </style:table-properties>
    </style:style>
    <style:style style:name="Tabla18.A" style:family="table-column">
      <style:table-column-properties style:column-width="0.794cm"/>
    </style:style>
    <style:style style:name="Tabla18.B" style:family="table-column">
      <style:table-column-properties style:column-width="16.792cm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77bc65" fo:padding="0.097cm" fo:border="0.5pt solid #000000">
        <style:background-image/>
      </style:table-cell-properties>
    </style:style>
    <style:style style:name="Tabla18.A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3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8.A4" style:family="table-cell">
      <style:table-cell-properties fo:padding="0.097cm" fo:border-left="0.5pt solid #000000" fo:border-right="none" fo:border-top="none" fo:border-bottom="0.5pt solid #000000"/>
    </style:style>
    <style:style style:name="Tabla18.B4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>
      <style:table-cell-properties fo:padding="0.097cm" fo:border-left="0.5pt solid #000000" fo:border-right="none" fo:border-top="none" fo:border-bottom="0.5pt solid #000000"/>
    </style:style>
    <style:style style:name="Tabla18.B5" style:family="table-cell">
      <style:table-cell-properties fo:padding="0.097cm" fo:border-left="0.5pt solid #000000" fo:border-right="0.5pt solid #000000" fo:border-top="none" fo:border-bottom="0.5pt solid #000000"/>
    </style:style>
    <style:style style:name="Tabla18.A6" style:family="table-cell">
      <style:table-cell-properties fo:padding="0.097cm" fo:border-left="0.5pt solid #000000" fo:border-right="none" fo:border-top="none" fo:border-bottom="0.5pt solid #000000"/>
    </style:style>
    <style:style style:name="Tabla18.B6" style:family="table-cell">
      <style:table-cell-properties fo:padding="0.097cm" fo:border-left="0.5pt solid #000000" fo:border-right="0.5pt solid #000000" fo:border-top="none" fo:border-bottom="0.5pt solid #000000"/>
    </style:style>
    <style:style style:name="Tabla18.A7" style:family="table-cell">
      <style:table-cell-properties fo:padding="0.097cm" fo:border-left="0.5pt solid #000000" fo:border-right="none" fo:border-top="none" fo:border-bottom="0.5pt solid #000000"/>
    </style:style>
    <style:style style:name="Tabla18.B7" style:family="table-cell">
      <style:table-cell-properties fo:padding="0.097cm" fo:border-left="0.5pt solid #000000" fo:border-right="0.5pt solid #000000" fo:border-top="none" fo:border-bottom="0.5pt solid #000000"/>
    </style:style>
    <style:style style:name="Tabla18.A8" style:family="table-cell">
      <style:table-cell-properties fo:padding="0.097cm" fo:border-left="0.5pt solid #000000" fo:border-right="none" fo:border-top="none" fo:border-bottom="0.5pt solid #000000"/>
    </style:style>
    <style:style style:name="Tabla18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7621c" officeooo:paragraph-rsid="00120bc8" style:font-size-asian="12pt" style:font-weight-asian="normal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/>
      <style:text-properties fo:color="#ffffff" loext:opacity="100%" style:text-line-through-style="none" style:text-line-through-type="none" style:font-name="Arial1" fo:font-size="12pt" fo:language="es" fo:country="ES" style:text-underline-style="none" fo:font-weight="normal" officeooo:rsid="01bb72c9" officeooo:paragraph-rsid="00120bc8" style:font-size-asian="12pt" style:font-weight-asian="normal" style:font-size-complex="12pt"/>
    </style:style>
    <style:style style:name="P3" style:family="paragraph" style:parent-style-name="Pa12" style:master-page-name="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89979" officeooo:paragraph-rsid="00120bc8" style:font-size-asian="12pt" style:font-weight-asian="normal" style:font-size-complex="12pt" loext:shadow="none"/>
    </style:style>
    <style:style style:name="P4" style:family="paragraph" style:parent-style-name="Pa1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db789" officeooo:paragraph-rsid="00120bc8" style:font-size-asian="12pt" style:font-weight-asian="norma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89979" officeooo:paragraph-rsid="00120bc8" style:font-size-asian="12pt" style:font-weight-asian="normal" style:font-size-complex="12pt" loext:shadow="none"/>
    </style:style>
    <style:style style:name="P6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db789" officeooo:paragraph-rsid="00120bc8" style:font-size-asian="12pt" style:font-weight-asian="normal" style:font-size-complex="12pt"/>
    </style:style>
    <style:style style:name="P7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text-line-through-style="none" style:text-line-through-type="none" style:font-name="Arial1" fo:font-size="12pt" fo:language="es" fo:country="ES" style:text-underline-style="none" fo:font-weight="normal" officeooo:rsid="001db789" officeooo:paragraph-rsid="00120bc8" style:font-size-asian="12pt" style:font-weight-asian="normal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2829701" officeooo:paragraph-rsid="00120bc8" style:font-size-asian="12pt" style:font-weight-asian="normal" style:font-size-complex="12pt"/>
    </style:style>
    <style:style style:name="P9" style:family="paragraph" style:parent-style-name="Pa20">
      <style:paragraph-properties fo:margin-top="0cm" fo:margin-bottom="0cm" style:contextual-spacing="false" fo:line-height="100%" fo:text-align="justify" style:justify-single-word="false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120bc8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Pa18" style:list-style-name="L1" style:master-page-name="">
      <loext:graphic-properties draw:fill="none"/>
      <style:paragraph-properties fo:line-height="100%" fo:text-align="justify" style:justify-single-word="false" style:page-number="auto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120bc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Pa18" style:list-style-name="L1">
      <loext:graphic-properties draw:fill="none"/>
      <style:paragraph-properties fo:line-height="100%" fo:text-align="justify" style:justify-single-word="false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120bc8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Pa18" style:list-style-name="L1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120bc8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Pa20">
      <style:paragraph-properties fo:line-height="100%" fo:text-align="justify" style:justify-single-word="false"/>
      <style:text-properties style:font-name="Calibri" fo:font-size="10pt" fo:language="es" fo:country="ES" officeooo:paragraph-rsid="003b914b" style:font-size-asian="10pt" style:font-size-complex="10pt"/>
    </style:style>
    <style:style style:name="P14" style:family="paragraph" style:parent-style-name="Standard" style:list-style-name="L2">
      <style:paragraph-properties fo:line-height="100%" fo:text-align="justify" style:justify-single-word="false"/>
      <style:text-properties style:font-name="Calibri" fo:font-size="10pt" fo:language="es" fo:country="ES" officeooo:paragraph-rsid="003b914b" style:font-size-asian="10pt" style:font-size-complex="10pt"/>
    </style:style>
    <style:style style:name="P15" style:family="paragraph" style:parent-style-name="Pa18" style:list-style-name="L2">
      <style:paragraph-properties fo:line-height="100%" fo:text-align="justify" style:justify-single-word="false"/>
      <style:text-properties style:font-name="Calibri" fo:font-size="10pt" fo:language="es" fo:country="ES" officeooo:paragraph-rsid="003b914b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style:shadow="none"/>
      <style:text-properties style:font-name="Calibri" fo:font-size="10pt" officeooo:paragraph-rsid="003b914b" style:font-size-asian="10pt" style:font-size-complex="10pt"/>
    </style:style>
    <style:style style:name="P17" style:family="paragraph" style:parent-style-name="Pa18" style:list-style-name="L3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18" style:family="paragraph" style:parent-style-name="Pa18" style:list-style-name="L3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19" style:family="paragraph" style:parent-style-name="Pa18" style:list-style-name="L3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0" style:family="paragraph" style:parent-style-name="Pa20">
      <style:paragraph-properties fo:line-height="100%" fo:text-align="justify" style:justify-single-word="fals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1" style:family="paragraph" style:parent-style-name="Pa18" style:list-style-name="L4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2" style:family="paragraph" style:parent-style-name="Pa18" style:list-style-name="L4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3" style:family="paragraph" style:parent-style-name="Pa18" style:list-style-name="L4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4" style:family="paragraph" style:parent-style-name="Pa20" style:master-page-name="">
      <style:paragraph-properties fo:line-height="100%" fo:text-align="justify" style:justify-single-word="false" style:page-number="auto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5" style:family="paragraph" style:parent-style-name="Pa18" style:list-style-name="L5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6" style:family="paragraph" style:parent-style-name="Pa18" style:list-style-name="L5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7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3b914b" style:font-size-asian="10pt" style:font-style-asian="normal" style:font-weight-asian="normal" style:font-size-complex="10pt" style:font-style-complex="normal"/>
    </style:style>
    <style:style style:name="P28" style:family="paragraph" style:parent-style-name="Standard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5ed1a" officeooo:paragraph-rsid="003b914b" style:font-size-asian="12pt" style:font-style-asian="normal" style:font-weight-asian="normal" style:font-size-complex="12pt" style:font-style-complex="normal"/>
    </style:style>
    <style:style style:name="P29" style:family="paragraph" style:parent-style-name="Standard">
      <style:text-properties officeooo:rsid="00350465" officeooo:paragraph-rsid="00386edc"/>
    </style:style>
    <style:style style:name="P30" style:family="paragraph" style:parent-style-name="Standard">
      <style:text-properties officeooo:rsid="00157945" officeooo:paragraph-rsid="00386edc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12a49b9" officeooo:paragraph-rsid="00120bc8" style:font-size-asian="12pt" style:font-weight-asian="normal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37dc2" officeooo:paragraph-rsid="00137dc2" style:font-size-asian="12pt" style:font-weight-asian="normal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4c025" officeooo:paragraph-rsid="0034c025" style:font-size-asian="12pt" style:font-weight-asian="normal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60ee0" officeooo:paragraph-rsid="00160ee0" style:font-size-asian="12pt" style:font-weight-asian="normal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fde48" officeooo:paragraph-rsid="003fde48" style:font-size-asian="12pt" style:font-weight-asian="normal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60ee0" officeooo:paragraph-rsid="003fde48" style:font-size-asian="12pt" style:font-weight-asian="normal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3090b" officeooo:paragraph-rsid="0023090b" style:font-size-asian="12pt" style:font-weight-asian="normal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0pt" fo:language="es" fo:country="ES" style:text-underline-style="none" fo:font-weight="normal" officeooo:rsid="00160ee0" officeooo:paragraph-rsid="00160ee0" style:font-size-asian="10pt" style:font-weight-asian="normal" style:font-size-complex="10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160ee0" officeooo:paragraph-rsid="002911cb" style:font-size-asian="12pt" style:font-weight-asian="normal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bold" officeooo:rsid="002af062" officeooo:paragraph-rsid="002af062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bfa10" officeooo:paragraph-rsid="002bfa10" style:font-size-asian="12pt" style:font-weight-asian="normal" style:font-size-complex="12pt"/>
    </style:style>
    <style:style style:name="P42" style:family="paragraph" style:parent-style-name="Text_20_body" style:list-style-name="L6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bfa10" officeooo:paragraph-rsid="002bfa10" style:font-size-asian="12pt" style:font-weight-asian="normal" style:font-size-complex="12pt"/>
    </style:style>
    <style:style style:name="P43" style:family="paragraph" style:parent-style-name="Text_20_body" style:list-style-name="L6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text-indent="0cm" style:auto-text-indent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bfa10" officeooo:paragraph-rsid="002bfa10" style:font-size-asian="12pt" style:font-weight-asian="normal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c7ef1" officeooo:paragraph-rsid="002c7ef1" style:font-size-asian="12pt" style:font-weight-asian="normal" style:font-size-complex="12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e3538" officeooo:paragraph-rsid="002e3538" style:font-size-asian="12pt" style:font-weight-asian="normal" style:font-size-complex="12pt"/>
    </style:style>
    <style:style style:name="P46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font-variant="normal" fo:text-transform="none" fo:color="#000000" loext:opacity="100%" style:text-line-through-style="none" style:text-line-through-type="none" style:font-name="monserrat" fo:font-size="12pt" fo:language="es" fo:country="ES" fo:font-style="normal" style:text-underline-style="none" fo:font-weight="normal" officeooo:rsid="002c7ef1" officeooo:paragraph-rsid="002c7ef1" style:font-size-asian="12pt" style:font-weight-asian="normal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2f1011" officeooo:paragraph-rsid="002f1011" style:font-size-asian="12pt" style:font-weight-asian="normal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030f78c" officeooo:paragraph-rsid="0030f78c" style:font-size-asian="12pt" style:font-weight-asian="normal" style:font-size-complex="12pt"/>
    </style:style>
    <style:style style:name="P49" style:family="paragraph" style:parent-style-name="Standard">
      <style:text-properties officeooo:rsid="000b076e" officeooo:paragraph-rsid="003c49ad"/>
    </style:style>
    <style:style style:name="T1" style:family="text">
      <style:text-properties fo:font-variant="normal" fo:text-transform="none" fo:letter-spacing="normal" fo:font-style="normal" style:text-blinking="false" style:font-name-asian="NSimSun" style:font-name-complex="Lucida Sans" style:font-weight-complex="bold"/>
    </style:style>
    <style:style style:name="T2" style:family="text">
      <style:text-properties officeooo:rsid="02623718"/>
    </style:style>
    <style:style style:name="T3" style:family="text">
      <style:text-properties officeooo:rsid="003b914b"/>
    </style:style>
    <style:style style:name="T4" style:family="text">
      <style:text-properties officeooo:rsid="000b29e3"/>
    </style:style>
    <style:style style:name="T5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3afdb9" style:font-style-asian="normal" style:font-weight-asian="normal" style:font-style-complex="normal"/>
    </style:style>
    <style:style style:name="T6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2829701" style:font-style-asian="normal" style:font-weight-asian="normal" style:font-style-complex="normal"/>
    </style:style>
    <style:style style:name="T7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15ed1a" style:font-style-asian="normal" style:font-weight-asian="normal" style:font-style-complex="normal"/>
    </style:style>
    <style:style style:name="T8" style:family="text">
      <style:text-properties officeooo:rsid="00160a44"/>
    </style:style>
    <style:style style:name="T9" style:family="text">
      <style:text-properties officeooo:rsid="005197e9"/>
    </style:style>
    <style:style style:name="T10" style:family="text">
      <style:text-properties officeooo:rsid="002bcaea"/>
    </style:style>
    <style:style style:name="T11" style:family="text">
      <style:text-properties officeooo:rsid="00142a49"/>
    </style:style>
    <style:style style:name="T12" style:family="text">
      <style:text-properties officeooo:rsid="00160ee0"/>
    </style:style>
    <style:style style:name="T13" style:family="text">
      <style:text-properties officeooo:rsid="00209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cm" fo:margin-left="1.799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  <style:text-properties style:font-name="StarSymbol"/>
      </text:list-level-style-bullet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2">Resultados de Aprendizaje</text:p>
          </table:table-cell>
          <table:covered-table-cell/>
        </table:table-row>
        <table:table-row>
          <table:table-cell table:style-name="Tabla18.A2" table:number-columns-spanned="2" office:value-type="string">
            <text:p text:style-name="P3">1. <text:s/><text:span text:style-name="T1">Desarrolla planes de prevención y concienciación en ciberseguridad, estableciendo normas y medidas de protección</text:span></text:p>
          </table:table-cell>
          <table:covered-table-cell/>
        </table:table-row>
        <table:table-row table:style-name="Tabla18.1">
          <table:table-cell table:style-name="Tabla18.A3" table:number-columns-spanned="2" office:value-type="string">
            <text:p text:style-name="P2">Criterios de evaluación</text:p>
          </table:table-cell>
          <table:covered-table-cell/>
        </table:table-row>
        <table:table-row>
          <table:table-cell table:style-name="Tabla18.A4" office:value-type="string">
            <text:p text:style-name="P4">1a</text:p>
          </table:table-cell>
          <table:table-cell table:style-name="Tabla18.B4" office:value-type="string">
            <text:p text:style-name="P5">Se han definido los principios generales de la organización en materia de ciberseguridad, que deben ser conocidos y apoyados por la dirección de la misma</text:p>
          </table:table-cell>
        </table:table-row>
        <table:table-row>
          <table:table-cell table:style-name="Tabla18.A5" office:value-type="string">
            <text:p text:style-name="P6">1b</text:p>
          </table:table-cell>
          <table:table-cell table:style-name="Tabla18.B5" office:value-type="string">
            <text:p text:style-name="P5">Se ha establecido una normativa de protección del puesto de trabajo</text:p>
          </table:table-cell>
        </table:table-row>
        <table:table-row>
          <table:table-cell table:style-name="Tabla18.A5" office:value-type="string">
            <text:p text:style-name="P6">1c</text:p>
          </table:table-cell>
          <table:table-cell table:style-name="Tabla18.B5" office:value-type="string">
            <text:p text:style-name="P5">Se ha definido un plan de concienciación de ciberseguridad dirigido a los empleados.</text:p>
          </table:table-cell>
        </table:table-row>
        <table:table-row>
          <table:table-cell table:style-name="Tabla18.A7" office:value-type="string">
            <text:p text:style-name="P6">1d</text:p>
          </table:table-cell>
          <table:table-cell table:style-name="Tabla18.B7" office:value-type="string">
            <text:p text:style-name="P5">Se ha desarrollado el material necesario para llevar a cabo las acciones de concienciación dirigidas a los empleados.</text:p>
          </table:table-cell>
        </table:table-row>
        <table:table-row>
          <table:table-cell table:style-name="Tabla18.A7" office:value-type="string">
            <text:p text:style-name="P7">1<text:span text:style-name="T2">e</text:span></text:p>
          </table:table-cell>
          <table:table-cell table:style-name="Tabla18.B7" office:value-type="string">
            <text:p text:style-name="P5">Se ha realizado una auditoría para verificar el cumplimiento del plan de prevención y concienciación de la organización</text:p>
          </table:table-cell>
        </table:table-row>
      </table:table>
      <text:p text:style-name="P8"/>
      <text:p text:style-name="P8">Contenidos:</text:p>
      <text:p text:style-name="P9"><text:span text:style-name="T3">1. </text:span>Desarrollo de planes de prevención y concienciación en ciberseguridad:</text:p>
      <text:list text:style-name="L1">
        <text:list-item>
          <text:p text:style-name="P10">− Principios generales en materia de ciberseguridad.</text:p>
        </text:list-item>
        <text:list-item>
          <text:p text:style-name="P11">− Normativa de protección del puesto del trabajo.</text:p>
        </text:list-item>
        <text:list-item>
          <text:p text:style-name="P11">− Plan de formación y concienciación en materia de ciberseguridad.</text:p>
        </text:list-item>
        <text:list-item>
          <text:p text:style-name="P11">− Materiales de formación y concienciación.</text:p>
        </text:list-item>
        <text:list-item>
          <text:p text:style-name="P12">− Auditorías internas de cumplimiento en materia de prevención.</text:p>
        </text:list-item>
      </text:list>
      <text:p text:style-name="P13"><text:span text:style-name="T4">2. </text:span>Auditoría de incidentes de ciberseguridad:</text:p>
      <text:list text:style-name="L2">
        <text:list-item>
          <text:list>
            <text:list-item>
              <text:p text:style-name="P14">− Taxonomía de incidentes de ciberseguridad.</text:p>
            </text:list-item>
            <text:list-item>
              <text:p text:style-name="P15">− Controles, herramientas y mecanismos de monitorización, identificación, detección y alerta de incidentes: tipos y fuentes</text:p>
            </text:list-item>
            <text:list-item>
              <text:p text:style-name="P15">− Controles, herramientas y mecanismos de detección e identificación de incidentes de seguridad física.</text:p>
            </text:list-item>
            <text:list-item>
              <text:p text:style-name="P15">− Controles, herramientas y mecanismos de monitorización, identificación, detección y alerta de incidentes a través de la investigación en fuentes abiertas (OSINT).</text:p>
            </text:list-item>
            <text:list-item>
              <text:p text:style-name="P14">− Clasificación, valoración, documentación, seguimiento inicial de incidentes de ciberseguridad.</text:p>
            </text:list-item>
          </text:list>
        </text:list-item>
      </text:list>
      <text:p text:style-name="P16"><text:span text:style-name="T5">3. </text:span><text:span text:style-name="T6">I</text:span><text:span text:style-name="T7">nvestigación de los incidentes de ciberseguridad:</text:span></text:p>
      <text:list text:style-name="L3">
        <text:list-item>
          <text:p text:style-name="P17">− Recopilación de evidencias. <text:span text:style-name="T8">(y almacenado de forma segura)</text:span></text:p>
        </text:list-item>
        <text:list-item>
          <text:p text:style-name="P18">− Análisis de evidencias.</text:p>
        </text:list-item>
        <text:list-item>
          <text:p text:style-name="P18">− Investigación del incidente</text:p>
        </text:list-item>
        <text:list-item>
          <text:p text:style-name="P18">− Intercambio de información del incidente con proveedores u organismos competentes.</text:p>
        </text:list-item>
        <text:list-item>
          <text:p text:style-name="P19">− Medidas de contención de incidentes.</text:p>
        </text:list-item>
      </text:list>
      <text:p text:style-name="P20"/>
      <text:p text:style-name="P20"><text:span text:style-name="T9">4. </text:span>Implementación de medidas de ciberseguridad:</text:p>
      <text:list text:style-name="L4">
        <text:list-item>
          <text:p text:style-name="P21">− Desarrollar procedimientos de actuación detallados para dar respuesta, mitigar, eliminar o contener los tipos de incidentes.</text:p>
        </text:list-item>
        <text:list-item>
          <text:p text:style-name="P22">− Implantar capacidades de ciberresiliencia.</text:p>
        </text:list-item>
        <text:list-item>
          <text:p text:style-name="P22">− Establecer flujos de toma de decisiones y escalado interno y/o externo adecuados.</text:p>
        </text:list-item>
        <text:list-item>
          <text:p text:style-name="P22">− Tareas para restablecer los servicios afectados por incidentes.</text:p>
        </text:list-item>
        <text:list-item>
          <text:p text:style-name="P22">− Documentación</text:p>
        </text:list-item>
        <text:list-item>
          <text:p text:style-name="P23">− Seguimiento de incidentes para evitar una situación similar.</text:p>
        </text:list-item>
      </text:list>
      <text:p text:style-name="P24"><text:span text:style-name="T10">5. </text:span>Detección y documentación de incidentes de ciberseguridad:</text:p>
      <text:list text:style-name="L5">
        <text:list-item>
          <text:list>
            <text:list-item>
              <text:p text:style-name="P25">− Desarrollar procedimientos de actuación para la notificación de incidentes.</text:p>
            </text:list-item>
            <text:list-item>
              <text:p text:style-name="P26">− Notificación interna de incidentes.</text:p>
            </text:list-item>
            <text:list-item>
              <text:p text:style-name="P27">− Notificación de incidentes a quienes corresponda.</text:p>
            </text:list-item>
          </text:list>
        </text:list-item>
      </text:list>
      <text:p text:style-name="P28"/>
      <text:p text:style-name="P29"><text:soft-page-break/>CE . Webs de ies con CE-CETI</text:p>
      <text:p text:style-name="P30"><text:a xlink:type="simple" xlink:href="https://regaliz.biz/" text:style-name="Internet_20_link" text:visited-style-name="Visited_20_Internet_20_Link">https://regaliz.biz/</text:a></text:p>
      <text:p text:style-name="P31"/>
      <text:p text:style-name="P32">Actividades:</text:p>
      <text:p text:style-name="P33">Realiza un documento de políticas de seguridad de tu empresa. Busca plantillas en internet i escoge una adecuada.</text:p>
      <text:p text:style-name="P32">Redacta un documento de seguridad <text:span text:style-name="T11">de tu</text:span> puesto de trabajo</text:p>
      <text:p text:style-name="P32">Confecciona un cartel de concienciación <text:span text:style-name="T12">en ciberseguridad </text:span>para una empresa</text:p>
      <text:p text:style-name="P32">Realiza una campaña de phishing ético a tus compañeros. <text:span text:style-name="T12">(</text:span><text:a xlink:type="simple" xlink:href="https://getgophish.com/" text:style-name="Internet_20_link" text:visited-style-name="Visited_20_Internet_20_Link">https://getgophish.com/</text:a><text:span text:style-name="T12">)</text:span></text:p>
      <text:p text:style-name="P34"><text:a xlink:type="simple" xlink:href="https://www.kali.org/tools/gophish/" text:style-name="Internet_20_link" text:visited-style-name="Visited_20_Internet_20_Link">https://www.kali.org/tools/gophish/</text:a></text:p>
      <text:p text:style-name="P34"><text:a xlink:type="simple" xlink:href="https://github.com/criggs626/PhishingTemplates" text:style-name="Internet_20_link" text:visited-style-name="Visited_20_Internet_20_Link">https://github.com/criggs626/PhishingTemplates</text:a></text:p>
      <text:p text:style-name="P34"/>
      <text:p text:style-name="P34">El mercado de los kits de phishing: Phishing “listo para usar”</text:p>
      <text:p text:style-name="P34"><text:a xlink:type="simple" xlink:href="https://securelist.lat/phishing-kit-market-whats-inside-off-the-shelf-phishing-packages/96426/" text:style-name="Internet_20_link" text:visited-style-name="Visited_20_Internet_20_Link">https://securelist.lat/phishing-kit-market-whats-inside-off-the-shelf-phishing-packages/96426/</text:a></text:p>
      <text:p text:style-name="P34"/>
      <text:p text:style-name="P35">Mas herramientas de phishing-training</text:p>
      <text:p text:style-name="P35"><text:a xlink:type="simple" xlink:href="https://smartfense.com/plataforma/herramientas-de-simulacion/ataques-de-phishing/" text:style-name="Internet_20_link" text:visited-style-name="Visited_20_Internet_20_Link">https://smartfense.com/plataforma/herramientas-de-simulacion/ataques-de-phishing/</text:a></text:p>
      <text:p text:style-name="P35"><text:a xlink:type="simple" xlink:href="https://attacksimulator.es/concienciacion-sobre-ciberseguridad/simulaciones-de-phishing/" text:style-name="Internet_20_link" text:visited-style-name="Visited_20_Internet_20_Link">https://attacksimulator.es/concienciacion-sobre-ciberseguridad/simulaciones-de-phishing/</text:a></text:p>
      <text:p text:style-name="P35"><text:a xlink:type="simple" xlink:href="https://offsec.tools/" text:style-name="Internet_20_link" text:visited-style-name="Visited_20_Internet_20_Link">https://offsec.tools/</text:a></text:p>
      <text:p text:style-name="P36"/>
      <text:p text:style-name="P36">A beginners friendly, Automated phishing tool with 30+ templates.</text:p>
      <text:p text:style-name="P36"><text:a xlink:type="simple" xlink:href="https://github.com/htr-tech/zphisher" text:style-name="Internet_20_link" text:visited-style-name="Visited_20_Internet_20_Link">https://github.com/htr-tech/zphisher</text:a></text:p>
      <text:p text:style-name="P36"/>
      <text:p text:style-name="P33">Video: <text:s/>Vulnerabilidades o técnicas que aprovechan el factor humano (URJCx)</text:p>
      <text:p text:style-name="P33"><text:a xlink:type="simple" xlink:href="https://www.youtube.com/watch?v=kvbYbsGoofo" text:style-name="Internet_20_link" text:visited-style-name="Visited_20_Internet_20_Link">https://www.youtube.com/watch?v=kvbYbsGoofo</text:a></text:p>
      <text:p text:style-name="P33"/>
      <text:p text:style-name="P34">Empleados que se van de la empresa: cómo gestionar un proceso clave para la seguridad</text:p>
      <text:p text:style-name="P34"><text:a xlink:type="simple" xlink:href="https://www.welivesecurity.com/la-es/2022/01/18/empleados-van-empresa-como-gestionar-proceso-clave-seguridad/" text:style-name="Internet_20_link" text:visited-style-name="Visited_20_Internet_20_Link">https://www.welivesecurity.com/la-es/2022/01/18/empleados-van-empresa-como-gestionar-proceso-clave-seguridad/</text:a></text:p>
      <text:p text:style-name="P34"/>
      <text:p text:style-name="P34">¿Qué hacer a la hora de contratar un empleado? </text:p>
      <text:p text:style-name="P34"><text:a xlink:type="simple" xlink:href="https://www.incibe.es/protege-tu-empresa/blog/hacer-hora-contratar-empleado-mira-el-caso-exito-esta-farmacia" text:style-name="Internet_20_link" text:visited-style-name="Visited_20_Internet_20_Link">https://www.incibe.es/protege-tu-empresa/blog/hacer-hora-contratar-empleado-mira-el-caso-exito-esta-farmacia</text:a></text:p>
      <text:p text:style-name="P34"/>
      <text:p text:style-name="P34">Los 10 ataques de phishing en los que más suelen “picar” los empleados</text:p>
      <text:p text:style-name="P34"><text:a xlink:type="simple" xlink:href="https://www.muyseguridad.net/2020/10/08/ataques-de-phishing-sophos/" text:style-name="Internet_20_link" text:visited-style-name="Visited_20_Internet_20_Link">https://www.muyseguridad.net/2020/10/08/ataques-de-phishing-sophos/</text:a></text:p>
      <text:p text:style-name="P34"/>
      <text:p text:style-name="P34">¿Sabías que el 95% de las incidencias en ciberseguridad se deben a errores humanos?</text:p>
      <text:p text:style-name="P34"><text:a xlink:type="simple" xlink:href="https://www.osi.es/es/actualidad/blog/2018/12/05/sabias-que-el-95-de-las-incidencias-en-ciberseguridad-se-deben-errores" text:style-name="Internet_20_link" text:visited-style-name="Visited_20_Internet_20_Link">https://www.osi.es/es/actualidad/blog/2018/12/05/sabias-que-el-95-de-las-incidencias-en-ciberseguridad-se-deben-errores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n2" text:anchor-type="char" svg:x="-1.342cm" svg:y="0.344cm" svg:width="7.366cm" svg:height="11.121cm" draw:z-index="1"><draw:image xlink:href="Pictures/10000000000001F4000002F38184D4A4.jpg" xlink:type="simple" xlink:show="embed" xlink:actuate="onLoad" draw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n1" text:anchor-type="char" svg:x="5.052cm" svg:y="0.356cm" svg:width="12.7cm" svg:height="8.827cm" draw:z-index="0"><draw:image xlink:href="Pictures/1000000000000258000001A17BAE893B.jpg" xlink:type="simple" xlink:show="embed" xlink:actuate="onLoad" draw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a xlink:type="simple" xlink:href="https://www.kaspersky.es/blog/formar-a-tus-empleados-en-ciberseguridad-de-forma-atractiva/22771/" text:style-name="Internet_20_link" text:visited-style-name="Visited_20_Internet_20_Link">https://www.kaspersky.es/blog/formar-a-tus-empleados-en-ciberseguridad-de-forma-atractiva/22771/</text:a></text:p>
      <text:p text:style-name="P34"/>
      <text:p text:style-name="P34">Un banco español es condenado a pagar a una clienta víctima de phishing</text:p>
      <text:p text:style-name="P34"><text:a xlink:type="simple" xlink:href="https://unaaldia.hispasec.com/2022/04/un-banco-espanol-es-condenado-a-pagar-a-una-clienta-victima-de-phishing.html" text:style-name="Internet_20_link" text:visited-style-name="Visited_20_Internet_20_Link">https://unaaldia.hispasec.com/2022/04/un-banco-espanol-es-condenado-a-pagar-a-una-clienta-victima-de-phishing.html</text:a></text:p>
      <text:p text:style-name="P34"/>
      <text:p text:style-name="P34">600 trabajadores públicos de Granada 'pican' en un simulacro de estafa por 'phishing' <text:soft-page-break/><text:span text:style-name="T13">(nov-2022)</text:span></text:p>
      <text:p text:style-name="P34"><text:a xlink:type="simple" xlink:href="https://www.granadahoy.com/granada/Experimento-Ayuntamiento-Granada-pishing-secuestro-correos_0_1738926428.html" text:style-name="Internet_20_link" text:visited-style-name="Visited_20_Internet_20_Link">https://www.granadahoy.com/granada/Experimento-Ayuntamiento-Granada-pishing-secuestro-correos_0_1738926428.html</text:a></text:p>
      <text:p text:style-name="P34"/>
      <text:p text:style-name="P37">Simulador de phishing</text:p>
      <text:p text:style-name="P34"><text:a xlink:type="simple" xlink:href="https://www.hoko-digital.com/" text:style-name="Internet_20_link" text:visited-style-name="Visited_20_Internet_20_Link">https://www.hoko-digital.com/</text:a></text:p>
      <text:p text:style-name="P34"/>
      <text:p text:style-name="P34">Phishing | Línea de Ayuda en Ciberseguridad 017 - Casos Reales</text:p>
      <text:p text:style-name="P34"><text:a xlink:type="simple" xlink:href="https://www.youtube.com/watch?v=7T32WBQRrBA" text:style-name="Internet_20_link" text:visited-style-name="Visited_20_Internet_20_Link">https://www.youtube.com/watch?v=7T32WBQRrBA</text:a></text:p>
      <text:p text:style-name="P34"/>
      <text:p text:style-name="P34">El 83% de los responsables de ciberseguridad esperan un incidente grave en los próximos 12 a 24 meses</text:p>
      <text:p text:style-name="P34"><text:a xlink:type="simple" xlink:href="https://www.muyseguridad.net/2023/03/29/responsables-ciberseguridad-empresas-esperan-incidente-grave/" text:style-name="Internet_20_link" text:visited-style-name="Visited_20_Internet_20_Link">https://www.muyseguridad.net/2023/03/29/responsables-ciberseguridad-empresas-esperan-incidente-grave/</text:a></text:p>
      <text:p text:style-name="P38">“Dos terceras partes de las organizaciones en España se encuentran en las fases Principiante (8%) o Formativa (59%), lo que significa que su nivel de preparación está por debajo de la media global. Sólo el 33% alcanzan los niveles Progresivo (26%) y Maduro (7%).”</text:p>
      <text:p text:style-name="P34"/>
      <text:p text:style-name="P34">Concienciación en Ciberseguridad para empresas y usuarios</text:p>
      <text:p text:style-name="P39"><text:a xlink:type="simple" xlink:href="https://dcseguridad.es/concienciacion-en-ciberseguridad-para-empresas-y-usuarios-i/" text:style-name="Internet_20_link" text:visited-style-name="Visited_20_Internet_20_Link">https://dcseguridad.es/concienciacion-en-ciberseguridad-para-empresas-y-usuarios-i/</text:a></text:p>
      <text:p text:style-name="P34"><text:a xlink:type="simple" xlink:href="https://dcseguridad.es/concienciacion-en-ciberseguridad-para-empresas-y-usuarios-parte-ii/" text:style-name="Internet_20_link" text:visited-style-name="Visited_20_Internet_20_Link">https://dcseguridad.es/concienciacion-en-ciberseguridad-para-empresas-y-usuarios-parte-ii/</text:a></text:p>
      <text:p text:style-name="P34"/>
      <text:p text:style-name="P34"/>
      <text:p text:style-name="P34">Cómo medir la madurez de ciberseguridad en mi organización?</text:p>
      <text:p text:style-name="P34"><text:a xlink:type="simple" xlink:href="https://www.forbes.com.mx/como-medir-la-madurez-de-ciberseguridad-en-mi-organizacion/" text:style-name="Internet_20_link" text:visited-style-name="Visited_20_Internet_20_Link">https://www.forbes.com.mx/como-medir-la-madurez-de-ciberseguridad-en-mi-organizacion/</text:a></text:p>
      <text:p text:style-name="P34"/>
      <text:p text:style-name="P34"/>
      <text:p text:style-name="P34">10 formas de ver mapas de ataques cibernéticos en tiempo real: ataque de piratería en vivo</text:p>
      <text:p text:style-name="P34"><text:a xlink:type="simple" xlink:href="https://geekflare.com/es/real-time-cyber-attacks/" text:style-name="Internet_20_link" text:visited-style-name="Visited_20_Internet_20_Link">https://geekflare.com/es/real-time-cyber-attacks/</text:a></text:p>
      <text:p text:style-name="P34"/>
      <text:p text:style-name="P34"/>
      <text:p text:style-name="P34"/>
      <text:p text:style-name="P34"/>
      <text:p text:style-name="P40">23-24</text:p>
      <text:p text:style-name="P34">What is cybersecurity awareness?</text:p>
      <text:p text:style-name="P34"><text:a xlink:type="simple" xlink:href="https://spanning.com/blog/cybersecurity-awareness/" text:style-name="Internet_20_link" text:visited-style-name="Visited_20_Internet_20_Link">https://spanning.com/blog/cybersecurity-awareness/</text:a></text:p>
      <text:p text:style-name="P34"/>
      <text:p text:style-name="P41"/>
      <text:p text:style-name="P41"/>
      <text:p text:style-name="P41">Los 'deepfakes' progresan más rápido que las herramientas que los detectan, y eso preocupa en la comunidad 'hacker': la red se llenará de 'replicantes</text:p>
      <text:p text:style-name="P41"><text:a xlink:type="simple" xlink:href="https://www.businessinsider.es/hackers-preocupados-avance-imparable-deepfakes-1214162" text:style-name="Internet_20_link" text:visited-style-name="Visited_20_Internet_20_Link">https://www.businessinsider.es/hackers-preocupados-avance-imparable-deepfakes-1214162</text:a></text:p>
      <text:p text:style-name="P41"/>
      <text:p text:style-name="P41"/>
      <text:p text:style-name="P41">Gestion de incidentes de ciberseguridad</text:p>
      <text:p text:style-name="P41"><text:a xlink:type="simple" xlink:href="https://www.incibe.es/empresas/tematicas/gestion-incidentes-seguridad#politica" text:style-name="Internet_20_link" text:visited-style-name="Visited_20_Internet_20_Link">https://www.incibe.es/empresas/tematicas/gestion-incidentes-seguridad#politica</text:a></text:p>
      <text:p text:style-name="P41"/>
      <text:list text:style-name="L6">
        <text:list-item>
          <text:p text:style-name="P42">Definir la política de gestión de incidentes de seguridad</text:p>
        </text:list-item>
        <text:list-item>
          <text:p text:style-name="P43">Tipos de incidentes de seguridad</text:p>
        </text:list-item>
        <text:list-item>
          <text:p text:style-name="P43"><text:soft-page-break/>Pasos de la gestión de incidentes</text:p>
        </text:list-item>
        <text:list-item>
          <text:p text:style-name="P43">Medidas preventivas adicionales</text:p>
        </text:list-item>
        <text:list-item>
          <text:p text:style-name="P43">Plan de Contingencia y Continuidad</text:p>
        </text:list-item>
      </text:list>
      <text:p text:style-name="P41"/>
      <text:p text:style-name="P41"/>
      <text:p text:style-name="P44">Elaboracion de un documento</text:p>
      <text:p text:style-name="P44">POLÍTICA GENERAL DE SEGURIDAD Y PRIVACIDAD DE LA INFORMACIÓN (para una organización o entidad)</text:p>
      <text:p text:style-name="P44"><text:a xlink:type="simple" xlink:href="https://www.mintic.gov.co/gestionti/615/articles-5482_G2_Politica_General.pdf" text:style-name="Internet_20_link" text:visited-style-name="Visited_20_Internet_20_Link">https://www.mintic.gov.co/gestionti/615/articles-5482_G2_Politica_General.pdf</text:a></text:p>
      <text:p text:style-name="P44">pag 9</text:p>
      <text:p text:style-name="P44"/>
      <text:p text:style-name="P44"/>
      <text:p text:style-name="P45">Documentos de politicas de seguridad. ejemplos </text:p>
      <text:p text:style-name="P44"><text:a xlink:type="simple" xlink:href="https://www.incibe.es/empresas/herramientas/politicas" text:style-name="Internet_20_link" text:visited-style-name="Visited_20_Internet_20_Link">https://www.incibe.es/empresas/herramientas/politicas</text:a></text:p>
      <text:p text:style-name="P44"><text:a xlink:type="simple" xlink:href="https://www.ceupe.com/blog/ejemplo-politica-seguridad-informacion-y-sgsi.html" text:style-name="Internet_20_link" text:visited-style-name="Visited_20_Internet_20_Link"/></text:p>
      <text:p text:style-name="P45">Ejemplo de : Política de seguridad de la información y SGSI</text:p>
      <text:p text:style-name="P44"><text:a xlink:type="simple" xlink:href="https://www.ceupe.com/blog/ejemplo-politica-seguridad-informacion-y-sgsi.html" text:style-name="Internet_20_link" text:visited-style-name="Visited_20_Internet_20_Link">https://www.ceupe.com/blog/ejemplo-politica-seguridad-informacion-y-sgsi.html</text:a></text:p>
      <text:p text:style-name="P44"/>
      <text:h text:style-name="P46" text:outline-level="1">ISO 27001: Cómo hacer tu política del SGSI</text:h>
      <text:p text:style-name="P44"><text:a xlink:type="simple" xlink:href="https://blog.hackmetrix.com/politica-del-sgsi/" text:style-name="Internet_20_link" text:visited-style-name="Visited_20_Internet_20_Link">https://blog.hackmetrix.com/politica-del-sgsi/</text:a></text:p>
      <text:p text:style-name="P44"/>
      <text:p text:style-name="P47">Elementos clave de la politica de seg de la información</text:p>
      <text:p text:style-name="P44"><text:a xlink:type="simple" xlink:href="https://grupo-fraga.com/5-elementos-clave-de-la-politica-de-seguridad-de-la-informacion-segun-la-iso-27001/" text:style-name="Internet_20_link" text:visited-style-name="Visited_20_Internet_20_Link">https://grupo-fraga.com/5-elementos-clave-de-la-politica-de-seguridad-de-la-informacion-segun-la-iso-27001/</text:a></text:p>
      <text:p text:style-name="P44"><text:a xlink:type="simple" xlink:href="https://www.iso27000.es/iso27002_5.html" text:style-name="Internet_20_link" text:visited-style-name="Visited_20_Internet_20_Link"/></text:p>
      <text:p text:style-name="P44"><text:a xlink:type="simple" xlink:href="https://www.iso27000.es/iso27002_5.html" text:style-name="Internet_20_link" text:visited-style-name="Visited_20_Internet_20_Link">https://www.iso27000.es/iso27002_5.html</text:a></text:p>
      <text:p text:style-name="P44"/>
      <text:p text:style-name="P47">plantillas (sans ) <text:s/>en inglés</text:p>
      <text:p text:style-name="P44"><text:a xlink:type="simple" xlink:href="https://protegermipc.net/2020/02/05/plantillas-politicas-seguridad-de-la-informacion/" text:style-name="Internet_20_link" text:visited-style-name="Visited_20_Internet_20_Link">https://protegermipc.net/2020/02/05/plantillas-politicas-seguridad-de-la-informacion/</text:a></text:p>
      <text:p text:style-name="P44"/>
      <text:p text:style-name="P48">Recursos</text:p>
      <text:p text:style-name="P48">Kit concienciación</text:p>
      <text:p text:style-name="P48"/>
      <text:p text:style-name="P48">INCIBE – la oca del phishing</text:p>
      <text:p text:style-name="P44"><text:a xlink:type="simple" xlink:href="https://www.incibe.es/sites/default/files/docs/juego-la-oca-del-phishing.pdf" text:style-name="Internet_20_link" text:visited-style-name="Visited_20_Internet_20_Link">https://www.incibe.es/sites/default/files/docs/juego-la-oca-del-phishing.pdf</text:a></text:p>
      <text:p text:style-name="P44"/>
      <text:p text:style-name="P44"/>
      <text:p text:style-name="P44">4 documentales para reflexionar sobre la seguridad digital en las redes sociales</text:p>
      <text:p text:style-name="P44"><text:a xlink:type="simple" xlink:href="https://www.welivesecurity.com/es/concientizacion/documentales-reflexionar-seguridad-digital-redes-sociales/" text:style-name="Internet_20_link" text:visited-style-name="Visited_20_Internet_20_Link">https://www.welivesecurity.com/es/concientizacion/documentales-reflexionar-seguridad-digital-redes-sociales/</text:a></text:p>
      <text:p text:style-name="P44"/>
      <text:p text:style-name="P44"><text:a xlink:type="simple" xlink:href="https://www.welivesecurity.com/es/seguridad-corporativa/fortalecer-eslabon-debil-seguridad-empleados/" text:style-name="Internet_20_link" text:visited-style-name="Visited_20_Internet_20_Link"/></text:p>
      <text:p text:style-name="P44">Fortalecer el eslabón más débil: Concienciación sobre seguridad para empleados</text:p>
      <text:p text:style-name="P44"><text:a xlink:type="simple" xlink:href="https://www.welivesecurity.com/es/seguridad-corporativa/fortalecer-eslabon-debil-seguridad-empleados/" text:style-name="Internet_20_link" text:visited-style-name="Visited_20_Internet_20_Link">https://www.welivesecurity.com/es/seguridad-corporativa/fortalecer-eslabon-debil-seguridad-empleados/</text:a></text:p>
      <text:p text:style-name="P44"/>
      <text:p text:style-name="P49">Guía Práctica contra la Ingeniería Social</text:p>
      <text:p text:style-name="P49"><text:a xlink:type="simple" xlink:href="https://www.lisainstitute.com/blogs/blog/guia-practica-ingenieria-social" text:style-name="Internet_20_link" text:visited-style-name="Visited_20_Internet_20_Link">https://www.lisainstitute.com/blogs/blog/guia-practica-ingenieria-social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serrat" svg:font-family="monserrat, sans-serif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000000" loext:opacity="100%" style:text-line-through-style="none" style:text-line-through-type="none" style:font-name="Arial1" fo:font-family="Arial" style:font-family-generic="swiss" style:font-pitch="variable" fo:font-size="12pt" style:text-underline-style="none" fo:font-weight="normal" officeooo:rsid="004960d7" style:font-size-asian="12pt" style:font-weight-asian="normal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Pa12" style:family="paragraph" style:parent-style-name="Default" style:default-outline-level="">
      <style:paragraph-properties style:line-height-at-least="0.355cm"/>
    </style:style>
    <style:style style:name="Pa6" style:family="paragraph" style:parent-style-name="Default" style:default-outline-level="">
      <style:paragraph-properties style:line-height-at-least="0.355cm"/>
    </style:style>
    <style:style style:name="Pa20" style:family="paragraph" style:parent-style-name="Default" style:default-outline-level="">
      <style:paragraph-properties style:line-height-at-least="0.355cm"/>
    </style:style>
    <style:style style:name="Pa18" style:family="paragraph" style:parent-style-name="Default" style:default-outline-level="">
      <style:paragraph-properties style:line-height-at-least="0.355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3" style:display-name="WW_CharLFO1LVL3" style:family="text">
      <style:text-properties style:font-name="Arial1" fo:font-family="Arial" style:font-family-generic="swiss" style:font-pitch="variable"/>
    </style:style>
    <style:style style:name="WW_5f_CharLFO1LVL4" style:display-name="WW_CharLFO1LVL4" style:family="text">
      <style:text-properties style:font-name="Arial1" fo:font-family="Arial" style:font-family-generic="swiss" style:font-pitch="variable"/>
    </style:style>
    <style:style style:name="WW_5f_CharLFO1LVL5" style:display-name="WW_CharLFO1LVL5" style:family="text">
      <style:text-properties style:font-name="Arial1" fo:font-family="Arial" style:font-family-generic="swiss" style:font-pitch="variable"/>
    </style:style>
    <style:style style:name="WW_5f_CharLFO1LVL6" style:display-name="WW_CharLFO1LVL6" style:family="text">
      <style:text-properties style:font-name="Arial1" fo:font-family="Arial" style:font-family-generic="swiss" style:font-pitch="variable"/>
    </style:style>
    <style:style style:name="WW_5f_CharLFO1LVL7" style:display-name="WW_CharLFO1LVL7" style:family="text">
      <style:text-properties style:font-name="Arial1" fo:font-family="Arial" style:font-family-generic="swiss" style:font-pitch="variable"/>
    </style:style>
    <style:style style:name="WW_5f_CharLFO1LVL8" style:display-name="WW_CharLFO1LVL8" style:family="text">
      <style:text-properties style:font-name="Arial1" fo:font-family="Arial" style:font-family-generic="swiss" style:font-pitch="variable"/>
    </style:style>
    <style:style style:name="WW_5f_CharLFO1LVL9" style:display-name="WW_CharLFO1LVL9" style:family="text">
      <style:text-properties style:font-name="Arial1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9T08:56:50.718000000</dc:date>
    <meta:editing-duration>PT2H43M45S</meta:editing-duration>
    <meta:editing-cycles>36</meta:editing-cycles>
    <meta:generator>LibreOffice/24.8.5.2$Windows_X86_64 LibreOffice_project/fddf2685c70b461e7832239a0162a77216259f22</meta:generator>
    <meta:document-statistic meta:table-count="1" meta:image-count="2" meta:object-count="0" meta:page-count="5" meta:paragraph-count="126" meta:word-count="868" meta:character-count="8111" meta:non-whitespace-character-count="7392"/>
  </office:meta>
</office:document-meta>
</file>