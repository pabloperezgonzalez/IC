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7000001151E06C29D.png" manifest:media-type="image/png"/>
  <manifest:file-entry manifest:full-path="Pictures/10000001000000580000001F1F6C62E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pitch="variable"/>
    <style:font-face style:name="Consolas" svg:font-family="Consola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NSimSun" svg:font-family="NSimSun" style:font-family-generic="modern" style:font-pitch="fixed"/>
    <style:font-face style:name="Noto Sans" svg:font-family="'Noto Sans'" style:font-family-generic="roman" style:font-pitch="variable"/>
    <style:font-face style:name="OpenSymbol" svg:font-family="OpenSymbol" style:font-family-generic="system" style:font-charset="x-symbol"/>
    <style:font-face style:name="OpenSymbol1" svg:font-family="OpenSymbol, 'Arial Unicode MS'" style:font-family-generic="roman" style:font-pitch="variable"/>
    <style:font-face style:name="Tahoma" svg:font-family="Tahoma" style:font-family-generic="modern" style:font-pitch="fixed"/>
    <style:font-face style:name="Webdings" svg:font-family="Webdings"/>
    <style:font-face style:name="Wingdings" svg:font-family="Wingdings"/>
  </office:font-face-decls>
  <office:automatic-styles>
    <style:style style:name="P1" style:family="paragraph" style:parent-style-name="Text_20_body">
      <style:paragraph-properties fo:margin-top="0cm" fo:margin-bottom="0.199cm" style:contextual-spacing="false" fo:line-height="100%"/>
      <style:text-properties fo:color="#5c068c" loext:opacity="100%" fo:font-size="11pt" fo:font-weight="bold" fo:background-color="#f8f8f8" style:font-size-asian="11pt" style:font-weight-asian="bold" style:font-size-complex="11pt" style:font-weight-complex="bold"/>
    </style:style>
    <style:style style:name="P2" style:family="paragraph" style:parent-style-name="Standard">
      <style:paragraph-properties fo:margin-top="0cm" fo:margin-bottom="0.199cm" style:contextual-spacing="false"/>
      <style:text-properties fo:color="#5c068c" loext:opacity="100%" fo:font-size="11pt" fo:font-weight="bold" fo:background-color="#f8f8f8" style:font-size-asian="11pt" style:font-weight-asian="bold" style:font-size-complex="11pt" style:font-weight-complex="bold"/>
    </style:style>
    <style:style style:name="P3" style:family="paragraph" style:parent-style-name="Standard">
      <style:paragraph-properties fo:margin-top="0cm" fo:margin-bottom="0.199cm" style:contextual-spacing="false"/>
      <style:text-properties fo:color="#5c068c" loext:opacity="100%" fo:font-size="11pt" fo:font-weight="bold" officeooo:paragraph-rsid="001f0b56" fo:background-color="#f8f8f8" style:font-size-asian="11pt" style:font-weight-asian="bold" style:font-size-complex="11pt" style:font-weight-complex="bold"/>
    </style:style>
    <style:style style:name="P4" style:family="paragraph" style:parent-style-name="Text_20_body">
      <style:paragraph-properties fo:margin-top="0cm" fo:margin-bottom="0.199cm" style:contextual-spacing="false" fo:line-height="100%"/>
      <style:text-properties fo:color="#5c068c" loext:opacity="100%" fo:font-size="11pt" fo:font-weight="bold" officeooo:rsid="001c186e" officeooo:paragraph-rsid="001f0b56" fo:background-color="#f8f8f8" style:font-size-asian="11pt" style:font-weight-asian="bold" style:font-size-complex="11pt" style:font-weight-complex="bold"/>
    </style:style>
    <style:style style:name="P5" style:family="paragraph" style:parent-style-name="Standard">
      <style:paragraph-properties fo:margin-top="0cm" fo:margin-bottom="0.199cm" style:contextual-spacing="false"/>
      <style:text-properties fo:color="#5c068c" loext:opacity="100%" fo:font-size="11pt" fo:font-weight="bold" officeooo:paragraph-rsid="00207e64" fo:background-color="#f8f8f8" style:font-size-asian="11pt" style:font-weight-asian="bold" style:font-size-complex="11pt" style:font-weight-complex="bold"/>
    </style:style>
    <style:style style:name="P6" style:family="paragraph" style:parent-style-name="Standard">
      <style:paragraph-properties fo:margin-top="0cm" fo:margin-bottom="0.199cm" style:contextual-spacing="false"/>
      <style:text-properties fo:color="#5c068c" loext:opacity="100%" fo:font-size="11pt" style:font-size-asian="11pt" style:font-size-complex="11pt"/>
    </style:style>
    <style:style style:name="P7" style:family="paragraph" style:parent-style-name="Text_20_body">
      <style:paragraph-properties fo:margin-top="0cm" fo:margin-bottom="0.199cm" style:contextual-spacing="false" fo:line-height="100%"/>
      <style:text-properties fo:color="#3d3d3d" loext:opacity="100%" fo:font-size="11pt" fo:background-color="#ffffff" style:font-size-asian="11pt" style:font-size-complex="11pt"/>
    </style:style>
    <style:style style:name="P8" style:family="paragraph" style:parent-style-name="Text_20_body">
      <style:paragraph-properties fo:margin-top="0cm" fo:margin-bottom="0.199cm" style:contextual-spacing="false" fo:line-height="100%"/>
      <style:text-properties fo:color="#3d3d3d" loext:opacity="100%" fo:font-size="11pt" officeooo:paragraph-rsid="001f0b56" fo:background-color="#ffffff" style:font-size-asian="11pt" style:font-size-complex="11pt"/>
    </style:style>
    <style:style style:name="P9" style:family="paragraph" style:parent-style-name="Standard">
      <style:paragraph-properties fo:margin-top="0cm" fo:margin-bottom="0.199cm" style:contextual-spacing="false"/>
      <style:text-properties fo:color="#3d3d3d" loext:opacity="100%" fo:font-size="11pt" fo:background-color="#ffffff" style:font-size-asian="11pt" style:font-size-complex="11pt"/>
    </style:style>
    <style:style style:name="P10" style:family="paragraph" style:parent-style-name="Standard">
      <style:paragraph-properties fo:margin-top="0cm" fo:margin-bottom="0.199cm" style:contextual-spacing="false"/>
      <style:text-properties fo:color="#3d3d3d" loext:opacity="100%" fo:font-size="11pt" style:font-size-asian="11pt" style:font-size-complex="11pt"/>
    </style:style>
    <style:style style:name="P11" style:family="paragraph" style:parent-style-name="Text_20_body">
      <style:paragraph-properties fo:margin-top="0cm" fo:margin-bottom="0.199cm" style:contextual-spacing="false" fo:line-height="100%"/>
      <style:text-properties fo:color="#3d3d3d" loext:opacity="100%" fo:font-size="11pt" officeooo:rsid="001cb831" officeooo:paragraph-rsid="001f0b56" style:font-size-asian="11pt" style:font-size-complex="11pt"/>
    </style:style>
    <style:style style:name="P12" style:family="paragraph" style:parent-style-name="Text_20_body">
      <style:paragraph-properties fo:margin-top="0cm" fo:margin-bottom="0.199cm" style:contextual-spacing="false" fo:line-height="100%"/>
    </style:style>
    <style:style style:name="P13" style:family="paragraph" style:parent-style-name="Text_20_body">
      <style:paragraph-properties fo:margin-top="0cm" fo:margin-bottom="0.199cm" style:contextual-spacing="false" fo:line-height="100%"/>
      <style:text-properties officeooo:paragraph-rsid="001f0b56"/>
    </style:style>
    <style:style style:name="P14" style:family="paragraph" style:parent-style-name="Standard">
      <style:paragraph-properties fo:margin-top="0cm" fo:margin-bottom="0.199cm" style:contextual-spacing="false" fo:text-align="justify" style:justify-single-word="false"/>
    </style:style>
    <style:style style:name="P15" style:family="paragraph" style:parent-style-name="Standard" style:list-style-name="L3">
      <style:paragraph-properties fo:margin-top="0cm" fo:margin-bottom="0.199cm" style:contextual-spacing="false" fo:text-align="justify" style:justify-single-word="false"/>
      <style:text-properties fo:color="#3d3d3d" loext:opacity="100%" fo:font-size="11pt" officeooo:paragraph-rsid="001f0b56" fo:background-color="#ffffff" style:font-size-asian="11pt" style:font-size-complex="11pt"/>
    </style:style>
    <style:style style:name="P16" style:family="paragraph" style:parent-style-name="Text_20_body" style:master-page-name="MP0">
      <style:paragraph-properties fo:margin-top="0cm" fo:margin-bottom="0.199cm" style:contextual-spacing="false" fo:line-height="100%" fo:text-align="center" style:justify-single-word="false" style:page-number="auto" fo:break-before="page"/>
      <style:text-properties fo:color="#5c068c" loext:opacity="100%" fo:font-size="16pt" fo:font-weight="bold" officeooo:rsid="00261980" officeooo:paragraph-rsid="00261980" fo:background-color="#f8f8f8" style:font-size-asian="16pt" style:font-weight-asian="bold" style:font-size-complex="16pt" style:font-weight-complex="bold"/>
    </style:style>
    <style:style style:name="P17" style:family="paragraph" style:parent-style-name="Text_20_body" style:list-style-name="L1">
      <style:paragraph-properties fo:margin-left="0cm" fo:margin-top="0cm" fo:margin-bottom="0.199cm" style:contextual-spacing="false" fo:line-height="100%" fo:text-align="justify" style:justify-single-word="false" fo:text-indent="0cm" style:auto-text-indent="false">
        <style:tab-stops/>
      </style:paragraph-properties>
      <style:text-properties fo:color="#3d3d3d" loext:opacity="100%" fo:font-size="11pt" fo:background-color="#ffffff" style:font-size-asian="11pt" style:font-size-complex="11pt"/>
    </style:style>
    <style:style style:name="P18" style:family="paragraph" style:parent-style-name="Text_20_body" style:list-style-name="L1">
      <style:paragraph-properties fo:margin-left="0cm" fo:margin-top="0cm" fo:margin-bottom="0.199cm" style:contextual-spacing="false" fo:line-height="100%" fo:text-align="justify" style:justify-single-word="false" fo:text-indent="0cm" style:auto-text-indent="false">
        <style:tab-stops/>
      </style:paragraph-properties>
      <style:text-properties fo:color="#3d3d3d" loext:opacity="100%" fo:font-size="11pt" officeooo:paragraph-rsid="002b15de" fo:background-color="#ffffff" style:font-size-asian="11pt" style:font-size-complex="11pt"/>
    </style:style>
    <style:style style:name="P19" style:family="paragraph" style:parent-style-name="Text_20_body" style:list-style-name="L2">
      <style:paragraph-properties fo:margin-left="0cm" fo:margin-top="0cm" fo:margin-bottom="0.199cm" style:contextual-spacing="false" fo:line-height="100%" fo:text-align="justify" style:justify-single-word="false" fo:text-indent="0cm" style:auto-text-indent="false">
        <style:tab-stops/>
      </style:paragraph-properties>
      <style:text-properties fo:color="#3d3d3d" loext:opacity="100%" fo:font-size="11pt" fo:background-color="#ffffff" style:font-size-asian="11pt" style:font-size-complex="11pt"/>
    </style:style>
    <style:style style:name="P20" style:family="paragraph" style:parent-style-name="Text_20_body" style:list-style-name="L3">
      <style:paragraph-properties fo:margin-top="0cm" fo:margin-bottom="0.199cm" style:contextual-spacing="false" fo:line-height="100%" fo:text-align="justify" style:justify-single-word="false"/>
      <style:text-properties fo:color="#3d3d3d" loext:opacity="100%" fo:font-size="11pt" fo:background-color="#ffffff" style:font-size-asian="11pt" style:font-size-complex="11pt"/>
    </style:style>
    <style:style style:name="P21" style:family="paragraph" style:parent-style-name="Text_20_body" style:list-style-name="L4">
      <style:paragraph-properties fo:margin-top="0cm" fo:margin-bottom="0.199cm" style:contextual-spacing="false" fo:line-height="100%"/>
      <style:text-properties fo:color="#3d3d3d" loext:opacity="100%" fo:font-size="11pt" officeooo:paragraph-rsid="00207e64" fo:background-color="#ffffff" style:font-size-asian="11pt" style:font-size-complex="11pt"/>
    </style:style>
    <style:style style:name="P22" style:family="paragraph" style:parent-style-name="Text_20_body" style:list-style-name="L5">
      <style:paragraph-properties fo:margin-left="0cm" fo:margin-top="0cm" fo:margin-bottom="0.199cm" style:contextual-spacing="false" fo:line-height="100%" fo:text-indent="0cm" style:auto-text-indent="false">
        <style:tab-stops/>
      </style:paragraph-properties>
      <style:text-properties fo:color="#3d3d3d" loext:opacity="100%" fo:font-size="11pt" officeooo:rsid="001c186e" officeooo:paragraph-rsid="001f0b56" fo:background-color="#ffffff" style:font-size-asian="11pt" style:font-size-complex="11pt"/>
    </style:style>
    <style:style style:name="P23" style:family="paragraph" style:parent-style-name="Text_20_body" style:list-style-name="L5">
      <style:paragraph-properties fo:margin-left="0cm" fo:margin-top="0cm" fo:margin-bottom="0.199cm" style:contextual-spacing="false" fo:line-height="100%" fo:text-indent="0cm" style:auto-text-indent="false">
        <style:tab-stops/>
      </style:paragraph-properties>
      <style:text-properties fo:color="#3d3d3d" loext:opacity="100%" fo:font-size="11pt" officeooo:rsid="001c186e" officeooo:paragraph-rsid="00207e64" fo:background-color="#ffffff" style:font-size-asian="11pt" style:font-size-complex="11pt"/>
    </style:style>
    <style:style style:name="P24" style:family="paragraph" style:parent-style-name="Text_20_body" style:list-style-name="L5">
      <style:paragraph-properties fo:margin-left="0cm" fo:margin-top="0cm" fo:margin-bottom="0.199cm" style:contextual-spacing="false" fo:line-height="100%" fo:text-indent="0cm" style:auto-text-indent="false">
        <style:tab-stops/>
      </style:paragraph-properties>
      <style:text-properties fo:color="#3d3d3d" loext:opacity="100%" fo:font-size="11pt" officeooo:rsid="001cb831" officeooo:paragraph-rsid="00207e64" fo:background-color="#ffffff" style:font-size-asian="11pt" style:font-size-complex="11pt"/>
    </style:style>
    <style:style style:name="P25" style:family="paragraph" style:parent-style-name="Text_20_body" style:list-style-name="L1">
      <style:paragraph-properties fo:margin-left="0cm" fo:margin-top="0cm" fo:margin-bottom="0.199cm" style:contextual-spacing="false" fo:line-height="100%" fo:text-align="justify" style:justify-single-word="false" fo:text-indent="0cm" style:auto-text-indent="false">
        <style:tab-stops/>
      </style:paragraph-properties>
      <style:text-properties fo:color="#3d3d3d" loext:opacity="100%" fo:font-size="11pt" style:font-size-asian="11pt" style:font-size-complex="11pt"/>
    </style:style>
    <style:style style:name="P26" style:family="paragraph" style:parent-style-name="Text_20_body" style:list-style-name="L3">
      <style:paragraph-properties fo:margin-top="0cm" fo:margin-bottom="0.199cm" style:contextual-spacing="false" fo:line-height="100%" fo:text-align="justify" style:justify-single-word="false"/>
      <style:text-properties fo:color="#3d3d3d" loext:opacity="100%" fo:font-size="11pt" style:font-size-asian="11pt" style:font-size-complex="11pt"/>
    </style:style>
    <style:style style:name="P27" style:family="paragraph" style:parent-style-name="Text_20_body" style:list-style-name="L5">
      <style:paragraph-properties fo:margin-left="0cm" fo:margin-top="0cm" fo:margin-bottom="0.199cm" style:contextual-spacing="false" fo:line-height="100%" fo:text-indent="0cm" style:auto-text-indent="false">
        <style:tab-stops/>
      </style:paragraph-properties>
      <style:text-properties fo:color="#3d3d3d" loext:opacity="100%" fo:font-size="11pt" officeooo:paragraph-rsid="001f0b56" style:font-size-asian="11pt" style:font-size-complex="11pt"/>
    </style:style>
    <style:style style:name="P28" style:family="paragraph" style:parent-style-name="Text_20_body" style:list-style-name="L5">
      <style:paragraph-properties fo:margin-left="0cm" fo:margin-top="0cm" fo:margin-bottom="0.199cm" style:contextual-spacing="false" fo:line-height="100%" fo:text-indent="0cm" style:auto-text-indent="false">
        <style:tab-stops/>
      </style:paragraph-properties>
      <style:text-properties fo:color="#3d3d3d" loext:opacity="100%" fo:font-size="11pt" officeooo:rsid="001cb831" officeooo:paragraph-rsid="00207e64" style:font-size-asian="11pt" style:font-size-complex="11pt"/>
    </style:style>
    <style:style style:name="P29" style:family="paragraph" style:parent-style-name="Text_20_body" style:list-style-name="L5">
      <style:paragraph-properties fo:margin-left="0cm" fo:margin-top="0cm" fo:margin-bottom="0.199cm" style:contextual-spacing="false" fo:line-height="100%" fo:text-indent="0cm" style:auto-text-indent="false">
        <style:tab-stops/>
      </style:paragraph-properties>
      <style:text-properties fo:color="#3d3d3d" loext:opacity="100%" fo:font-size="11pt" officeooo:rsid="001c186e" officeooo:paragraph-rsid="001f0b56" style:font-size-asian="11pt" style:font-size-complex="11pt"/>
    </style:style>
    <style:style style:name="P30" style:family="paragraph" style:parent-style-name="Text_20_body" style:list-style-name="L1">
      <style:paragraph-properties fo:margin-left="0cm" fo:margin-top="0cm" fo:margin-bottom="0.199cm" style:contextual-spacing="false" fo:line-height="100%" fo:text-align="justify" style:justify-single-word="false" fo:text-indent="0cm" style:auto-text-indent="false">
        <style:tab-stops/>
      </style:paragraph-properties>
    </style:style>
    <style:style style:name="P31" style:family="paragraph" style:parent-style-name="Text_20_body" style:list-style-name="L1">
      <style:paragraph-properties fo:margin-left="0cm" fo:margin-top="0cm" fo:margin-bottom="0.199cm" style:contextual-spacing="false" fo:line-height="100%" fo:text-align="justify" style:justify-single-word="false" fo:text-indent="0cm" style:auto-text-indent="false">
        <style:tab-stops/>
      </style:paragraph-properties>
      <style:text-properties officeooo:paragraph-rsid="001cfb51"/>
    </style:style>
    <style:style style:name="P32" style:family="paragraph" style:parent-style-name="Text_20_body" style:list-style-name="L2">
      <style:paragraph-properties fo:margin-left="0cm" fo:margin-top="0cm" fo:margin-bottom="0.199cm" style:contextual-spacing="false" fo:line-height="100%" fo:text-align="justify" style:justify-single-word="false" fo:text-indent="0cm" style:auto-text-indent="false">
        <style:tab-stops/>
      </style:paragraph-properties>
    </style:style>
    <style:style style:name="P33" style:family="paragraph" style:parent-style-name="Text_20_body" style:list-style-name="L3">
      <style:paragraph-properties fo:margin-top="0cm" fo:margin-bottom="0.199cm" style:contextual-spacing="false" fo:line-height="100%" fo:text-align="justify" style:justify-single-word="false"/>
    </style:style>
    <style:style style:name="P34" style:family="paragraph" style:parent-style-name="Text_20_body" style:list-style-name="L6">
      <style:paragraph-properties fo:margin-top="0cm" fo:margin-bottom="0.199cm" style:contextual-spacing="false" fo:line-height="100%"/>
      <style:text-properties officeooo:paragraph-rsid="001f0b56"/>
    </style:style>
    <style:style style:name="P35" style:family="paragraph" style:parent-style-name="Text_20_body" style:list-style-name="L6">
      <style:paragraph-properties fo:margin-top="0cm" fo:margin-bottom="0.199cm" style:contextual-spacing="false" fo:line-height="100%"/>
      <style:text-properties officeooo:paragraph-rsid="002b533c"/>
    </style:style>
    <style:style style:name="P36" style:family="paragraph" style:parent-style-name="Text_20_body" style:list-style-name="L5">
      <style:paragraph-properties fo:margin-left="0cm" fo:margin-top="0cm" fo:margin-bottom="0.199cm" style:contextual-spacing="false" fo:line-height="100%" fo:text-indent="0cm" style:auto-text-indent="false">
        <style:tab-stops/>
      </style:paragraph-properties>
      <style:text-properties fo:font-variant="normal" fo:text-transform="none" fo:color="#3d3d3d" loext:opacity="100%" style:font-name="Liberation Serif" fo:font-size="11pt" fo:letter-spacing="normal" style:rfc-language-tag="ca-ES-valencia" fo:language="ca" fo:country="ES" fo:font-style="normal" fo:font-weight="normal" officeooo:rsid="00157a35" officeooo:paragraph-rsid="001f0b56" fo:background-color="#ffffff" style:font-size-asian="11pt" style:font-size-complex="11pt" loext:padding="0.049cm" loext:border="none"/>
    </style:style>
    <style:style style:name="P37" style:family="paragraph" style:parent-style-name="Text_20_body" style:list-style-name="L5">
      <style:paragraph-properties fo:margin-left="0cm" fo:margin-top="0cm" fo:margin-bottom="0.199cm" style:contextual-spacing="false" fo:line-height="100%" fo:text-indent="0cm" style:auto-text-indent="false">
        <style:tab-stops/>
      </style:paragraph-properties>
      <style:text-properties fo:font-variant="normal" fo:text-transform="none" fo:color="#3d3d3d" loext:opacity="100%" style:font-name="Liberation Serif" fo:font-size="11pt" fo:letter-spacing="normal" style:rfc-language-tag="ca-ES-valencia" fo:language="ca" fo:country="ES" fo:font-style="normal" fo:font-weight="normal" officeooo:rsid="001c186e" officeooo:paragraph-rsid="001f0b56" fo:background-color="#ffffff" style:font-size-asian="11pt" style:font-size-complex="11pt" loext:padding="0.049cm" loext:border="none"/>
    </style:style>
    <style:style style:name="P38" style:family="paragraph" style:parent-style-name="Text_20_body" style:list-style-name="L5">
      <style:paragraph-properties fo:margin-left="0cm" fo:margin-top="0cm" fo:margin-bottom="0.199cm" style:contextual-spacing="false" fo:line-height="100%" fo:text-indent="0cm" style:auto-text-indent="false">
        <style:tab-stops/>
      </style:paragraph-properties>
      <style:text-properties fo:font-variant="normal" fo:text-transform="none" fo:color="#3d3d3d" loext:opacity="100%" style:font-name="Liberation Serif" fo:font-size="11pt" fo:letter-spacing="normal" style:rfc-language-tag="ca-ES-valencia" fo:language="ca" fo:country="ES" fo:font-style="normal" fo:font-weight="normal" officeooo:rsid="001f0b56" officeooo:paragraph-rsid="001f0b56" fo:background-color="#ffffff" style:font-size-asian="11pt" style:font-size-complex="11pt" loext:padding="0.049cm" loext:border="none"/>
    </style:style>
    <style:style style:name="P39" style:family="paragraph">
      <style:paragraph-properties fo:text-align="center"/>
    </style:style>
    <style:style style:name="P40" style:family="paragraph">
      <style:paragraph-properties fo:margin-left="0cm" fo:margin-right="0cm" fo:text-align="center" fo:text-indent="0cm"/>
    </style:style>
    <style:style style:name="P41" style:family="paragraph">
      <loext:graphic-properties draw:fill="none" draw:fill-color="#ffffff"/>
      <style:paragraph-properties fo:text-align="start"/>
      <style:text-properties style:font-name="Calibri" fo:font-size="6pt" style:font-size-asian="6pt" style:font-size-complex="6pt"/>
    </style:style>
    <style:style style:name="P4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color="#3d3d3d" loext:opacity="100%" fo:font-size="11pt" fo:background-color="#ffffff" loext:char-shading-value="0" style:font-size-asian="11pt" style:font-size-complex="11pt"/>
    </style:style>
    <style:style style:name="T2" style:family="text">
      <style:text-properties fo:color="#3d3d3d" loext:opacity="100%" fo:font-size="11pt" officeooo:rsid="001c186e" fo:background-color="#ffffff" loext:char-shading-value="0" style:font-size-asian="11pt" style:font-size-complex="11pt"/>
    </style:style>
    <style:style style:name="T3" style:family="text">
      <style:text-properties fo:color="#3d3d3d" loext:opacity="100%" fo:font-size="11pt" officeooo:rsid="001f9dbf" fo:background-color="#ffffff" loext:char-shading-value="0" style:font-size-asian="11pt" style:font-size-complex="11pt"/>
    </style:style>
    <style:style style:name="T4" style:family="text">
      <style:text-properties fo:color="#3d3d3d" loext:opacity="100%" fo:font-size="11pt" officeooo:rsid="001f0b56" fo:background-color="#ffffff" loext:char-shading-value="0" style:font-size-asian="11pt" style:font-size-complex="11pt"/>
    </style:style>
    <style:style style:name="T5" style:family="text">
      <style:text-properties fo:color="#3d3d3d" loext:opacity="100%" fo:font-size="11pt" officeooo:rsid="00250908" fo:background-color="#ffffff" loext:char-shading-value="0" style:font-size-asian="11pt" style:font-size-complex="11pt"/>
    </style:style>
    <style:style style:name="T6" style:family="text">
      <style:text-properties fo:color="#3d3d3d" loext:opacity="100%" fo:font-size="11pt" officeooo:rsid="002b533c" fo:background-color="#ffffff" loext:char-shading-value="0" style:font-size-asian="11pt" style:font-size-complex="11pt"/>
    </style:style>
    <style:style style:name="T7" style:family="text">
      <style:text-properties fo:color="#3d3d3d" loext:opacity="100%" fo:font-size="11pt" fo:font-weight="bold" fo:background-color="#ffffff" loext:char-shading-value="0" style:font-size-asian="11pt" style:font-weight-asian="bold" style:font-size-complex="11pt" style:font-weight-complex="bold"/>
    </style:style>
    <style:style style:name="T8" style:family="text">
      <style:text-properties fo:color="#3d3d3d" loext:opacity="100%" fo:font-size="11pt" style:font-size-asian="11pt" style:font-size-complex="11pt"/>
    </style:style>
    <style:style style:name="T9" style:family="text">
      <style:text-properties fo:color="#2a6099" loext:opacity="100%" fo:font-size="11pt" fo:font-weight="bold" fo:background-color="#ffffff" loext:char-shading-value="0" style:font-size-asian="11pt" style:font-weight-asian="bold" style:font-size-complex="11pt" style:font-weight-complex="bold"/>
    </style:style>
    <style:style style:name="T10" style:family="text">
      <style:text-properties officeooo:rsid="001cfb51"/>
    </style:style>
    <style:style style:name="T11" style:family="text">
      <style:text-properties fo:color="#c9211e" loext:opacity="100%" style:font-name="Webdings" fo:font-size="16pt" officeooo:rsid="001cfb51" fo:background-color="#ffffff" loext:char-shading-value="0" style:font-name-asian="Webdings" style:font-size-asian="16pt" style:font-name-complex="Webdings" style:font-size-complex="16pt"/>
    </style:style>
    <style:style style:name="T12" style:family="text">
      <style:text-properties fo:color="#c9211e" loext:opacity="100%" style:font-name="Wingdings" fo:font-size="22pt" officeooo:rsid="001f0b56" style:font-name-asian="Wingdings" style:font-size-asian="22pt" style:font-name-complex="Wingdings" style:font-size-complex="22pt"/>
    </style:style>
    <style:style style:name="T13" style:family="text">
      <style:text-properties fo:color="#c9211e" loext:opacity="100%" fo:font-weight="bold" officeooo:rsid="001f29aa" style:font-weight-asian="bold" style:font-weight-complex="bold"/>
    </style:style>
    <style:style style:name="T14" style:family="text">
      <style:text-properties fo:color="#c9211e" loext:opacity="100%" fo:font-weight="bold" officeooo:rsid="001f0b56" style:font-weight-asian="bold" style:font-weight-complex="bold"/>
    </style:style>
    <style:style style:name="T15" style:family="text">
      <style:text-properties fo:color="#c9211e" loext:opacity="100%" fo:font-weight="bold" officeooo:rsid="001cb831" fo:background-color="#ffffff" loext:char-shading-value="0" style:font-weight-asian="bold" style:font-weight-complex="bold"/>
    </style:style>
    <style:style style:name="T16" style:family="text">
      <style:text-properties fo:color="#c9211e" loext:opacity="100%" fo:font-weight="bold" officeooo:rsid="001f0b56" fo:background-color="#ffffff" loext:char-shading-value="0" style:font-weight-asian="bold" style:font-weight-complex="bold"/>
    </style:style>
    <style:style style:name="T17" style:family="text">
      <style:text-properties fo:color="#c9211e" loext:opacity="100%" fo:font-size="14pt" fo:font-weight="bold" officeooo:rsid="00226625" fo:background-color="#ffffff" loext:char-shading-value="0" style:font-size-asian="14pt" style:font-weight-asian="bold" style:font-size-complex="14pt" style:font-weight-complex="bold"/>
    </style:style>
    <style:style style:name="T18" style:family="text">
      <style:text-properties fo:color="#c9211e" loext:opacity="100%" fo:font-size="11pt" officeooo:rsid="001c186e" fo:background-color="#ffffff" loext:char-shading-value="0" style:font-size-asian="11pt" style:font-size-complex="11pt"/>
    </style:style>
    <style:style style:name="T19" style:family="text">
      <style:text-properties fo:font-weight="bold" fo:background-color="#f8f8f8" loext:char-shading-value="0" style:font-weight-asian="bold" style:font-weight-complex="bold"/>
    </style:style>
    <style:style style:name="T20" style:family="text">
      <style:text-properties fo:font-weight="bold" style:font-weight-asian="bold" style:font-weight-complex="bold"/>
    </style:style>
    <style:style style:name="T21" style:family="text">
      <style:text-properties officeooo:rsid="001cb831"/>
    </style:style>
    <style:style style:name="T22" style:family="text">
      <style:text-properties officeooo:rsid="001f29aa"/>
    </style:style>
    <style:style style:name="T23" style:family="text">
      <style:text-properties fo:background-color="#ffffff" loext:char-shading-value="0"/>
    </style:style>
    <style:style style:name="T24" style:family="text">
      <style:text-properties officeooo:rsid="001c186e" fo:background-color="#ffffff" loext:char-shading-value="0"/>
    </style:style>
    <style:style style:name="T25" style:family="text">
      <style:text-properties officeooo:rsid="001cb831" fo:background-color="#ffffff" loext:char-shading-value="0"/>
    </style:style>
    <style:style style:name="T26" style:family="text">
      <style:text-properties fo:font-variant="normal" fo:text-transform="none" style:font-name="Liberation Serif" fo:letter-spacing="normal" style:rfc-language-tag="ca-ES-valencia" fo:language="ca" fo:country="ES" fo:font-style="normal" fo:font-weight="normal" officeooo:rsid="00157a35" fo:background-color="#ffffff" loext:char-shading-value="0" loext:padding="0.049cm" loext:border="none"/>
    </style:style>
    <style:style style:name="T27" style:family="text">
      <style:text-properties fo:font-variant="normal" fo:text-transform="none" style:font-name="Liberation Serif" fo:letter-spacing="normal" style:rfc-language-tag="ca-ES-valencia" fo:language="ca" fo:country="ES" fo:font-style="normal" fo:font-weight="normal" fo:background-color="#ffffff" loext:char-shading-value="0" loext:padding="0.049cm" loext:border="none"/>
    </style:style>
    <style:style style:name="T28" style:family="text">
      <style:text-properties fo:font-variant="normal" fo:text-transform="none" style:font-name="Liberation Serif" fo:letter-spacing="normal" style:rfc-language-tag="ca-ES-valencia" fo:language="ca" fo:country="ES" fo:font-style="normal" fo:font-weight="normal" officeooo:rsid="001cb831" fo:background-color="#ffffff" loext:char-shading-value="0" loext:padding="0.049cm" loext:border="none"/>
    </style:style>
    <style:style style:name="T29" style:family="text">
      <style:text-properties fo:font-variant="normal" fo:text-transform="none" style:font-name="Liberation Serif" fo:letter-spacing="normal" style:rfc-language-tag="ca-ES-valencia" fo:language="ca" fo:country="ES" fo:font-style="normal" fo:font-weight="normal" officeooo:rsid="00157a35" loext:padding="0.049cm" loext:border="none"/>
    </style:style>
    <style:style style:name="T30" style:family="text">
      <style:text-properties fo:font-variant="normal" fo:text-transform="none" style:font-name="Liberation Serif" fo:letter-spacing="normal" style:rfc-language-tag="ca-ES-valencia" fo:language="ca" fo:country="ES" fo:font-style="normal" fo:font-weight="normal" loext:padding="0.049cm" loext:border="none"/>
    </style:style>
    <style:style style:name="T31" style:family="text">
      <style:text-properties fo:font-variant="normal" fo:text-transform="none" style:font-name="Liberation Serif" fo:letter-spacing="normal" style:rfc-language-tag="ca-ES-valencia" fo:language="ca" fo:country="ES" fo:font-style="normal" fo:font-weight="normal" officeooo:rsid="001f0b56" loext:padding="0.049cm" loext:border="none"/>
    </style:style>
    <style:style style:name="T32" style:family="text">
      <style:text-properties officeooo:rsid="001f0b56"/>
    </style:style>
    <style:style style:name="T33" style:family="text">
      <style:text-properties officeooo:rsid="001c186e"/>
    </style:style>
    <style:style style:name="T34" style:family="text">
      <style:text-properties fo:color="#000000" loext:opacity="100%" fo:font-weight="bold" style:font-weight-asian="bold" style:font-weight-complex="bold"/>
    </style:style>
    <style:style style:name="T35" style:family="text">
      <style:text-properties officeooo:rsid="00250908"/>
    </style:style>
    <style:style style:name="T36" style:family="text">
      <style:text-properties officeooo:rsid="00277e4a"/>
    </style:style>
    <style:style style:name="T37" style:family="text">
      <style:text-properties officeooo:rsid="0029b9f0"/>
    </style:style>
    <style:style style:name="T38" style:family="text">
      <style:text-properties style:font-name="Calibri" fo:font-size="6pt" style:font-size-asian="6pt" style:font-size-complex="6pt"/>
    </style:style>
    <style:style style:name="T39" style:family="text">
      <style:text-properties style:font-name="Calibri" fo:font-size="6pt" style:font-size-asian="6pt" style:font-name-complex="Liberation Sans2" style:font-size-complex="6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499cm" fo:margin-left="1.499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LVL1" loext:num-list-format="%1%" text:bullet-char="➔">
        <style:list-level-properties text:list-level-position-and-space-mode="label-alignment">
          <style:list-level-label-alignment text:label-followed-by="listtab" fo:text-indent="-0.499cm" fo:margin-left="1.499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29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Com fer un treball de classe</text:p>
      <text:p text:style-name="P1"><text:bookmark-start text:name="_Int_lCSqWvjv"/>Un treball de classe ha de tenir la següent estructura….<text:bookmark-end text:name="_Int_lCSqWvjv"/></text:p>
      <text:list text:style-name="L1">
        <text:list-item>
          <text:p text:style-name="P17">Portada: ha de contenir el títol <text:span text:style-name="T10">(</text:span>comprensible, <text:span text:style-name="T10">curt, </text:span>clar, precís i representatiu del treball), nom de l'autor (i grup), nom del professor/a, nom del mòdul i data de lliurament, així com un logo del tema tractat.</text:p>
        </text:list-item>
        <text:list-item>
          <text:p text:style-name="P17">Per al desenvolupament del treballa s'utilitzarà una lletra de tipus Arial, Liberation Serif <text:span text:style-name="T35">o similar, </text:span>a 12/13 punts, color <text:span text:style-name="T34">negre</text:span>. Els títols dels apartats poden ser (opcional) un o dos punts mes grans i amb colors blau , verd , o <text:span text:style-name="T37">roig</text:span>.</text:p>
        </text:list-item>
        <text:list-item>
          <text:p text:style-name="P30"><text:span text:style-name="Fuente_20_de_20_párrafo_20_predeter."><text:span text:style-name="T1">Índex: Ha de contenir totes les parts del treball. Es pot fer un primer índex provisional que s'anirà modificant a mesura que el treball avança. L'índex final anirà paginat. </text:span></text:span><text:span text:style-name="Fuente_20_de_20_párrafo_20_predeter."><text:span text:style-name="T5">S’utilitzaran </text:span></text:span><text:span text:style-name="Fuente_20_de_20_párrafo_20_predeter."><text:span text:style-name="T1">índexs automàtics (acostumat a utilitzar estils). </text:span></text:span><text:span text:style-name="Fuente_20_de_20_párrafo_20_predeter."><text:span text:style-name="T11"></text:span></text:span><text:span text:style-name="Fuente_20_de_20_párrafo_20_predeter."><text:span text:style-name="T1"> </text:span></text:span><text:a xlink:type="simple" xlink:href="https://vivaelsoftwarelibre.com/indice-de-un-modo-automatico-en-libreoffice/" office:target-frame-name="_top" xlink:show="replace" text:style-name="Internet_20_link" text:visited-style-name="Visited_20_Internet_20_Link">Com crear índex automàtic</text:a><text:span text:style-name="Fuente_20_de_20_párrafo_20_predeter."><text:span text:style-name="T1"> .</text:span></text:span></text:p>
        </text:list-item>
        <text:list-item>
          <text:p text:style-name="P17">Introducció: En ella s'exposaran els objectius, especificant l'àmbit, l'abast i els límits de la recerca; es realitzarà una breu descripció dels capítols, amb la metodologia emprada i s'exposarà la principal conclusió aconseguida; poden afegir-se els agraïments.</text:p>
        </text:list-item>
        <text:list-item>
          <text:p text:style-name="P18">Desenvolupament del tema: organitzat en capítols o apartats. HAURAN D'ESTAR TOTS ELS APARTATS DESENVOLUPATS. Per a cada punt del treball, copia primer l’enunciat, el que es pregunta i posa el número del punt. <text:s/>Explica tant els que han tingut èxit com els que no, i el perquè de cadascun.</text:p>
        </text:list-item>
        <text:list-item>
          <text:p text:style-name="P30"><text:span text:style-name="Fuente_20_de_20_párrafo_20_predeter."><text:span text:style-name="T1">Conclusions: s'exposaran amb una redacció clara. Es poden ressaltar resultats positius, negatius, qüestions pendents, etc. <text:s/>(mira el document d’Aules <text:s/></text:span></text:span><text:span text:style-name="Fuente_20_de_20_párrafo_20_predeter."><text:span text:style-name="T9">«Com fer un treball de classe (conclusions)»</text:span></text:span><text:span text:style-name="Fuente_20_de_20_párrafo_20_predeter."><text:span text:style-name="T1">)</text:span></text:span></text:p>
        </text:list-item>
        <text:list-item>
          <text:p text:style-name="P17">Referències consultades: sempre s'han de posar totes les fonts que s'han consultat, això donarà fe de la teva honradesa, generositat i sensibilitat intel·lectual, a més de reforçar els arguments exposats. “Els plagis es produeixen quan l'autor fa passar idees, paraules o informació d'una altra font com si anessin pròpies ometent expressament la referència a la seva autoria veritable” .</text:p>
        </text:list-item>
        <text:list-item>
          <text:p text:style-name="P31"><text:span text:style-name="Fuente_20_de_20_párrafo_20_predeter."><text:span text:style-name="T1">Les referències consultades s’han de posar en un format estàndard, amb informació de la font ( no sols la font, o url). </text:span></text:span><text:span text:style-name="Fuente_20_de_20_párrafo_20_predeter."><text:span text:style-name="T11"> </text:span></text:span><text:span text:style-name="Fuente_20_de_20_párrafo_20_predeter."><text:span text:style-name="T1">Consulta l'enllaç “</text:span></text:span><text:a xlink:type="simple" xlink:href="https://normas-apa.org/referencias/citar-pagina-web/" office:target-frame-name="_top" xlink:show="replace" text:style-name="Internet_20_link" text:visited-style-name="Visited_20_Internet_20_Link"><text:span text:style-name="Fuente_20_de_20_párrafo_20_predeter.">Com citar la informació d'una web</text:span></text:a><text:span text:style-name="Fuente_20_de_20_párrafo_20_predeter."><text:span text:style-name="T1">“ i segueix les normes de citació.</text:span></text:span></text:p>
        </text:list-item>
        <text:list-item>
          <text:p text:style-name="P17">Annexos (opcional): contenen informació que no és rellevant per al desenvolupament del treball, però el complementa. Per exemple: taules, fotos, etc.</text:p>
        </text:list-item>
        <text:list-item>
          <text:p text:style-name="P25">Signar els treballs electrònicament</text:p>
        </text:list-item>
        <text:list-item>
          <text:p text:style-name="P25">Opcional: Llicenciar els documents. (Creative Commons)</text:p>
        </text:list-item>
      </text:list>
      <text:p text:style-name="P7"/>
      <text:p text:style-name="P1">….i seguir les següents regles:</text:p>
      <text:list text:style-name="L2">
        <text:list-item>
          <text:p text:style-name="P19">Busca informació addicional en internet que amplie el teu treball i que complemente els resultats obtinguts. Consulta aquesta informació i rebutja la no rellevant.</text:p>
        </text:list-item>
        <text:list-item>
          <text:p text:style-name="P19">Evita el còpia &amp; pega. Redacta les teues pròpies conclusions. Si copia&amp;pegues, cita, envolta amb cometes i referencials en l'apartat de Webgrafia, Bibliografia o Bibliografia web.</text:p>
        </text:list-item>
        <text:list-item>
          <text:p text:style-name="P32"><text:span text:style-name="Fuente_20_de_20_párrafo_20_predeter."><text:span text:style-name="T1">Les captures de pantalla aniran acompanyades d'un títol i d'una explicació del que es pretén mostrar amb elles. <text:s text:c="2"/>-Les captures han </text:span></text:span><text:span text:style-name="Fuente_20_de_20_párrafo_20_predeter."><text:span text:style-name="T7">d'ajudar</text:span></text:span><text:span text:style-name="Fuente_20_de_20_párrafo_20_predeter."><text:span text:style-name="T1"> a l'explicació, </text:span></text:span><text:span text:style-name="Fuente_20_de_20_párrafo_20_predeter."><text:span text:style-name="T7">no ser</text:span></text:span><text:span text:style-name="Fuente_20_de_20_párrafo_20_predeter."><text:span text:style-name="T1"> l'explicació-</text:span></text:span></text:p>
        </text:list-item>
        <text:list-item>
          <text:p text:style-name="P19">Construeix frases curtes respectant l'ordre natural de l'oració: subjecte, verb, complements.</text:p>
        </text:list-item>
        <text:list-item>
          <text:p text:style-name="P19">Utilitza correctors ortogràfics informàtics i no oblides llegir el text.</text:p>
        </text:list-item>
        <text:list-item>
          <text:p text:style-name="P19">Utilitzar format de citació en les referències, posant títol, autor, data publicació, data consulta o una altra informació rellevant que enriqueix la referència.</text:p>
        </text:list-item>
        <text:list-item>
          <text:p text:style-name="P19">Lliurament del treball en el format sol·licitat i dins del període establert.</text:p>
        </text:list-item>
      </text:list>
      <text:p text:style-name="P9"/>
      <text:p text:style-name="P10"/>
      <text:p text:style-name="P10"/>
      <text:p text:style-name="P6"><text:soft-page-break/><text:span text:style-name="T19">Millores en la redacció del treball</text:span></text:p>
      <text:p text:style-name="P2"/>
      <text:list text:style-name="L3">
        <text:list-item>
          <text:p text:style-name="P20">Per a cada punt del treball, copia primer el enunciat, el que es pregunta i posa el número del punt.</text:p>
        </text:list-item>
        <text:list-item>
          <text:p text:style-name="P20">Utilitza el mateix idioma en tot el treball</text:p>
        </text:list-item>
        <text:list-item>
          <text:p text:style-name="P33"><text:span text:style-name="Fuente_20_de_20_párrafo_20_predeter."><text:span text:style-name="T8">Mostra els passos que es realitzen per arribar a la solució</text:span></text:span></text:p>
        </text:list-item>
        <text:list-item>
          <text:p text:style-name="P33"><text:span text:style-name="Fuente_20_de_20_párrafo_20_predeter."><text:span text:style-name="T8">Mostra la solució, indica en la captura o escriu-la per mostrar quina es.</text:span></text:span></text:p>
        </text:list-item>
        <text:list-item>
          <text:p text:style-name="P20">Inclou captures del treball realitzat, on es veja el desenvolupament d'aquest, i on s’aclareix l'explicació del procés. Si la solució està en la captura, edita-la per indicar-la.</text:p>
        </text:list-item>
        <text:list-item>
          <text:p text:style-name="P20">Posa captures de les pantalles on es pose informació rellevant. No poses captures de pantalles que sols es posa la opció per defecte ( següent, següent, ...).</text:p>
        </text:list-item>
        <text:list-item>
          <text:p text:style-name="P20">Posa fotos del teu treball. Si estàs fent un treball de un dispositiu raspberry, posa fotos de la raspberry que estàs configurant o muntant, no de una raspberry de google.</text:p>
        </text:list-item>
        <text:list-item>
          <text:p text:style-name="P20">No utilitzes captures de pantalla completa, ja que dificulta la comprensió. Tampoc utilitzes captures d'una regió massa petita, on no es puga veure el context. La grandària del text de les captures ha de ser similar al del document</text:p>
        </text:list-item>
        <text:list-item>
          <text:p text:style-name="P26">En les captures, intenta que es puga vore el <text:span text:style-name="T34">context</text:span> ( nom màquina, usuari, path, connexió, etc..)</text:p>
        </text:list-item>
        <text:list-item>
          <text:p text:style-name="P20">Etiqueta tots els elements visuals amb una denominació numèrica per a la seva posterior referència en les explicacions. Figura 1, Figura 2, Figura 3, i una breu descripció de l’element. <text:s text:c="2"/><text:span text:style-name="T36">En LibreOffice es fa amb l’opció de <text:s/>«insertar leyenda» punxant sobre la imatge.</text:span></text:p>
        </text:list-item>
      </text:list>
      <text:p text:style-name="P12"><draw:frame draw:style-name="fr1" draw:name="Imagen2" text:anchor-type="paragraph" svg:x="2.72cm" svg:y="0.002cm" svg:width="14.236cm" style:rel-width="scale" svg:height="3.826cm" style:rel-height="scale" draw:z-index="0"><draw:image xlink:href="Pictures/1000000000000407000001151E06C29D.png" xlink:type="simple" xlink:show="embed" xlink:actuate="onLoad" draw:mime-type="image/png"/></draw:frame><text:span text:style-name="Fuente_20_de_20_párrafo_20_predeter."><text:span text:style-name="T1"/></text:span></text:p>
      <text:p text:style-name="P9"/>
      <text:p text:style-name="P9"/>
      <text:p text:style-name="P9"/>
      <text:p text:style-name="P9"/>
      <text:p text:style-name="P9"/>
      <text:list text:continue-numbering="true" text:style-name="L3">
        <text:list-item>
          <text:p text:style-name="P33"><text:span text:style-name="Fuente_20_de_20_párrafo_20_predeter."><text:span text:style-name="T1">Els elements visuals, com a captures, fotos, gràfics, etc.. han </text:span></text:span><text:span text:style-name="Fuente_20_de_20_párrafo_20_predeter."><text:span text:style-name="T7">d'ajudar a l'explicació, no ser l'explicació</text:span></text:span><text:span text:style-name="Fuente_20_de_20_párrafo_20_predeter."><text:span text:style-name="T1"> <text:s/></text:span></text:span></text:p>
        </text:list-item>
        <text:list-item>
          <text:p text:style-name="P15"><text:span text:style-name="Fuente_20_de_20_párrafo_20_predeter.">Utilitza taules i/o llistes quan siga necessari.</text:span></text:p>
        </text:list-item>
      </text:list>
      <text:p text:style-name="P9"/>
      <text:p text:style-name="P3"><text:span text:style-name="T21">Recorda</text:span>:</text:p>
      <text:p text:style-name="P11">Un treball sense explicacions i sols amb captures, <text:span text:style-name="T20">NO és un treball</text:span>. <text:s text:c="2"/><text:span text:style-name="T12"></text:span></text:p>
      <text:p text:style-name="P13"><text:span text:style-name="Fuente_20_de_20_párrafo_20_predeter."><text:span text:style-name="T1"/></text:span></text:p>
      <text:p text:style-name="P5">Abans de l’entrega final:</text:p>
      <text:list text:style-name="L4">
        <text:list-item>
          <text:p text:style-name="P21">Fes una lectura detinguda del text sense oblidar <text:span text:style-name="T20">revisar l'ortografia i la sintaxi</text:span>.</text:p>
        </text:list-item>
        <text:list-item>
          <text:p text:style-name="P21">Completa l'índex, la introducció, les cites de les fonts i la bibliografia. (Actualitza índex)</text:p>
        </text:list-item>
        <text:list-item>
          <text:p text:style-name="P21">Comprova que els títols dels capítols i les seves seccions coincideixen amb l'índex.</text:p>
        </text:list-item>
        <text:list-item>
          <text:p text:style-name="P21"><text:span text:style-name="Fuente_20_de_20_párrafo_20_predeter.">Revisa la paginació i comprova que coincideix amb la de l'índex. (Actualitza índex)</text:span></text:p>
        </text:list-item>
      </text:list>
      <text:p text:style-name="P14"><text:span text:style-name="Fuente_20_de_20_párrafo_20_predeter."><text:span text:style-name="T1"/></text:span></text:p>
      <text:p text:style-name="P14"><text:span text:style-name="Fuente_20_de_20_párrafo_20_predeter."><text:span text:style-name="T1"/></text:span></text:p>
      <text:p text:style-name="P14"><text:span text:style-name="Fuente_20_de_20_párrafo_20_predeter."><text:span text:style-name="T1"/></text:span></text:p>
      <text:p text:style-name="P14"><text:span text:style-name="Fuente_20_de_20_párrafo_20_predeter."><text:span text:style-name="T1"/></text:span></text:p>
      <text:p text:style-name="P14"><text:soft-page-break/><text:span text:style-name="Fuente_20_de_20_párrafo_20_predeter."><text:span text:style-name="T1"/></text:span></text:p>
      <text:p text:style-name="P4">Format:</text:p>
      <text:list text:style-name="L5">
        <text:list-item>
          <text:p text:style-name="P22">Portada separada d’índex</text:p>
        </text:list-item>
        <text:list-item>
          <text:p text:style-name="P22">Índex separat del cos del treball</text:p>
        </text:list-item>
        <text:list-item>
          <text:p text:style-name="P22">Contesta a totes les preguntes <text:span text:style-name="T32">(</text:span><text:span text:style-name="T14">i posa els enunciats !!</text:span><text:span text:style-name="T32">)</text:span></text:p>
        </text:list-item>
        <text:list-item>
          <text:p text:style-name="P24">Utilitza lletres de tipus <text:s/>Calibri, Candara, Arial, Tahoma o Trebuchet <text:s/>(grandària 12 punts )</text:p>
        </text:list-item>
        <text:list-item>
          <text:p text:style-name="P28"><text:span text:style-name="T29">P</text:span><text:span text:style-name="T30">er als punts i subpunts, utilitza colors, i grandària </text:span><text:span text:style-name="T31">lleugerament superior (</text:span><text:span text:style-name="T30"> 13, 14 o 15 </text:span><text:span text:style-name="T31">punts )</text:span></text:p>
        </text:list-item>
        <text:list-item>
          <text:p text:style-name="P23">Punts <text:span text:style-name="T21">i subpunts del treball, </text:span>destacats <text:span text:style-name="T21">i diferenciats </text:span><text:span text:style-name="T22">(</text:span><text:span text:style-name="T13">utilitza estils !!</text:span><text:span text:style-name="T22">)</text:span></text:p>
        </text:list-item>
        <text:list-item>
          <text:p text:style-name="P27"><text:span text:style-name="T23">Conclusions: </text:span><text:span text:style-name="T24">Personals </text:span><text:span text:style-name="T25">( </text:span><text:span text:style-name="T15">no utilitzes assistents, </text:span><text:span text:style-name="T16">ni IA, ni copia&amp;pega !!</text:span><text:span text:style-name="T25"> )</text:span></text:p>
        </text:list-item>
        <text:list-item>
          <text:p text:style-name="P22">Web grafia en format APA</text:p>
        </text:list-item>
        <text:list-item>
          <text:p text:style-name="P36">Utilitza capçalera i/o peu de pàgina, numerant les pàgines, i dotant-les de context.</text:p>
        </text:list-item>
        <text:list-item>
          <text:p text:style-name="P29"><text:span text:style-name="T26">E</text:span><text:span text:style-name="T27">n la capçalera posa el nom del treball i el nom de l’autor</text:span></text:p>
        </text:list-item>
        <text:list-item>
          <text:p text:style-name="P37">En el peu, numeració de pàgines</text:p>
        </text:list-item>
        <text:list-item>
          <text:p text:style-name="P29"><text:span text:style-name="T27">Separa la capçalera i el peu amb un</text:span><text:span text:style-name="T28">es</text:span><text:span text:style-name="T27"> líni</text:span><text:span text:style-name="T28">es</text:span><text:span text:style-name="T27"> o color de la resta de la pàgina</text:span></text:p>
        </text:list-item>
        <text:list-item>
          <text:p text:style-name="P37">No utilitzis captures de pantalla completa, ja que dificulta la comprensió</text:p>
        </text:list-item>
        <text:list-item>
          <text:p text:style-name="P37">No utilitzis captures d'una regió massa petita, on no es pugui veure el context.</text:p>
        </text:list-item>
        <text:list-item>
          <text:p text:style-name="P38">La grandària del text de les captures deu ser similar al del text del treball ( o un poc més gran)</text:p>
        </text:list-item>
        <text:list-item>
          <text:p text:style-name="P37">Etiqueta tots els elements visuals amb una denominació numèrica per a la seva posterior referència en les explicacions. Figura 1, Figura 2, Figura 3, i una breu descripció de l’element.</text:p>
        </text:list-item>
      </text:list>
      <text:p text:style-name="P8"><text:span text:style-name="Fuente_20_de_20_párrafo_20_predeter."><text:span text:style-name="T1"/></text:span></text:p>
      <text:p text:style-name="P3"><text:span text:style-name="T33">E</text:span>ntrega final:</text:p>
      <text:list text:style-name="L6">
        <text:list-item>
          <text:p text:style-name="P34"><text:span text:style-name="Fuente_20_de_20_párrafo_20_predeter."><text:span text:style-name="T2">Entrega el treball en </text:span></text:span><text:span text:style-name="Fuente_20_de_20_párrafo_20_predeter."><text:span text:style-name="T3">format </text:span></text:span><text:span text:style-name="Fuente_20_de_20_párrafo_20_predeter."><text:span text:style-name="T2"><text:s/></text:span></text:span><text:span text:style-name="Fuente_20_de_20_párrafo_20_predeter."><text:span text:style-name="T17">PDF</text:span></text:span><text:span text:style-name="Fuente_20_de_20_párrafo_20_predeter."><text:span text:style-name="T2"> amb </text:span></text:span><text:span text:style-name="Fuente_20_de_20_párrafo_20_predeter."><text:span text:style-name="T18">signatura electrònica</text:span></text:span></text:p>
        </text:list-item>
        <text:list-item>
          <text:p text:style-name="P34"><text:span text:style-name="Fuente_20_de_20_párrafo_20_predeter."><text:span text:style-name="T2">Entrega </text:span></text:span><text:span text:style-name="Fuente_20_de_20_párrafo_20_predeter."><text:span text:style-name="T4">també </text:span></text:span><text:span text:style-name="Fuente_20_de_20_párrafo_20_predeter."><text:span text:style-name="T2">el treball en el format original ( docx, <text:s/>odt, ... )</text:span></text:span></text:p>
        </text:list-item>
        <text:list-item>
          <text:p text:style-name="P35"><text:span text:style-name="Fuente_20_de_20_párrafo_20_predeter."><text:span text:style-name="T2">Si es demana, </text:span></text:span><text:span text:style-name="Fuente_20_de_20_párrafo_20_predeter."><text:span text:style-name="T6">e</text:span></text:span><text:span text:style-name="Fuente_20_de_20_párrafo_20_predeter."><text:span text:style-name="T2">ntrega el treball sense les captures <text:s/>( trau les captures )</text:span></text:span></text:p>
        </text:list-item>
        <text:list-item>
          <text:p text:style-name="P34"><text:span text:style-name="Fuente_20_de_20_párrafo_20_predeter."><text:span text:style-name="T2">Si es demana, entrega fitxers adjunts.</text:span></text:span></text:p>
        </text:list-item>
      </text:list>
      <text:p text:style-name="P8"/>
      <text:p text:style-name="P8"/>
      <text:p text:style-name="P8"><draw:frame text:anchor-type="paragraph" draw:z-index="2" draw:name="Marco de texto 1" draw:style-name="gr1" draw:text-style-name="P41" svg:width="3.387cm" svg:height="1.299cm" svg:x="12.386cm" svg:y="-0.194cm"><draw:text-box><text:p text:style-name="P39"><text:span text:style-name="T38">Aquesta obra de Enrique Iborra </text:span></text:p><text:p text:style-name="P40"><text:span text:style-name="T39">està subjecta a una llicència de </text:span></text:p><text:p text:style-name="P40"><text:span text:style-name="T38"><text:a xlink:href="https://creativecommons.org/licenses/by-sa/4.0/" xlink:type="simple">Reconeixement-CompartirIgual</text:a></text:span><text:span text:style-name="T38"><text:s/>4.0 </text:span></text:p><text:p text:style-name="P40"><text:span text:style-name="T38">Internacional de Creative Commons </text:span></text:p><text:p text:style-name="P40"><text:span text:style-name="T38"/></text:p></draw:text-box></draw:frame><draw:frame text:anchor-type="paragraph" draw:z-index="1" draw:name="Imagen con transparencia 2" draw:style-name="gr2" draw:text-style-name="P42" svg:width="2.202cm" svg:height="0.747cm" svg:x="15.704cm" svg:y="0.041cm"><draw:image xlink:href="Pictures/10000001000000580000001F1F6C62EE.png" xlink:type="simple" xlink:show="embed" xlink:actuate="onLoad" draw:mime-type="image/png"><text:p/></draw:image></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pitch="variable"/>
    <style:font-face style:name="Consolas" svg:font-family="Consola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NSimSun" svg:font-family="NSimSun" style:font-family-generic="modern" style:font-pitch="fixed"/>
    <style:font-face style:name="Noto Sans" svg:font-family="'Noto Sans'" style:font-family-generic="roman" style:font-pitch="variable"/>
    <style:font-face style:name="OpenSymbol" svg:font-family="OpenSymbol" style:font-family-generic="system" style:font-charset="x-symbol"/>
    <style:font-face style:name="OpenSymbol1" svg:font-family="OpenSymbol, 'Arial Unicode MS'" style:font-family-generic="roman" style:font-pitch="variable"/>
    <style:font-face style:name="Tahoma" svg:font-family="Tahoma" style:font-family-generic="modern" style:font-pitch="fixed"/>
    <style:font-face style:name="Webdings" svg:font-family="Webdings"/>
    <style:font-face style:name="Wingdings" svg:font-family="Wingdings"/>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1"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style:font-name="Liberation Serif" fo:font-family="'Liberation Serif'" style:font-family-generic="roman" style:font-pitch="variable" fo:font-size="12pt" fo:font-weight="bold" style:font-name-asian="NSimSun" style:font-family-asian="NSimSun" style:font-family-generic-asian="modern" style:font-pitch-asian="fixed" style:font-size-asian="12pt" style:font-weight-asian="bold" style:font-size-complex="12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Estilo_20_de_20_dibujo_20_predeterminado" style:display-name="Estilo de dibujo predeterminado"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modern" style:font-pitch-asian="fixed" style:font-size-asian="18pt" style:font-style-asian="normal" style:font-weight-asian="normal" style:font-name-complex="Consolas" style:font-family-complex="Consolas" style:font-family-generic-complex="swiss" style:font-pitch-complex="variable" style:font-size-complex="12pt" style:text-emphasize="none"/>
    </style:style>
    <style:style style:name="Objeto_20_sin_20_relleno" style:display-name="Objeto sin relleno" style:family="paragraph" style:parent-style-name="Estilo_20_de_20_dibujo_20_predeterminado">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Estilo_20_de_20_dibujo_20_predeterminado">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Título_20_general_20_A4" style:display-name="Título general A4" style:family="paragraph" style:parent-style-name="A4">
      <style:text-properties style:font-name="Noto Sans" fo:font-family="'Noto Sans'" style:font-family-generic="roman" style:font-pitch="variable" fo:font-size="44pt" style:font-size-asian="44pt"/>
    </style:style>
    <style:style style:name="Título_20_A4" style:display-name="Título A4" style:family="paragraph" style:parent-style-name="A4">
      <style:text-properties style:font-name="Noto Sans" fo:font-family="'Noto Sans'" style:font-family-generic="roman" style:font-pitch="variable" fo:font-size="24pt" style:font-size-asian="24pt"/>
    </style:style>
    <style:style style:name="Texto_20_A4" style:display-name="Texto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ítulo_20_general_20_A0" style:display-name="Título general A0" style:family="paragraph" style:parent-style-name="A4">
      <style:text-properties style:font-name="Noto Sans" fo:font-family="'Noto Sans'" style:font-family-generic="roman" style:font-pitch="variable" fo:font-size="96pt" style:font-size-asian="96pt"/>
    </style:style>
    <style:style style:name="Título_20_A0" style:display-name="Título A0" style:family="paragraph" style:parent-style-name="A4">
      <style:text-properties style:font-name="Noto Sans" fo:font-family="'Noto Sans'" style:font-family-generic="roman" style:font-pitch="variable" fo:font-size="71.5pt" style:font-size-asian="71.5pt"/>
    </style:style>
    <style:style style:name="Texto_20_A0" style:display-name="Texto A0" style:family="paragraph" style:parent-style-name="A4">
      <style:text-properties style:font-name="Noto Sans" fo:font-family="'Noto Sans'" style:font-family-generic="roman" style:font-pitch="variable" fo:font-size="18pt" style:font-size-asian="18pt"/>
    </style:style>
    <style:style style:name="Imagen" style:family="paragraph">
      <style:text-properties style:font-name="Liberation Sans" fo:font-family="'Liberation Sans'" style:font-family-generic="roman" style:font-pitch="variable" fo:font-size="18pt" style:font-name-asian="Tahoma" style:font-family-asian="Tahoma" style:font-family-generic-asian="modern" style:font-pitch-asian="fixed" style:font-size-asian="18pt" style:font-name-complex="Consolas" style:font-family-complex="Consolas" style:font-family-generic-complex="swiss" style:font-pitch-complex="variable" style:font-size-complex="12pt"/>
    </style:style>
    <style:style style:name="Formas" style:family="paragraph" style:parent-style-name="Imagen">
      <style:text-properties style:font-name="Liberation Sans" fo:font-family="'Liberation Sans'" style:font-family-generic="roman" style:font-pitch="variable" fo:font-size="14pt" fo:font-weight="bold" style:font-size-asian="14pt" style:font-weight-asian="bold"/>
    </style:style>
    <style:style style:name="Rellenado" style:family="paragraph" style:parent-style-name="Formas">
      <style:text-properties style:font-name="Liberation Sans"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Contorneado" style:family="paragraph" style:parent-style-name="Formas">
      <style:text-properties style:font-name="Liberation Sans"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text-properties fo:color="#355269" loext:opacity="100%" style:font-name="Liberation Sans"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text-properties fo:color="#127622" loext:opacity="100%" style:font-name="Liberation Sans"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text-properties fo:color="#c9211e" loext:opacity="100%" style:font-name="Liberation Sans"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text-properties fo:color="#b47804" loext:opacity="100%" style:font-name="Liberation Sans" fo:font-family="'Liberation Sans'" style:font-family-generic="roman" style:font-pitch="variable" fo:font-size="14pt" fo:font-weight="bold" style:font-size-asian="14pt" style:font-weight-asian="bold"/>
    </style:style>
    <style:style style:name="Líneas" style:family="paragraph" style:parent-style-name="Imagen">
      <style:text-properties style:font-name="Liberation Sans" fo:font-family="'Liberation Sans'" style:font-family-generic="roman" style:font-pitch="variable" fo:font-size="18pt" style:font-size-asian="18pt"/>
    </style:style>
    <style:style style:name="Línea_20_con_20_flecha" style:display-name="Línea con flecha" style:family="paragraph" style:parent-style-name="Líneas">
      <style:text-properties style:font-name="Liberation Sans" fo:font-family="'Liberation Sans'" style:font-family-generic="roman" style:font-pitch="variable" fo:font-size="18pt" style:font-size-asian="18pt"/>
    </style:style>
    <style:style style:name="Línea_20_discontinua" style:display-name="Línea discontinua" style:family="paragraph" style:parent-style-name="Líneas">
      <style:text-properties style:font-name="Liberation Sans" fo:font-family="'Liberation Sans'" style:font-family-generic="roman" style:font-pitch="variable" fo:font-size="18pt" style:font-size-asian="18pt"/>
    </style:style>
    <style:style style:name="TITLE_7e_LT_7e_Gliederung_20_1" style:display-name="TITLE~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7e_LT_7e_Gliederung_20_2" style:display-name="TITLE~LT~Gliederung 2" style:family="paragraph" style:parent-style-name="TITLE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7e_LT_7e_Untertitel" style:display-name="TITLE~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Consolas" style:font-family-complex="Consolas" style:font-family-generic-complex="swiss" style:font-pitch-complex="variable" style:font-size-complex="12pt" style:text-emphasize="none"/>
    </style:style>
    <style:style style:name="TITLE_7e_LT_7e_Notizen" style:display-name="TITLE~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Consolas" style:font-family-complex="Consolas" style:font-family-generic-complex="swiss" style:font-pitch-complex="variable" style:font-size-complex="12pt" style:text-emphasize="none"/>
    </style:style>
    <style:style style:name="TITLE_7e_LT_7e_Hintergrundobjekte" style:display-name="TITL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7e_LT_7e_Hintergrund" style:display-name="TITL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default" style:family="paragraph">
      <style:text-properties style:use-window-font-color="true" loext:opacity="0%" style:font-name="Arial" fo:font-family="Arial" style:font-family-generic="roman" style:font-pitch="variable" fo:font-size="18pt" style:letter-kerning="true" style:font-name-asian="Tahoma" style:font-family-asian="Tahoma" style:font-family-generic-asian="modern" style:font-pitch-asian="fixed" style:font-size-asian="18pt" style:font-name-complex="Consolas" style:font-family-complex="Consolas" style:font-family-generic-complex="swiss" style:font-pitch-complex="variable" style:font-size-complex="12pt"/>
    </style:style>
    <style:style style:name="bg-non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dark-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ack"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ack-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bjetos_20_de_20_fondo" style:display-name="Objetos de fondo"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Fondo"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Notas"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Consolas" style:font-family-complex="Consolas" style:font-family-generic-complex="swiss" style:font-pitch-complex="variable" style:font-size-complex="12pt" style:text-emphasize="none"/>
    </style:style>
    <style:style style:name="Esquema_20_1" style:display-name="Esquema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Esquema_20_2" style:display-name="Esquema 2" style:family="paragraph" style:parent-style-name="Esquema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Esquema_20_3" style:display-name="Esquema 3" style:family="paragraph" style:parent-style-name="Esquema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Esquema_20_4" style:display-name="Esquema 4" style:family="paragraph" style:parent-style-name="Esquema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Esquema_20_5" style:display-name="Esquema 5" style:family="paragraph" style:parent-style-name="Esquema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e_20_sense_20_emplenament_20_ni_20_línia" style:display-name="Objecte sense emplenament ni línia" style:family="paragraph" style:parent-style-name="Estilo_20_de_20_dibujo_20_predeterminado">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iñetas" style:family="paragraph">
      <style:text-properties style:font-name="OpenSymbol1" fo:font-family="OpenSymbol, 'Arial Unicode MS'" style:font-family-generic="roman" style:font-pitch="variable" fo:font-size="12pt"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Enlace_20_de_20_Internet_20_visitado" style:display-name="Enlace de Internet visitado" style:family="paragraph">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Enlace_20_de_20_Internet" style:display-name="Enlace de Internet" style:family="paragraph">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5f_AND_5f_TWO_5f_COLUMNS_7e_LT_7e_Gliederung_20_1" style:display-name="TITLE_AND_TWO_COLUMNS~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5f_AND_5f_TWO_5f_COLUMNS_7e_LT_7e_Gliederung_20_2" style:display-name="TITLE_AND_TWO_COLUMNS~LT~Gliederung 2" style:family="paragraph" style:parent-style-name="TITLE_5f_AND_5f_TWO_5f_COLUMNS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3" style:display-name="TITLE_AND_TWO_COLUMNS~LT~Gliederung 3" style:family="paragraph" style:parent-style-name="TITLE_5f_AND_5f_TWO_5f_COLUMNS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4" style:display-name="TITLE_AND_TWO_COLUMNS~LT~Gliederung 4" style:family="paragraph" style:parent-style-name="TITLE_5f_AND_5f_TWO_5f_COLUMNS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5" style:display-name="TITLE_AND_TWO_COLUMNS~LT~Gliederung 5" style:family="paragraph" style:parent-style-name="TITLE_5f_AND_5f_TWO_5f_COLUMNS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6" style:display-name="TITLE_AND_TWO_COLUMNS~LT~Gliederung 6" style:family="paragraph" style:parent-style-name="TITLE_5f_AND_5f_TWO_5f_COLUMNS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7" style:display-name="TITLE_AND_TWO_COLUMNS~LT~Gliederung 7" style:family="paragraph" style:parent-style-name="TITLE_5f_AND_5f_TWO_5f_COLUMNS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8" style:display-name="TITLE_AND_TWO_COLUMNS~LT~Gliederung 8" style:family="paragraph" style:parent-style-name="TITLE_5f_AND_5f_TWO_5f_COLUMNS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9" style:display-name="TITLE_AND_TWO_COLUMNS~LT~Gliederung 9" style:family="paragraph" style:parent-style-name="TITLE_5f_AND_5f_TWO_5f_COLUMNS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Titel" style:display-name="TITLE_AND_TWO_COLUMNS~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5f_AND_5f_TWO_5f_COLUMNS_7e_LT_7e_Untertitel" style:display-name="TITLE_AND_TWO_COLUMNS~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Consolas" style:font-family-complex="Consolas" style:font-family-generic-complex="swiss" style:font-pitch-complex="variable" style:font-size-complex="12pt" style:text-emphasize="none"/>
    </style:style>
    <style:style style:name="TITLE_5f_AND_5f_TWO_5f_COLUMNS_7e_LT_7e_Notizen" style:display-name="TITLE_AND_TWO_COLUMNS~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Consolas" style:font-family-complex="Consolas" style:font-family-generic-complex="swiss" style:font-pitch-complex="variable" style:font-size-complex="12pt" style:text-emphasize="none"/>
    </style:style>
    <style:style style:name="TITLE_5f_AND_5f_TWO_5f_COLUMNS_7e_LT_7e_Hintergrundobjekte" style:display-name="TITLE_AND_TWO_COLUMNS~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5f_AND_5f_TWO_5f_COLUMNS_7e_LT_7e_Hintergrund" style:display-name="TITLE_AND_TWO_COLUMNS~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BLANK_7e_LT_7e_Gliederung_20_1" style:display-name="BLANK~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BLANK_7e_LT_7e_Gliederung_20_2" style:display-name="BLANK~LT~Gliederung 2" style:family="paragraph" style:parent-style-name="BLANK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BLANK_7e_LT_7e_Untertitel" style:display-name="BLANK~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Consolas" style:font-family-complex="Consolas" style:font-family-generic-complex="swiss" style:font-pitch-complex="variable" style:font-size-complex="12pt" style:text-emphasize="none"/>
    </style:style>
    <style:style style:name="BLANK_7e_LT_7e_Notizen" style:display-name="BLANK~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Consolas" style:font-family-complex="Consolas" style:font-family-generic-complex="swiss" style:font-pitch-complex="variable" style:font-size-complex="12pt" style:text-emphasize="none"/>
    </style:style>
    <style:style style:name="BLANK_7e_LT_7e_Hintergrundobjekte" style:display-name="BLANK~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BLANK_7e_LT_7e_Hintergrund" style:display-name="BLANK~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5f_1_7e_LT_7e_Gliederung_20_1" style:display-name="TITLE_1~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5f_1_7e_LT_7e_Gliederung_20_2" style:display-name="TITLE_1~LT~Gliederung 2" style:family="paragraph" style:parent-style-name="TITLE_5f_1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7e_LT_7e_Gliederung_20_3" style:display-name="TITLE_1~LT~Gliederung 3" style:family="paragraph" style:parent-style-name="TITLE_5f_1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7e_LT_7e_Gliederung_20_4" style:display-name="TITLE_1~LT~Gliederung 4" style:family="paragraph" style:parent-style-name="TITLE_5f_1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7e_LT_7e_Gliederung_20_5" style:display-name="TITLE_1~LT~Gliederung 5" style:family="paragraph" style:parent-style-name="TITLE_5f_1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Gliederung_20_6" style:display-name="TITLE_1~LT~Gliederung 6" style:family="paragraph" style:parent-style-name="TITLE_5f_1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Gliederung_20_7" style:display-name="TITLE_1~LT~Gliederung 7" style:family="paragraph" style:parent-style-name="TITLE_5f_1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Gliederung_20_8" style:display-name="TITLE_1~LT~Gliederung 8" style:family="paragraph" style:parent-style-name="TITLE_5f_1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Gliederung_20_9" style:display-name="TITLE_1~LT~Gliederung 9" style:family="paragraph" style:parent-style-name="TITLE_5f_1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Titel" style:display-name="TITLE_1~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5f_1_7e_LT_7e_Untertitel" style:display-name="TITLE_1~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Consolas" style:font-family-complex="Consolas" style:font-family-generic-complex="swiss" style:font-pitch-complex="variable" style:font-size-complex="12pt" style:text-emphasize="none"/>
    </style:style>
    <style:style style:name="TITLE_5f_1_7e_LT_7e_Notizen" style:display-name="TITLE_1~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Consolas" style:font-family-complex="Consolas" style:font-family-generic-complex="swiss" style:font-pitch-complex="variable" style:font-size-complex="12pt" style:text-emphasize="none"/>
    </style:style>
    <style:style style:name="TITLE_5f_1_7e_LT_7e_Hintergrundobjekte" style:display-name="TITLE_1~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5f_1_7e_LT_7e_Hintergrund" style:display-name="TITLE_1~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5f_1_5f_1_7e_LT_7e_Gliederung_20_1" style:display-name="TITLE_1_1~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5f_1_5f_1_7e_LT_7e_Gliederung_20_2" style:display-name="TITLE_1_1~LT~Gliederung 2" style:family="paragraph" style:parent-style-name="TITLE_5f_1_5f_1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1_7e_LT_7e_Gliederung_20_3" style:display-name="TITLE_1_1~LT~Gliederung 3" style:family="paragraph" style:parent-style-name="TITLE_5f_1_5f_1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1_7e_LT_7e_Gliederung_20_4" style:display-name="TITLE_1_1~LT~Gliederung 4" style:family="paragraph" style:parent-style-name="TITLE_5f_1_5f_1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1_7e_LT_7e_Gliederung_20_5" style:display-name="TITLE_1_1~LT~Gliederung 5" style:family="paragraph" style:parent-style-name="TITLE_5f_1_5f_1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Gliederung_20_6" style:display-name="TITLE_1_1~LT~Gliederung 6" style:family="paragraph" style:parent-style-name="TITLE_5f_1_5f_1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Gliederung_20_7" style:display-name="TITLE_1_1~LT~Gliederung 7" style:family="paragraph" style:parent-style-name="TITLE_5f_1_5f_1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Gliederung_20_8" style:display-name="TITLE_1_1~LT~Gliederung 8" style:family="paragraph" style:parent-style-name="TITLE_5f_1_5f_1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Gliederung_20_9" style:display-name="TITLE_1_1~LT~Gliederung 9" style:family="paragraph" style:parent-style-name="TITLE_5f_1_5f_1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Titel" style:display-name="TITLE_1_1~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5f_1_5f_1_7e_LT_7e_Untertitel" style:display-name="TITLE_1_1~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Consolas" style:font-family-complex="Consolas" style:font-family-generic-complex="swiss" style:font-pitch-complex="variable" style:font-size-complex="12pt" style:text-emphasize="none"/>
    </style:style>
    <style:style style:name="TITLE_5f_1_5f_1_7e_LT_7e_Notizen" style:display-name="TITLE_1_1~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Consolas" style:font-family-complex="Consolas" style:font-family-generic-complex="swiss" style:font-pitch-complex="variable" style:font-size-complex="12pt" style:text-emphasize="none"/>
    </style:style>
    <style:style style:name="TITLE_5f_1_5f_1_7e_LT_7e_Hintergrundobjekte" style:display-name="TITLE_1_1~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5f_1_5f_1_7e_LT_7e_Hintergrund" style:display-name="TITLE_1_1~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5f_AND_5f_BODY_7e_LT_7e_Gliederung_20_1" style:display-name="TITLE_AND_BODY~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5f_AND_5f_BODY_7e_LT_7e_Untertitel" style:display-name="TITLE_AND_BODY~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Consolas" style:font-family-complex="Consolas" style:font-family-generic-complex="swiss" style:font-pitch-complex="variable" style:font-size-complex="12pt" style:text-emphasize="none"/>
    </style:style>
    <style:style style:name="TITLE_5f_AND_5f_BODY_7e_LT_7e_Notizen" style:display-name="TITLE_AND_BODY~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Consolas" style:font-family-complex="Consolas" style:font-family-generic-complex="swiss" style:font-pitch-complex="variable" style:font-size-complex="12pt" style:text-emphasize="none"/>
    </style:style>
    <style:style style:name="TITLE_5f_AND_5f_BODY_7e_LT_7e_Hintergrundobjekte" style:display-name="TITLE_AND_BODY~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5f_AND_5f_BODY_7e_LT_7e_Hintergrund" style:display-name="TITLE_AND_BODY~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5f_AND_5f_TWO_5f_COLUMNS_5f_1_7e_LT_7e_Gliederung_20_1" style:display-name="TITLE_AND_TWO_COLUMNS_1~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5f_AND_5f_TWO_5f_COLUMNS_5f_1_7e_LT_7e_Gliederung_20_2" style:display-name="TITLE_AND_TWO_COLUMNS_1~LT~Gliederung 2" style:family="paragraph" style:parent-style-name="TITLE_5f_AND_5f_TWO_5f_COLUMNS_5f_1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3" style:display-name="TITLE_AND_TWO_COLUMNS_1~LT~Gliederung 3" style:family="paragraph" style:parent-style-name="TITLE_5f_AND_5f_TWO_5f_COLUMNS_5f_1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4" style:display-name="TITLE_AND_TWO_COLUMNS_1~LT~Gliederung 4" style:family="paragraph" style:parent-style-name="TITLE_5f_AND_5f_TWO_5f_COLUMNS_5f_1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5" style:display-name="TITLE_AND_TWO_COLUMNS_1~LT~Gliederung 5" style:family="paragraph" style:parent-style-name="TITLE_5f_AND_5f_TWO_5f_COLUMNS_5f_1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6" style:display-name="TITLE_AND_TWO_COLUMNS_1~LT~Gliederung 6" style:family="paragraph" style:parent-style-name="TITLE_5f_AND_5f_TWO_5f_COLUMNS_5f_1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7" style:display-name="TITLE_AND_TWO_COLUMNS_1~LT~Gliederung 7" style:family="paragraph" style:parent-style-name="TITLE_5f_AND_5f_TWO_5f_COLUMNS_5f_1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8" style:display-name="TITLE_AND_TWO_COLUMNS_1~LT~Gliederung 8" style:family="paragraph" style:parent-style-name="TITLE_5f_AND_5f_TWO_5f_COLUMNS_5f_1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9" style:display-name="TITLE_AND_TWO_COLUMNS_1~LT~Gliederung 9" style:family="paragraph" style:parent-style-name="TITLE_5f_AND_5f_TWO_5f_COLUMNS_5f_1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Titel" style:display-name="TITLE_AND_TWO_COLUMNS_1~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5f_AND_5f_TWO_5f_COLUMNS_5f_1_7e_LT_7e_Untertitel" style:display-name="TITLE_AND_TWO_COLUMNS_1~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Consolas" style:font-family-complex="Consolas" style:font-family-generic-complex="swiss" style:font-pitch-complex="variable" style:font-size-complex="12pt" style:text-emphasize="none"/>
    </style:style>
    <style:style style:name="TITLE_5f_AND_5f_TWO_5f_COLUMNS_5f_1_7e_LT_7e_Notizen" style:display-name="TITLE_AND_TWO_COLUMNS_1~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Consolas" style:font-family-complex="Consolas" style:font-family-generic-complex="swiss" style:font-pitch-complex="variable" style:font-size-complex="12pt" style:text-emphasize="none"/>
    </style:style>
    <style:style style:name="TITLE_5f_AND_5f_TWO_5f_COLUMNS_5f_1_7e_LT_7e_Hintergrundobjekte" style:display-name="TITLE_AND_TWO_COLUMNS_1~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5f_AND_5f_TWO_5f_COLUMNS_5f_1_7e_LT_7e_Hintergrund" style:display-name="TITLE_AND_TWO_COLUMNS_1~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BLANK_5f_1_7e_LT_7e_Gliederung_20_1" style:display-name="BLANK_1~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BLANK_5f_1_7e_LT_7e_Gliederung_20_2" style:display-name="BLANK_1~LT~Gliederung 2" style:family="paragraph" style:parent-style-name="BLANK_5f_1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5f_1_7e_LT_7e_Gliederung_20_3" style:display-name="BLANK_1~LT~Gliederung 3" style:family="paragraph" style:parent-style-name="BLANK_5f_1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5f_1_7e_LT_7e_Gliederung_20_4" style:display-name="BLANK_1~LT~Gliederung 4" style:family="paragraph" style:parent-style-name="BLANK_5f_1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5f_1_7e_LT_7e_Gliederung_20_5" style:display-name="BLANK_1~LT~Gliederung 5" style:family="paragraph" style:parent-style-name="BLANK_5f_1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Gliederung_20_6" style:display-name="BLANK_1~LT~Gliederung 6" style:family="paragraph" style:parent-style-name="BLANK_5f_1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Gliederung_20_7" style:display-name="BLANK_1~LT~Gliederung 7" style:family="paragraph" style:parent-style-name="BLANK_5f_1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Gliederung_20_8" style:display-name="BLANK_1~LT~Gliederung 8" style:family="paragraph" style:parent-style-name="BLANK_5f_1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Gliederung_20_9" style:display-name="BLANK_1~LT~Gliederung 9" style:family="paragraph" style:parent-style-name="BLANK_5f_1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Titel" style:display-name="BLANK_1~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BLANK_5f_1_7e_LT_7e_Untertitel" style:display-name="BLANK_1~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Consolas" style:font-family-complex="Consolas" style:font-family-generic-complex="swiss" style:font-pitch-complex="variable" style:font-size-complex="12pt" style:text-emphasize="none"/>
    </style:style>
    <style:style style:name="BLANK_5f_1_7e_LT_7e_Notizen" style:display-name="BLANK_1~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Consolas" style:font-family-complex="Consolas" style:font-family-generic-complex="swiss" style:font-pitch-complex="variable" style:font-size-complex="12pt" style:text-emphasize="none"/>
    </style:style>
    <style:style style:name="BLANK_5f_1_7e_LT_7e_Hintergrundobjekte" style:display-name="BLANK_1~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BLANK_5f_1_7e_LT_7e_Hintergrund" style:display-name="BLANK_1~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5f_ONLY_7e_LT_7e_Gliederung_20_1" style:display-name="TITLE_ONLY~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5f_ONLY_7e_LT_7e_Gliederung_20_2" style:display-name="TITLE_ONLY~LT~Gliederung 2" style:family="paragraph" style:parent-style-name="TITLE_5f_ONLY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3" style:display-name="TITLE_ONLY~LT~Gliederung 3" style:family="paragraph" style:parent-style-name="TITLE_5f_ONLY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4" style:display-name="TITLE_ONLY~LT~Gliederung 4" style:family="paragraph" style:parent-style-name="TITLE_5f_ONLY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5" style:display-name="TITLE_ONLY~LT~Gliederung 5" style:family="paragraph" style:parent-style-name="TITLE_5f_ONLY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6" style:display-name="TITLE_ONLY~LT~Gliederung 6" style:family="paragraph" style:parent-style-name="TITLE_5f_ONLY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7" style:display-name="TITLE_ONLY~LT~Gliederung 7" style:family="paragraph" style:parent-style-name="TITLE_5f_ONLY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8" style:display-name="TITLE_ONLY~LT~Gliederung 8" style:family="paragraph" style:parent-style-name="TITLE_5f_ONLY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9" style:display-name="TITLE_ONLY~LT~Gliederung 9" style:family="paragraph" style:parent-style-name="TITLE_5f_ONLY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Titel" style:display-name="TITLE_ONLY~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5f_ONLY_7e_LT_7e_Untertitel" style:display-name="TITLE_ONLY~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Consolas" style:font-family-complex="Consolas" style:font-family-generic-complex="swiss" style:font-pitch-complex="variable" style:font-size-complex="12pt" style:text-emphasize="none"/>
    </style:style>
    <style:style style:name="TITLE_5f_ONLY_7e_LT_7e_Notizen" style:display-name="TITLE_ONLY~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Consolas" style:font-family-complex="Consolas" style:font-family-generic-complex="swiss" style:font-pitch-complex="variable" style:font-size-complex="12pt" style:text-emphasize="none"/>
    </style:style>
    <style:style style:name="TITLE_5f_ONLY_7e_LT_7e_Hintergrundobjekte" style:display-name="TITLE_ONLY~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5f_ONLY_7e_LT_7e_Hintergrund" style:display-name="TITLE_ONLY~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BLANK_5f_1_5f_1_7e_LT_7e_Gliederung_20_1" style:display-name="BLANK_1_1~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BLANK_5f_1_5f_1_7e_LT_7e_Gliederung_20_2" style:display-name="BLANK_1_1~LT~Gliederung 2" style:family="paragraph" style:parent-style-name="BLANK_5f_1_5f_1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5f_1_5f_1_7e_LT_7e_Gliederung_20_3" style:display-name="BLANK_1_1~LT~Gliederung 3" style:family="paragraph" style:parent-style-name="BLANK_5f_1_5f_1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5f_1_5f_1_7e_LT_7e_Gliederung_20_4" style:display-name="BLANK_1_1~LT~Gliederung 4" style:family="paragraph" style:parent-style-name="BLANK_5f_1_5f_1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5f_1_5f_1_7e_LT_7e_Gliederung_20_5" style:display-name="BLANK_1_1~LT~Gliederung 5" style:family="paragraph" style:parent-style-name="BLANK_5f_1_5f_1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5f_1_7e_LT_7e_Gliederung_20_6" style:display-name="BLANK_1_1~LT~Gliederung 6" style:family="paragraph" style:parent-style-name="BLANK_5f_1_5f_1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5f_1_7e_LT_7e_Gliederung_20_7" style:display-name="BLANK_1_1~LT~Gliederung 7" style:family="paragraph" style:parent-style-name="BLANK_5f_1_5f_1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5f_1_7e_LT_7e_Gliederung_20_8" style:display-name="BLANK_1_1~LT~Gliederung 8" style:family="paragraph" style:parent-style-name="BLANK_5f_1_5f_1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5f_1_7e_LT_7e_Gliederung_20_9" style:display-name="BLANK_1_1~LT~Gliederung 9" style:family="paragraph" style:parent-style-name="BLANK_5f_1_5f_1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5f_1_7e_LT_7e_Titel" style:display-name="BLANK_1_1~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BLANK_5f_1_5f_1_7e_LT_7e_Untertitel" style:display-name="BLANK_1_1~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Consolas" style:font-family-complex="Consolas" style:font-family-generic-complex="swiss" style:font-pitch-complex="variable" style:font-size-complex="12pt" style:text-emphasize="none"/>
    </style:style>
    <style:style style:name="BLANK_5f_1_5f_1_7e_LT_7e_Notizen" style:display-name="BLANK_1_1~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Consolas" style:font-family-complex="Consolas" style:font-family-generic-complex="swiss" style:font-pitch-complex="variable" style:font-size-complex="12pt" style:text-emphasize="none"/>
    </style:style>
    <style:style style:name="BLANK_5f_1_5f_1_7e_LT_7e_Hintergrundobjekte" style:display-name="BLANK_1_1~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BLANK_5f_1_5f_1_7e_LT_7e_Hintergrund" style:display-name="BLANK_1_1~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CAPTION_5f_ONLY_7e_LT_7e_Gliederung_20_1" style:display-name="CAPTION_ONLY~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CAPTION_5f_ONLY_7e_LT_7e_Gliederung_20_2" style:display-name="CAPTION_ONLY~LT~Gliederung 2" style:family="paragraph" style:parent-style-name="CAPTION_5f_ONLY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APTION_5f_ONLY_7e_LT_7e_Gliederung_20_3" style:display-name="CAPTION_ONLY~LT~Gliederung 3" style:family="paragraph" style:parent-style-name="CAPTION_5f_ONLY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APTION_5f_ONLY_7e_LT_7e_Gliederung_20_4" style:display-name="CAPTION_ONLY~LT~Gliederung 4" style:family="paragraph" style:parent-style-name="CAPTION_5f_ONLY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APTION_5f_ONLY_7e_LT_7e_Gliederung_20_5" style:display-name="CAPTION_ONLY~LT~Gliederung 5" style:family="paragraph" style:parent-style-name="CAPTION_5f_ONLY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6" style:display-name="CAPTION_ONLY~LT~Gliederung 6" style:family="paragraph" style:parent-style-name="CAPTION_5f_ONLY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7" style:display-name="CAPTION_ONLY~LT~Gliederung 7" style:family="paragraph" style:parent-style-name="CAPTION_5f_ONLY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8" style:display-name="CAPTION_ONLY~LT~Gliederung 8" style:family="paragraph" style:parent-style-name="CAPTION_5f_ONLY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9" style:display-name="CAPTION_ONLY~LT~Gliederung 9" style:family="paragraph" style:parent-style-name="CAPTION_5f_ONLY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Titel" style:display-name="CAPTION_ONLY~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CAPTION_5f_ONLY_7e_LT_7e_Untertitel" style:display-name="CAPTION_ONLY~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Consolas" style:font-family-complex="Consolas" style:font-family-generic-complex="swiss" style:font-pitch-complex="variable" style:font-size-complex="12pt" style:text-emphasize="none"/>
    </style:style>
    <style:style style:name="CAPTION_5f_ONLY_7e_LT_7e_Notizen" style:display-name="CAPTION_ONLY~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Consolas" style:font-family-complex="Consolas" style:font-family-generic-complex="swiss" style:font-pitch-complex="variable" style:font-size-complex="12pt" style:text-emphasize="none"/>
    </style:style>
    <style:style style:name="CAPTION_5f_ONLY_7e_LT_7e_Hintergrundobjekte" style:display-name="CAPTION_ONLY~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CAPTION_5f_ONLY_7e_LT_7e_Hintergrund" style:display-name="CAPTION_ONLY~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5f_1_5f_1_5f__7e_LT_7e_Gliederung_20_1" style:display-name="TITLE_1_1_~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5f_1_5f_1_5f__7e_LT_7e_Gliederung_20_2" style:display-name="TITLE_1_1_~LT~Gliederung 2" style:family="paragraph" style:parent-style-name="TITLE_5f_1_5f_1_5f_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1_5f__7e_LT_7e_Gliederung_20_3" style:display-name="TITLE_1_1_~LT~Gliederung 3" style:family="paragraph" style:parent-style-name="TITLE_5f_1_5f_1_5f_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1_5f__7e_LT_7e_Gliederung_20_4" style:display-name="TITLE_1_1_~LT~Gliederung 4" style:family="paragraph" style:parent-style-name="TITLE_5f_1_5f_1_5f_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1_5f__7e_LT_7e_Gliederung_20_5" style:display-name="TITLE_1_1_~LT~Gliederung 5" style:family="paragraph" style:parent-style-name="TITLE_5f_1_5f_1_5f_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5f__7e_LT_7e_Gliederung_20_6" style:display-name="TITLE_1_1_~LT~Gliederung 6" style:family="paragraph" style:parent-style-name="TITLE_5f_1_5f_1_5f_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5f__7e_LT_7e_Gliederung_20_7" style:display-name="TITLE_1_1_~LT~Gliederung 7" style:family="paragraph" style:parent-style-name="TITLE_5f_1_5f_1_5f_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5f__7e_LT_7e_Gliederung_20_8" style:display-name="TITLE_1_1_~LT~Gliederung 8" style:family="paragraph" style:parent-style-name="TITLE_5f_1_5f_1_5f_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5f__7e_LT_7e_Gliederung_20_9" style:display-name="TITLE_1_1_~LT~Gliederung 9" style:family="paragraph" style:parent-style-name="TITLE_5f_1_5f_1_5f_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5f__7e_LT_7e_Titel" style:display-name="TITLE_1_1_~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5f_1_5f_1_5f__7e_LT_7e_Untertitel" style:display-name="TITLE_1_1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Consolas" style:font-family-complex="Consolas" style:font-family-generic-complex="swiss" style:font-pitch-complex="variable" style:font-size-complex="12pt" style:text-emphasize="none"/>
    </style:style>
    <style:style style:name="TITLE_5f_1_5f_1_5f__7e_LT_7e_Notizen" style:display-name="TITLE_1_1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Consolas" style:font-family-complex="Consolas" style:font-family-generic-complex="swiss" style:font-pitch-complex="variable" style:font-size-complex="12pt" style:text-emphasize="none"/>
    </style:style>
    <style:style style:name="TITLE_5f_1_5f_1_5f__7e_LT_7e_Hintergrundobjekte" style:display-name="TITLE_1_1_~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5f_1_5f_1_5f__7e_LT_7e_Hintergrund" style:display-name="TITLE_1_1_~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5f__7e_LT_7e_Gliederung_20_1" style:display-name="TITLE_~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5f__7e_LT_7e_Gliederung_20_2" style:display-name="TITLE_~LT~Gliederung 2" style:family="paragraph" style:parent-style-name="TITLE_5f_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7e_LT_7e_Gliederung_20_3" style:display-name="TITLE_~LT~Gliederung 3" style:family="paragraph" style:parent-style-name="TITLE_5f_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7e_LT_7e_Gliederung_20_4" style:display-name="TITLE_~LT~Gliederung 4" style:family="paragraph" style:parent-style-name="TITLE_5f_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7e_LT_7e_Gliederung_20_5" style:display-name="TITLE_~LT~Gliederung 5" style:family="paragraph" style:parent-style-name="TITLE_5f_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6" style:display-name="TITLE_~LT~Gliederung 6" style:family="paragraph" style:parent-style-name="TITLE_5f_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7" style:display-name="TITLE_~LT~Gliederung 7" style:family="paragraph" style:parent-style-name="TITLE_5f_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8" style:display-name="TITLE_~LT~Gliederung 8" style:family="paragraph" style:parent-style-name="TITLE_5f_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9" style:display-name="TITLE_~LT~Gliederung 9" style:family="paragraph" style:parent-style-name="TITLE_5f_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Titel" style:display-name="TITLE_~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5f__7e_LT_7e_Untertitel" style:display-name="TITLE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Consolas" style:font-family-complex="Consolas" style:font-family-generic-complex="swiss" style:font-pitch-complex="variable" style:font-size-complex="12pt" style:text-emphasize="none"/>
    </style:style>
    <style:style style:name="TITLE_5f__7e_LT_7e_Notizen" style:display-name="TITLE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Consolas" style:font-family-complex="Consolas" style:font-family-generic-complex="swiss" style:font-pitch-complex="variable" style:font-size-complex="12pt" style:text-emphasize="none"/>
    </style:style>
    <style:style style:name="TITLE_5f__7e_LT_7e_Hintergrundobjekte" style:display-name="TITLE_~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5f__7e_LT_7e_Hintergrund" style:display-name="TITLE_~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creation-date>2024-05-10T17:03:00Z</meta:creation-date>
    <dc:date>2024-07-29T11:52:05.181000000</dc:date>
    <meta:editing-cycles>32</meta:editing-cycles>
    <meta:editing-duration>PT47M43S</meta:editing-duration>
    <meta:document-statistic meta:table-count="0" meta:image-count="1" meta:object-count="0" meta:page-count="3" meta:paragraph-count="63" meta:word-count="1150" meta:character-count="6832" meta:non-whitespace-character-count="5782"/>
    <meta:template xlink:type="simple" xlink:actuate="onRequest" xlink:title="" xlink:href="Normal.dotm"/>
  </office:meta>
</office:document-meta>
</file>