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110000004ED09EB9EE.png" manifest:media-type="image/png"/>
  <manifest:file-entry manifest:full-path="Pictures/10000001000000580000001F1F6C62EE.png" manifest:media-type="image/png"/>
  <manifest:file-entry manifest:full-path="Pictures/100000000000020E000001B4494AA734.png" manifest:media-type="image/png"/>
  <manifest:file-entry manifest:full-path="Pictures/100000000000032E0000021975BEBF18.png" manifest:media-type="image/png"/>
  <manifest:file-entry manifest:full-path="Pictures/10000000000002B70000005B6CEB7440.png" manifest:media-type="image/png"/>
  <manifest:file-entry manifest:full-path="Pictures/10000000000002D50000014678A42B5D.png" manifest:media-type="image/png"/>
  <manifest:file-entry manifest:full-path="Pictures/1000000000000202000000E0E27F6C3B.png" manifest:media-type="image/png"/>
  <manifest:file-entry manifest:full-path="Pictures/100000000000026D0000012B8F96BBB2.png" manifest:media-type="image/png"/>
  <manifest:file-entry manifest:full-path="Pictures/1000000000000115000000E7D05C082F.png" manifest:media-type="image/png"/>
  <manifest:file-entry manifest:full-path="Pictures/10000000000001BC000000D696E7D9B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2" style:family="graphic" style:parent-style-name="standard">
      <style:graphic-properties draw:fill-color="#f7d1d5" draw:textarea-horizontal-align="justify" draw:textarea-vertical-align="middle" draw:auto-grow-height="false" fo:min-height="2.066cm" fo:min-width="5.52cm" fo:wrap-option="wrap" style:writing-mode="lr-tb" loext:decorative="false"/>
      <style:paragraph-properties style:writing-mode="lr-tb"/>
    </style:style>
    <style:style style:name="gr13" style:family="graphic" style:parent-style-name="standard">
      <style:graphic-properties draw:fill-color="#ffe994" draw:textarea-horizontal-align="justify" draw:textarea-vertical-align="middle" draw:auto-grow-height="false" fo:min-height="2.066cm" fo:min-width="5.52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4.03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433cm" loext:decorative="false"/>
      <style:paragraph-properties style:writing-mode="lr-tb"/>
    </style:style>
    <style:style style:name="gr18" style:family="graphic" style:parent-style-name="standard" style:list-style-name="L4">
      <style:graphic-properties draw:stroke="none" svg:stroke-width="0cm" svg:stroke-color="#2a6099"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1"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Diapo-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left="0cm" fo:margin-right="0cm" fo:margin-top="0cm" fo:margin-bottom="0cm" fo:line-height="100%" fo:text-align="start" fo:text-indent="0cm"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6"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7"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169cm" fo:margin-right="0.155cm" fo:margin-top="0.034cm" fo:margin-bottom="0cm" fo:line-height="100%" fo:text-align="start" fo:text-indent="0cm" style:writing-mode="lr-tb"/>
      <style:text-properties fo:font-size="18pt"/>
    </style:style>
    <style:style style:name="P11" style:family="paragraph">
      <loext:graphic-properties draw:fill="none"/>
      <style:paragraph-properties fo:margin-left="0.169cm" fo:margin-right="0.155cm" fo:margin-top="0.034cm" fo:margin-bottom="0cm" fo:line-height="100%" fo:text-align="center" fo:text-indent="0cm" style:writing-mode="lr-tb" style:font-independent-line-spacing="true"/>
      <style:text-properties fo:font-size="18pt"/>
    </style:style>
    <style:style style:name="P12"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13" style:family="paragraph">
      <style:paragraph-properties fo:margin-left="0.169cm" fo:margin-right="0.155cm" fo:margin-top="0.034cm" fo:margin-bottom="0cm" fo:line-height="100%" fo:text-align="start" fo:text-indent="0cm" style:writing-mode="lr-tb"/>
      <style:text-properties fo:font-size="18pt" fo:background-color="transparent"/>
    </style:style>
    <style:style style:name="P14"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fo:background-color="transparent"/>
    </style:style>
    <style:style style:name="P15" style:family="paragraph">
      <style:paragraph-properties fo:margin-left="0.169cm" fo:margin-right="0.155cm" fo:margin-top="0.034cm" fo:margin-bottom="0cm" fo:line-height="100%" fo:text-align="center" fo:text-indent="0cm" style:writing-mode="lr-tb"/>
      <style:text-properties fo:font-size="18pt"/>
    </style:style>
    <style:style style:name="P16" style:family="paragraph">
      <style:paragraph-properties fo:margin-left="0.169cm" fo:margin-right="0.155cm" fo:margin-top="0.002cm" fo:margin-bottom="0cm" fo:line-height="100%" fo:text-align="start" fo:text-indent="0cm" style:writing-mode="lr-tb"/>
      <style:text-properties fo:font-size="18pt"/>
    </style:style>
    <style:style style:name="P17" style:family="paragraph">
      <style:paragraph-properties fo:text-align="center"/>
    </style:style>
    <style:style style:name="P18" style:family="paragraph">
      <loext:graphic-properties draw:fill="none" draw:fill-color="#ffffff"/>
    </style:style>
    <style:style style:name="P19" style:family="paragraph">
      <style:paragraph-properties fo:text-align="center"/>
      <style:text-properties style:font-name="Calibri" fo:font-size="12pt" style:font-size-asian="12pt" style:font-size-complex="12pt"/>
    </style:style>
    <style:style style:name="P20" style:family="paragraph">
      <loext:graphic-properties draw:fill-color="#f7d1d5"/>
      <style:paragraph-properties fo:text-align="center" style:writing-mode="lr-tb"/>
      <style:text-properties style:font-name="Calibri" fo:font-size="12pt" style:font-size-asian="12pt" style:font-size-complex="12pt"/>
    </style:style>
    <style:style style:name="P21" style:family="paragraph">
      <loext:graphic-properties draw:fill-color="#ffe994"/>
      <style:paragraph-properties fo:text-align="center" style:writing-mode="lr-tb"/>
      <style:text-properties style:font-name="Calibri" fo:font-size="12pt" style:font-size-asian="12pt" style:font-size-complex="12pt"/>
    </style:style>
    <style:style style:name="P22" style:family="paragraph">
      <loext:graphic-properties draw:fill-color="#ffffff"/>
      <style:text-properties fo:font-size="20pt"/>
    </style:style>
    <style:style style:name="P23" style:family="paragraph">
      <style:paragraph-properties fo:text-align="start"/>
    </style:style>
    <style:style style:name="P24" style:family="paragraph">
      <style:paragraph-properties fo:margin-left="0.169cm" fo:margin-right="0.155cm" fo:margin-top="0.034cm" fo:margin-bottom="0cm" fo:line-height="100%" fo:text-align="start" fo:text-indent="0cm" style:writing-mode="lr-tb"/>
    </style:style>
    <style:style style:name="T1"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7" style:family="text">
      <style:text-properties fo:font-variant="normal" fo:text-transform="none" fo:color="#622422" loext:opacity="100%" style:text-line-through-style="none" style:text-line-through-type="none" style:text-position="0% 100%" style:font-name="Calibri1" fo:font-size="40pt" fo:letter-spacing="-0.03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1" fo:font-size="40pt" fo:letter-spacing="-0.00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1" fo:font-size="40pt" fo:letter-spacing="normal"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10"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2"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ffff00" style:font-size-asian="28pt" style:font-style-asian="normal" style:font-weight-asian="bold" style:font-name-complex="Calibri1" style:font-size-complex="28pt" style:font-style-complex="normal" style:font-weight-complex="bold"/>
    </style:style>
    <style:style style:name="T13" style:family="text">
      <style:text-properties fo:font-variant="normal" fo:text-transform="none" fo:color="#001f5f" loext:opacity="100%" style:text-line-through-style="none" style:text-line-through-type="none" style:text-position="0% 100%" style:font-name="Calibri1" fo:font-size="16pt"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14"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5" style:family="text">
      <style:text-properties fo:font-variant="normal" fo:text-transform="none" fo:color="#001f5f" loext:opacity="100%" style:text-line-through-style="none" style:text-line-through-type="none" style:text-position="0% 100%" style:font-name="Calibri1" fo:font-size="16pt" fo:letter-spacing="normal"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16"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17" style:family="text">
      <style:text-properties fo:font-variant="normal" fo:text-transform="none" fo:color="#001f5f" loext:opacity="100%" style:text-line-through-style="none" style:text-line-through-type="none" style:text-position="0% 100%" style:font-name="Calibri1" fo:font-size="28pt" fo:letter-spacing="normal" fo:font-style="normal" style:text-underline-style="none" fo:font-weight="bold" fo:background-color="#ffff00" style:font-size-asian="28pt" style:font-style-asian="normal" style:font-weight-asian="bold" style:font-name-complex="Calibri1" style:font-size-complex="28pt" style:font-style-complex="normal" style:font-weight-complex="bold"/>
    </style:style>
    <style:style style:name="T18" style:family="text">
      <style:text-properties fo:font-variant="normal" fo:text-transform="none" fo:color="#001f5f" loext:opacity="100%" style:text-line-through-style="none" style:text-line-through-type="none" style:text-position="0% 100%" style:font-name="Calibri1" fo:font-size="21pt" fo:font-style="normal" style:text-underline-style="none" fo:font-weight="bold" fo:background-color="transparent" style:font-size-asian="21pt" style:font-style-asian="normal" style:font-weight-asian="bold" style:font-name-complex="Calibri1" style:font-size-complex="21pt" style:font-style-complex="normal" style:font-weight-complex="bold"/>
    </style:style>
    <style:style style:name="T19" style:family="text">
      <style:text-properties fo:font-variant="normal" fo:text-transform="none" fo:color="#2a6099"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20"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normal" fo:background-color="transparent" style:font-size-asian="18pt" style:font-style-asian="normal" style:font-weight-asian="normal" style:font-name-complex="Calibri1" style:font-size-complex="18pt" style:font-style-complex="normal" style:font-weight-complex="normal"/>
    </style:style>
    <style:style style:name="T21" style:family="text">
      <style:text-properties fo:color="#c9211e" loext:opacity="100%" style:font-name="Calibri" fo:font-weight="bold" style:font-weight-asian="bold" style:font-weight-complex="bold"/>
    </style:style>
    <style:style style:name="T22" style:family="text">
      <style:text-properties style:font-name="Calibri" fo:font-size="12pt" style:font-size-asian="12pt" style:font-size-complex="12pt"/>
    </style:style>
    <style:style style:name="T23" style:family="text">
      <style:text-properties style:font-name="Calibri" fo:font-size="12pt" fo:font-weight="bold" style:font-size-asian="12pt" style:font-weight-asian="bold" style:font-size-complex="12pt" style:font-weight-complex="bold"/>
    </style:style>
    <style:style style:name="T24" style:family="text">
      <style:text-properties fo:font-variant="normal" fo:text-transform="none" fo:color="#2a6099" loext:opacity="100%" style:text-line-through-style="none" style:text-line-through-type="none" style:text-position="0% 100%" style:font-name="Calibri1" fo:font-size="16pt"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25" style:family="text">
      <style:text-properties fo:font-variant="normal" fo:text-transform="none" fo:color="#2a6099" loext:opacity="100%" style:text-line-through-style="none" style:text-line-through-type="none" style:text-position="0% 100%" style:font-name="Calibri1" fo:font-size="18pt" fo:font-style="normal" style:text-underline-style="none" fo:font-weight="bold" fo:background-color="transparent" style:font-style-asian="normal" style:font-weight-asian="bold" style:font-name-complex="Calibri1" style:font-style-complex="normal"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variant="normal" fo:text-transform="none" fo:color="#2a6099" loext:opacity="100%" style:text-line-through-style="none" style:text-line-through-type="none" style:text-position="0% 100%" style:font-name="Calibri1" fo:font-size="16pt" fo:letter-spacing="normal"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29" style:family="text">
      <style:text-properties fo:font-variant="normal" fo:text-transform="none" style:use-window-font-color="true" loext:opacity="0%" style:text-line-through-style="none" style:text-line-through-type="none" style:text-position="0% 100%" style:font-name="Calibri1" fo:font-size="18pt" fo:letter-spacing="normal"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30" style:family="text">
      <style:text-properties fo:font-variant="normal" fo:text-transform="none" fo:color="#2a6099" loext:opacity="100%" style:text-line-through-style="none" style:text-line-through-type="none" style:text-position="0% 100%" style:font-name="Calibri1" fo:font-size="18pt" fo:letter-spacing="normal" fo:font-style="normal" style:text-underline-style="none" fo:font-weight="normal" fo:background-color="transparent" style:font-size-asian="16pt" style:font-style-asian="normal" style:font-weight-asian="normal" style:font-name-complex="Calibri1" style:font-size-complex="16pt" style:font-style-complex="normal" style:font-weight-complex="normal"/>
    </style:style>
    <style:style style:name="T31" style:family="text">
      <style:text-properties fo:font-variant="normal" fo:text-transform="none" fo:color="#2a6099" loext:opacity="100%" style:text-line-through-style="none" style:text-line-through-type="none" style:text-position="0% 100%" style:font-name="Calibri1" fo:font-size="16pt" fo:letter-spacing="normal" fo:font-style="normal" style:text-underline-style="none" fo:font-weight="normal" fo:background-color="transparent" style:font-size-asian="16pt" style:font-style-asian="normal" style:font-weight-asian="normal" style:font-name-complex="Calibri1" style:font-size-complex="16pt" style:font-style-complex="normal" style:font-weight-complex="normal"/>
    </style:style>
    <style:style style:name="T32"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33" style:family="text">
      <style:text-properties fo:font-variant="normal" fo:text-transform="none" fo:color="#c9211e" loext:opacity="100%" style:text-line-through-style="none" style:text-line-through-type="none" style:text-position="0% 100%" style:font-name="Calibri1" fo:font-size="18pt" fo:font-style="normal" style:text-underline-style="none" fo:font-weight="bold" fo:background-color="transparent" style:font-size-asian="16pt" style:font-style-asian="normal" style:font-weight-asian="bold" style:font-name-complex="Calibri1" style:font-size-complex="16pt" style:font-style-complex="normal" style:font-weight-complex="bold"/>
    </style:style>
    <style:style style:name="T34" style:family="text">
      <style:text-properties fo:font-variant="normal" fo:text-transform="none" fo:color="#001f5f" loext:opacity="100%" style:text-line-through-style="none" style:text-line-through-type="none" style:text-position="0% 100%" style:font-name="Calibri1" fo:font-size="16pt" fo:font-style="normal" style:text-underline-style="solid" style:text-underline-width="auto" style:text-underline-color="font-color" fo:font-weight="bold" fo:background-color="transparent" style:font-size-asian="16pt" style:font-style-asian="normal" style:font-weight-asian="bold" style:font-name-complex="Calibri1" style:font-size-complex="16pt" style:font-style-complex="normal" style:font-weight-complex="bold"/>
    </style:style>
    <style:style style:name="T35" style:family="text">
      <style:text-properties fo:font-variant="normal" fo:text-transform="none" fo:color="#2a6099" loext:opacity="100%" style:text-line-through-style="none" style:text-line-through-type="none" style:text-position="0% 100%" style:font-name="Calibri1" fo:font-size="10pt" fo:font-style="normal" style:text-underline-style="none" fo:font-weight="bold" fo:background-color="transparent" style:font-size-asian="10pt" style:font-style-asian="normal" style:font-weight-asian="bold" style:font-name-complex="Calibri1" style:font-size-complex="10pt" style:font-style-complex="normal" style:font-weight-complex="bold"/>
    </style:style>
    <style:style style:name="T36" style:family="text">
      <style:text-properties fo:font-variant="normal" fo:text-transform="none" fo:color="#001f5f"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37" style:family="text">
      <style:text-properties fo:font-variant="normal" fo:text-transform="none" fo:color="#001f5f"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38" style:family="text">
      <style:text-properties fo:font-size="18pt"/>
    </style:style>
    <style:style style:name="T39"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18pt" style:font-style-asian="normal" style:font-weight-asian="bold" style:font-name-complex="Calibri1" style:font-size-complex="18pt" style:font-style-complex="normal" style:font-weight-complex="bold"/>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1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482cm" svg:y="0.569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5" draw:layer="layout" svg:width="3.67cm" svg:height="0.883cm" svg:x="20.959cm" svg:y="0.569cm">
          <text:p text:style-name="P4"><text:span text:style-name="T6">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7" draw:layer="layout" svg:width="19.5cm" svg:height="3.455cm" svg:x="2.5cm" svg:y="3.328cm">
          <text:p text:style-name="P6"><text:span text:style-name="T7">UNIT</text:span><text:span text:style-name="T8"> 05</text:span></text:p>
          <text:p text:style-name="P6"><text:span text:style-name="T9">Cyber ​​incidents no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4.357cm" svg:height="9.471cm" svg:x="5.373cm" svg:y="7.94cm">
          <draw:image xlink:href="Pictures/100000000000032E0000021975BEBF18.png" xlink:type="simple" xlink:show="embed" xlink:actuate="onLoad" draw:mime-type="image/png">
            <text:p/>
          </draw:image>
        </draw:frame>
        <draw:frame draw:style-name="gr4" draw:text-style-name="P8" draw:layer="layout" svg:width="2.459cm" svg:height="2.039cm" svg:x="0.577cm" svg:y="0.529cm">
          <draw:image xlink:href="Pictures/100000000000020E000001B4494AA734.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iapo" presentation:presentation-page-layout-name="AL1T11">
        <office:forms form:automatic-focus="false" form:apply-design-mode="false"/>
        <draw:custom-shape draw:name="object 4" draw:style-name="gr6" draw:text-style-name="P11" draw:layer="layout" svg:width="21.5cm" svg:height="6.067cm" svg:x="2cm" svg:y="4.744cm">
          <text:list text:style-name="L4">
            <text:list-item>
              <text:p text:style-name="P10"><text:span text:style-name="T10">Compliance</text:span></text:p>
            </text:list-item>
            <text:list-item>
              <text:p text:style-name="P10"><text:span text:style-name="T11">Develop action procedures for incident notification</text:span></text:p>
            </text:list-item>
            <text:list-item>
              <text:p text:style-name="P10"><text:span text:style-name="T11">Internal incident notification</text:span></text:p>
            </text:list-item>
            <text:list-item>
              <text:p text:style-name="P10"><text:span text:style-name="T11">Notification of incidents to whom it corresp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iapo" presentation:presentation-page-layout-name="AL1T11">
        <office:forms form:automatic-focus="false" form:apply-design-mode="false"/>
        <draw:custom-shape draw:name="object 14" draw:style-name="gr7" draw:text-style-name="P12" draw:layer="layout" svg:width="21.5cm" svg:height="6.067cm" svg:x="2cm" svg:y="4.744cm">
          <text:list text:style-name="L4">
            <text:list-item>
              <text:p text:style-name="P10"><text:span text:style-name="T12">Compliance</text:span></text:p>
            </text:list-item>
            <text:list-item>
              <text:p text:style-name="P10"><text:span text:style-name="T11">Develop action procedures for incident notification</text:span></text:p>
            </text:list-item>
            <text:list-item>
              <text:p text:style-name="P10"><text:span text:style-name="T11">Internal incident notification</text:span></text:p>
            </text:list-item>
            <text:list-item>
              <text:p text:style-name="P10"><text:span text:style-name="T11">Notification of incidents to whom it corresp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iapo" presentation:presentation-page-layout-name="AL1T11">
        <office:forms form:automatic-focus="false" form:apply-design-mode="false"/>
        <draw:custom-shape draw:name="object 23" draw:style-name="gr8" draw:text-style-name="P14" draw:layer="layout" svg:width="21.5cm" svg:height="8.484cm" svg:x="2cm" svg:y="4.744cm">
          <text:p text:style-name="P13"><text:span text:style-name="T10">Compliance</text:span></text:p>
          <text:p text:style-name="P13"><text:span text:style-name="T13"/></text:p>
          <text:p text:style-name="P13"><text:span text:style-name="T13">Compliance is a set of procedures and basic practices adopted by organizations to identify and classify the operational and legal risks they face and establish internal mechanisms for prevention, management, control and reaction in the face of these issues.</text:span></text:p>
          <text:p text:style-name="P13"><text:span text:style-name="T13"/></text:p>
          <text:p text:style-name="P13"><text:span text:style-name="T14">Summary: Crime prevention system and regulatory compliance</text:span></text:p>
          <text:p text:style-name="P13"><text:span text:style-name="T15"/></text:p>
          <text:p text:style-name="P13"><text:span text:style-name="T16"><text:a xlink:href="https://www.ealde.es/tipos-compliance/" xlink:type="simple">https://www.ealde.es/tipos-compliance/</text:a></text:span></text:p>
          <text:p text:style-name="P13"><text:span text:style-name="T16"/></text:p>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iapo" presentation:presentation-page-layout-name="AL1T11">
        <office:forms form:automatic-focus="false" form:apply-design-mode="false"/>
        <draw:custom-shape draw:name="object 18" draw:style-name="gr9" draw:text-style-name="P12" draw:layer="layout" svg:width="21.5cm" svg:height="6.067cm" svg:x="2cm" svg:y="4.744cm">
          <text:list text:style-name="L4">
            <text:list-item>
              <text:p text:style-name="P10"><text:span text:style-name="T10">Compliance</text:span></text:p>
            </text:list-item>
            <text:list-item>
              <text:p text:style-name="P10"><text:span text:style-name="T17">Develop action procedures for incident notification</text:span></text:p>
            </text:list-item>
            <text:list-item>
              <text:p text:style-name="P10"><text:span text:style-name="T11">Internal incident notification</text:span></text:p>
            </text:list-item>
            <text:list-item>
              <text:p text:style-name="P10"><text:span text:style-name="T11">Notification of incidents to whom it corresp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iapo" presentation:presentation-page-layout-name="AL1T11">
        <office:forms form:automatic-focus="false" form:apply-design-mode="false"/>
        <draw:custom-shape draw:name="object 6" draw:style-name="gr10" draw:text-style-name="P12" draw:layer="layout" svg:width="22.464cm" svg:height="9.238cm" svg:x="1.68cm" svg:y="3.021cm">
          <text:p text:style-name="P10"><text:span text:style-name="T18">Develop action procedures for incident notification</text:span></text:p>
          <text:p text:style-name="P15"><text:span text:style-name="T19"/></text:p>
          <text:p text:style-name="P15"><text:span text:style-name="T19">In the words of the CCN-CERT, "Notification of incidents is key to national security"</text:span></text:p>
          <text:p text:style-name="P10"><text:span text:style-name="T13"/></text:p>
          <text:list text:style-name="L4">
            <text:list-item>
              <text:p text:style-name="P10"><text:span text:style-name="T13">Create communication channels (internal to the organization)</text:span></text:p>
            </text:list-item>
            <text:list-item>
              <text:p text:style-name="P10"><text:span text:style-name="T13">Securing and making these channels more reliable</text:span></text:p>
            </text:list-item>
            <text:list-item>
              <text:p text:style-name="P10"><text:span text:style-name="T13">Promote and inform all potential recipients</text:span></text:p>
            </text:list-item>
            <text:list-item>
              <text:p text:style-name="P10"><text:span text:style-name="T13">Train and prepare the active users of the channels</text:span></text:p>
            </text:list-item>
            <text:list-item>
              <text:p text:style-name="P10"><text:span text:style-name="T13">Do tests</text:span></text:p>
            </text:list-item>
          </text:list>
          <text:p text:style-name="P10"><text:span text:style-name="T13"/></text:p>
          <text:p text:style-name="P1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22cm" svg:height="3.5cm" svg:x="1.5cm" svg:y="13cm">
          <draw:text-box>
            <text:p><text:a xlink:href="https://www.incibe.es/en/incibe-cert/publications/guides-and-studies/guides/spanish-national-guidelines-reporting-and-managing-cyber-incidents" xlink:type="simple">spanish-national-guidelines-reporting-and-managing-cyber-incidents</text:a></text:p>
            <text:p/>
            <text:p text:style-name="P17"><text:span text:style-name="T21">It is important to have a communication plan for incident response !!</text:span></text:p>
            <text:p/>
          </draw:text-box>
        </draw:frame>
        <draw:custom-shape draw:style-name="gr12" draw:text-style-name="P20" draw:layer="layout" svg:width="6.5cm" svg:height="2.5cm" svg:x="18.5cm" svg:y="6.5cm">
          <text:p text:style-name="P19"><text:span text:style-name="T22">Communication channels such as email and the intranet are </text:span><text:span text:style-name="T23">not</text:span><text:span text:style-name="T22"> reliable ways of informing employees.</text:span></text:p>
          <draw:enhanced-geometry svg:viewBox="0 0 21600 21600" draw:text-areas="800 800 20800 20800" draw:type="round-rectangular-callout" draw:modifiers="-4844.30087678819 9370.651739304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1" draw:layer="layout" svg:width="6.5cm" svg:height="2.5cm" svg:x="18cm" svg:y="9cm">
          <text:p text:style-name="P19"><text:span text:style-name="T22">Use specially designed software that can provide information to everyone quickly, in real time</text:span></text:p>
          <draw:enhanced-geometry svg:viewBox="0 0 21600 21600" draw:text-areas="800 800 20800 20800" draw:type="round-rectangular-callout" draw:modifiers="-8140.28610982926 -8118.3526589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9.798cm" svg:height="11.136cm" svg:x="0.6cm" svg:y="2.257cm" draw:page-number="6" presentation:class="page"/>
          <draw:frame presentation:style-name="pr2" draw:text-style-name="P22" draw:layer="layout" svg:width="16.799cm" svg:height="13.364cm" svg:x="2.1cm" svg:y="14.107cm" presentation:class="notes" presentation:placeholder="true">
            <draw:text-box/>
          </draw:frame>
        </presentation:notes>
      </draw:page>
      <draw:page draw:name="page7" draw:style-name="dp1" draw:master-page-name="Diapo" presentation:presentation-page-layout-name="AL1T11">
        <office:forms form:automatic-focus="false" form:apply-design-mode="false"/>
        <draw:custom-shape draw:name="object 1" draw:style-name="gr14" draw:text-style-name="P12" draw:layer="layout" svg:width="22.464cm" svg:height="12.708cm" svg:x="1.68cm" svg:y="3.021cm">
          <text:p text:style-name="P10"><text:span text:style-name="T18">Develop action procedures for incident notification</text:span></text:p>
          <text:p text:style-name="P15"><text:span text:style-name="T19"/></text:p>
          <text:p text:style-name="P15"><text:span text:style-name="T19">In the words of the CCN-CERT, "Notification of incidents is key to national security"</text:span></text:p>
          <text:p text:style-name="P10"><text:span text:style-name="T13"/></text:p>
          <text:list text:style-name="L4">
            <text:list-item>
              <text:p text:style-name="P10"><text:span text:style-name="T13">Other methods of communicating with employees should be determined (backup chanels), e.g. SMS, phone calls, landline phones</text:span></text:p>
            </text:list-item>
            <text:list-item>
              <text:p text:style-name="P10"><text:span text:style-name="T13">Communicate regularly, but don't overdo it</text:span></text:p>
            </text:list-item>
            <text:list-item>
              <text:p text:style-name="P10"><text:span text:style-name="T13">Prepare templates in advance </text:span></text:p>
            </text:list-item>
            <text:list-item>
              <text:p text:style-name="P10"><text:span text:style-name="T13">Be transparent in your communications </text:span></text:p>
            </text:list-item>
            <text:list-item>
              <text:p text:style-name="P10"><text:span text:style-name="T13">Send communications to the right audiences (depending the incident)</text:span></text:p>
            </text:list-item>
            <text:list-item>
              <text:p text:style-name="P10"><text:span text:style-name="T13">Post-incident communication is also important</text:span></text:p>
              <text:list>
                <text:list-item>
                  <text:p text:style-name="P10"><text:span text:style-name="T24">Processes and procedures to be followed.</text:span></text:p>
                </text:list-item>
                <text:list-item>
                  <text:p text:style-name="P10"><text:span text:style-name="T24">Any policies updated as a result of the incident.</text:span></text:p>
                </text:list-item>
                <text:list-item>
                  <text:p text:style-name="P10"><text:span text:style-name="T24">A reminder that incidents can occur at any time and to remain vigilant.</text:span></text:p>
                </text:list-item>
                <text:list-item>
                  <text:p text:style-name="P10"><text:span text:style-name="T24">Who to contact if they encounter any problems with the return to business as usual.</text:span></text:p>
                </text:list-item>
              </text:list>
            </text:list-item>
          </text:list>
          <text:p text:style-name="P1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22" draw:layer="layout" svg:width="16.799cm" svg:height="13.364cm" svg:x="2.1cm" svg:y="14.107cm" presentation:class="notes" presentation:placeholder="true">
            <draw:text-box/>
          </draw:frame>
        </presentation:notes>
      </draw:page>
      <draw:page draw:name="page8" draw:style-name="dp1" draw:master-page-name="Diapo" presentation:presentation-page-layout-name="AL1T11">
        <office:forms form:automatic-focus="false" form:apply-design-mode="false"/>
        <draw:custom-shape draw:name="object 13" draw:style-name="gr15" draw:text-style-name="P12" draw:layer="layout" svg:width="22.464cm" svg:height="4.887cm" svg:x="1.68cm" svg:y="3.021cm">
          <text:p text:style-name="P10"><text:span text:style-name="T18">Develop action procedures for incident notification</text:span></text:p>
          <text:p text:style-name="P15"><text:span text:style-name="T19"/></text:p>
          <text:p text:style-name="P10"><text:span text:style-name="T25">Incidents will be associated with one of the following impact levels: CRITICAL, VERY HIGH, HIGH, MEDIUM, LOW, or NO IMPACT, and with one of the following danger levels: CRITICAL, VERY HIGH, HIGH, MEDIUM, LOW, or NO IMPACT.</text:span></text:p>
          <text:p text:style-name="P1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20.157cm" svg:height="2.637cm" svg:x="2.764cm" svg:y="7.287cm">
          <draw:image xlink:href="Pictures/10000000000002B70000005B6CEB7440.png" xlink:type="simple" xlink:show="embed" xlink:actuate="onLoad" draw:mime-type="image/png">
            <text:p/>
          </draw:image>
        </draw:frame>
        <draw:frame draw:style-name="gr16" draw:text-style-name="P18" draw:layer="layout" svg:width="20.502cm" svg:height="4.28cm" svg:x="2.545cm" svg:y="10.162cm">
          <draw:text-box>
            <text:p text:style-name="P17">It will be mandatory to notify all those who are categorized with a CRITICAL, VERY HIGH OR HIGH level, for all those obliged subjects to whom specific regulations apply</text:p>
            <text:p text:style-name="P17"/>
            <text:p text:style-name="P23"><text:span text:style-name="T26">exemple given</text:span></text:p>
            <text:p text:style-name="P24"><text:span text:style-name="T13"><text:a xlink:href="https://www.muyseguridad.net/2022/02/09/cinco-pasos-filtracion-datos/" xlink:type="simple">https://www.muyseguridad.net/2022/02/09/cinco-pasos-filtracion-datos/</text:a></text:span></text:p>
          </draw:text-box>
        </draw:frame>
        <draw:frame draw:style-name="gr17" draw:text-style-name="P18" draw:layer="layout" svg:width="24.144cm" svg:height="2.683cm" svg:x="0.763cm" svg:y="15.211cm">
          <draw:text-box>
            <text:p><text:span text:style-name="T27">Real Decreto 311/2022, de 3 de mayo, por el que se regula el Esquema Nacional de Seguridad</text:span>.</text:p>
            <text:p><text:a xlink:href="https://www.boe.es/diario_boe/txt.php?id=BOE-A-2022-7191" xlink:type="simple">https://www.boe.es/diario_boe/txt.php?id=BOE-A-2022-7191</text:a></text:p>
            <text:p/>
          </draw:text-box>
        </draw:frame>
        <draw:frame draw:style-name="gr4" draw:text-style-name="P8" draw:layer="layout" svg:width="3.443cm" svg:height="1.5cm" svg:x="21.814cm" svg:y="16cm">
          <draw:image xlink:href="Pictures/1000000000000202000000E0E27F6C3B.png" xlink:type="simple" xlink:show="embed" xlink:actuate="onLoad" draw:mime-type="image/png">
            <text:p/>
          </draw:image>
        </draw:frame>
        <presentation:notes draw:style-name="dp2">
          <draw:page-thumbnail draw:style-name="gr5" draw:layer="layout" svg:width="19.798cm" svg:height="11.136cm" svg:x="0.6cm" svg:y="2.257cm" draw:page-number="8" presentation:class="page"/>
          <draw:frame presentation:style-name="pr2" draw:text-style-name="P22" draw:layer="layout" svg:width="16.799cm" svg:height="13.364cm" svg:x="2.1cm" svg:y="14.107cm" presentation:class="notes" presentation:placeholder="true">
            <draw:text-box/>
          </draw:frame>
        </presentation:notes>
      </draw:page>
      <draw:page draw:name="page9" draw:style-name="dp1" draw:master-page-name="Diapo" presentation:presentation-page-layout-name="AL1T11">
        <office:forms form:automatic-focus="false" form:apply-design-mode="false"/>
        <draw:custom-shape draw:name="object 7" draw:style-name="gr18" draw:text-style-name="P12" draw:layer="layout" svg:width="22.464cm" svg:height="14.318cm" svg:x="1.68cm" svg:y="3.021cm">
          <text:p text:style-name="P10"><text:span text:style-name="T18">Develop action procedures for incident notification</text:span></text:p>
          <text:p text:style-name="P10"><text:span text:style-name="T24"/></text:p>
          <text:p text:style-name="P10"><text:span text:style-name="T24">The criteria used to determine the level of impact associated with a cyber incident take into account the following parameters:</text:span></text:p>
          <text:p text:style-name="P10"><text:span text:style-name="T24"/></text:p>
          <text:p text:style-name="P10"><text:span text:style-name="T28">◼ </text:span><text:span text:style-name="T28">Impact on National Security or Citizen Security.</text:span></text:p>
          <text:p text:style-name="P10"><text:span text:style-name="T28">◼ </text:span><text:span text:style-name="T28">Effects on the provision of an essential service or critical infrastructure.</text:span></text:p>
          <text:p text:style-name="P10"><text:span text:style-name="T28">◼ </text:span><text:span text:style-name="T28">Type of information or affected systems.</text:span></text:p>
          <text:p text:style-name="P10"><text:span text:style-name="T28">◼ </text:span><text:span text:style-name="T28">Degree of impact on the organization's facilities.</text:span></text:p>
          <text:p text:style-name="P10"><text:span text:style-name="T28">◼ </text:span><text:span text:style-name="T28">Possible interruption in the provision of the organization's normal service.</text:span></text:p>
          <text:p text:style-name="P10"><text:span text:style-name="T28">◼ </text:span><text:span text:style-name="T28">Own and external time and costs until the normal operation of the facilities is restored.</text:span></text:p>
          <text:p text:style-name="P10"><text:span text:style-name="T28">◼ </text:span><text:span text:style-name="T28">Economic losses.</text:span></text:p>
          <text:p text:style-name="P10"><text:span text:style-name="T28">◼ </text:span><text:span text:style-name="T28">Geographical extent affected.</text:span></text:p>
          <text:p text:style-name="P10"><text:span text:style-name="T28">◼ </text:span><text:span text:style-name="T28">Associated reputational damage</text:span></text:p>
          <text:p text:style-name="P10"><text:span text:style-name="T28"/></text:p>
          <text:p text:style-name="P16"><text:span text:style-name="T29">CCN STIC 817</text:span><text:span text:style-name="T30"> (Management of incidents in the ENS) ICT security guide</text:span></text:p>
          <text:p text:style-name="P16"><text:span text:style-name="T31"><text:a xlink:href="https://www.ccn-cert.cni.es/series-ccn-stic/800-guia-esquema-nacional-de-seguridad/988-ccn-stic-817-gestion-de-ciberincidentes/file.html" xlink:type="simple">ccn-cert.cni.: 800-guia-esquema-nacional-de-seguridad/988-ccn-stic-817-gestion-de-ciberincidentes</text:a></text:span></text:p>
          <text:p text:style-name="P16"><text:span text:style-name="T31"/></text:p>
          <text:p text:style-name="P16"><text:span text:style-name="T31"/></text:p>
          <text:p text:style-name="P16"><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3.443cm" svg:height="1.5cm" svg:x="21.815cm" svg:y="16cm">
          <draw:image xlink:href="Pictures/1000000000000202000000E0E27F6C3B.png" xlink:type="simple" xlink:show="embed" xlink:actuate="onLoad" draw:mime-type="image/png">
            <text:p/>
          </draw:image>
        </draw:frame>
        <draw:frame draw:style-name="gr4" draw:text-style-name="P8" draw:layer="layout" svg:width="4cm" svg:height="1.142cm" svg:x="1.776cm" svg:y="16.344cm">
          <draw:image xlink:href="Pictures/10000000000001110000004ED09EB9EE.png" xlink:type="simple" xlink:show="embed" xlink:actuate="onLoad" draw:mime-type="image/png">
            <text:p/>
          </draw:image>
        </draw:frame>
        <presentation:notes draw:style-name="dp2">
          <draw:page-thumbnail draw:style-name="gr5" draw:layer="layout" svg:width="19.798cm" svg:height="11.136cm" svg:x="0.6cm" svg:y="2.257cm" draw:page-number="9" presentation:class="page"/>
          <draw:frame presentation:style-name="pr2" draw:text-style-name="P22" draw:layer="layout" svg:width="16.799cm" svg:height="13.364cm" svg:x="2.1cm" svg:y="14.107cm" presentation:class="notes" presentation:placeholder="true">
            <draw:text-box/>
          </draw:frame>
        </presentation:notes>
      </draw:page>
      <draw:page draw:name="page10" draw:style-name="dp1" draw:master-page-name="Diapo" presentation:presentation-page-layout-name="AL1T11">
        <office:forms form:automatic-focus="false" form:apply-design-mode="false"/>
        <draw:custom-shape draw:name="object 8" draw:style-name="gr19" draw:text-style-name="P12" draw:layer="layout" svg:width="22.464cm" svg:height="13.722cm" svg:x="1.68cm" svg:y="3.021cm">
          <text:p text:style-name="P10"><text:span text:style-name="T18">Develop action procedures for incident notification</text:span></text:p>
          <text:p text:style-name="P10"><text:span text:style-name="T24"/></text:p>
          <text:p text:style-name="P10"><text:span text:style-name="T28">Who is obliged to report?</text:span></text:p>
          <text:list text:style-name="L4">
            <text:list-item>
              <text:p text:style-name="P10"><text:span text:style-name="T28">AREA OF THE PUBLIC SECTOR</text:span></text:p>
            </text:list-item>
            <text:list-item>
              <text:p text:style-name="P10"><text:span text:style-name="T28">AREA OF THE PRIVATE SECTOR</text:span></text:p>
            </text:list-item>
          </text:list>
          <text:p text:style-name="P10"><text:span text:style-name="T28"/></text:p>
          <text:p text:style-name="P10"><text:span text:style-name="T28">Where to report?</text:span></text:p>
          <text:list text:continue-numbering="true" text:style-name="L4">
            <text:list-item>
              <text:p text:style-name="P10"><text:span text:style-name="T28">CCN-Cert</text:span></text:p>
            </text:list-item>
            <text:list-item>
              <text:p text:style-name="P10"><text:span text:style-name="T28">INITIATE</text:span></text:p>
            </text:list-item>
          </text:list>
          <text:p text:style-name="P10"><text:span text:style-name="T28"/></text:p>
          <text:p text:style-name="P10"><text:span text:style-name="T28">How to report?</text:span></text:p>
          <text:list text:continue-numbering="true" text:style-name="L4">
            <text:list-item>
              <text:p text:style-name="P10"><text:span text:style-name="T28">Single window</text:span></text:p>
            </text:list-item>
          </text:list>
          <text:p text:style-name="P10"><text:span text:style-name="T28"/></text:p>
          <text:p text:style-name="P10"><text:span text:style-name="T28">Why notify?</text:span></text:p>
          <text:list text:continue-numbering="true" text:style-name="L4">
            <text:list-item>
              <text:p text:style-name="P10"><text:span text:style-name="T28">Obligation</text:span></text:p>
            </text:list-item>
            <text:list-item>
              <text:p text:style-name="P10"><text:span text:style-name="T28">System improvement</text:span></text:p>
            </text:list-item>
            <text:list-item>
              <text:p text:style-name="P10"><text:span text:style-name="T28">reputation</text:span></text:p>
            </text:list-item>
          </text:list>
          <text:p text:style-name="P10"><text:span text:style-name="T28"/></text:p>
          <text:p text:style-name="P10"><text:span text:style-name="T28">When to notif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22" draw:layer="layout" svg:width="16.799cm" svg:height="13.364cm" svg:x="2.1cm" svg:y="14.107cm" presentation:class="notes" presentation:placeholder="true">
            <draw:text-box/>
          </draw:frame>
        </presentation:notes>
      </draw:page>
      <draw:page draw:name="page11" draw:style-name="dp1" draw:master-page-name="Diapo" presentation:presentation-page-layout-name="AL1T11">
        <office:forms form:automatic-focus="false" form:apply-design-mode="false"/>
        <draw:custom-shape draw:name="object 11" draw:style-name="gr20" draw:text-style-name="P12" draw:layer="layout" svg:width="22.464cm" svg:height="14.093cm" svg:x="1.68cm" svg:y="3.021cm">
          <text:p text:style-name="P10"><text:span text:style-name="T18">Develop action procedures for incident notification</text:span></text:p>
          <text:p text:style-name="P10"><text:span text:style-name="T24"/></text:p>
          <text:p text:style-name="P10"><text:span text:style-name="T24">Where to report?</text:span></text:p>
          <text:list text:style-name="L4">
            <text:list-item>
              <text:p text:style-name="P10"><text:span text:style-name="T24">ccn-cert</text:span></text:p>
            </text:list-item>
          </text:list>
          <text:p text:style-name="P10"><text:span text:style-name="T24"/></text:p>
          <text:p text:style-name="P10"><text:span text:style-name="T24"/></text:p>
          <text:p text:style-name="P10"><text:span text:style-name="T24"/></text:p>
          <text:p text:style-name="P10"><text:span text:style-name="T24">Tool REYES: It is a solution developed by CCN-CERT to speed up the work of analysing cyber incidents and sharing cyber threat information</text:span></text:p>
          <text:p text:style-name="P10"><text:span text:style-name="T24">Tool LUCIA (Unified List of Coordination of Incidents and Threats) for those entities within the scope of the National Security Scheme</text:span></text:p>
          <text:p text:style-name="P10"><text:span text:style-name="T24">Email: ( incidentes @ ccn cert cni es ) <text:s/>For a more detailed description of the incident.</text:span></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8" draw:layer="layout" svg:width="8.921cm" svg:height="4.295cm" svg:x="2.079cm" svg:y="12.786cm">
          <draw:image xlink:href="Pictures/100000000000026D0000012B8F96BBB2.png" xlink:type="simple" xlink:show="embed" xlink:actuate="onLoad" draw:mime-type="image/png">
            <text:p/>
          </draw:image>
        </draw:frame>
        <draw:frame draw:style-name="gr21" draw:text-style-name="P8" draw:layer="layout" svg:width="10.937cm" svg:height="4.917cm" svg:x="13.894cm" svg:y="12.539cm">
          <draw:image xlink:href="Pictures/10000000000002D50000014678A42B5D.png" xlink:type="simple" xlink:show="embed" xlink:actuate="onLoad" draw:mime-type="image/png">
            <text:p/>
          </draw:image>
        </draw:frame>
        <draw:frame draw:style-name="gr21" draw:text-style-name="P8" draw:layer="layout" svg:width="4.885cm" svg:height="4.073cm" svg:x="5.51cm" svg:y="4.17cm">
          <draw:image xlink:href="Pictures/1000000000000115000000E7D05C082F.png" xlink:type="simple" xlink:show="embed" xlink:actuate="onLoad" draw:mime-type="image/png">
            <text:p/>
          </draw:image>
        </draw:frame>
        <presentation:notes draw:style-name="dp2">
          <draw:page-thumbnail draw:style-name="gr5" draw:layer="layout" svg:width="19.798cm" svg:height="11.136cm" svg:x="0.6cm" svg:y="2.257cm" draw:page-number="11" presentation:class="page"/>
          <draw:frame presentation:style-name="pr2" draw:text-style-name="P22" draw:layer="layout" svg:width="16.799cm" svg:height="13.364cm" svg:x="2.1cm" svg:y="14.107cm" presentation:class="notes" presentation:placeholder="true">
            <draw:text-box/>
          </draw:frame>
        </presentation:notes>
      </draw:page>
      <draw:page draw:name="page12" draw:style-name="dp1" draw:master-page-name="Diapo" presentation:presentation-page-layout-name="AL1T11">
        <office:forms form:automatic-focus="false" form:apply-design-mode="false"/>
        <draw:custom-shape draw:name="object 19" draw:style-name="gr22" draw:text-style-name="P12" draw:layer="layout" svg:width="21.5cm" svg:height="6.067cm" svg:x="2cm" svg:y="4.744cm">
          <text:list text:style-name="L4">
            <text:list-item>
              <text:p text:style-name="P10"><text:span text:style-name="T10">Compliance</text:span></text:p>
            </text:list-item>
            <text:list-item>
              <text:p text:style-name="P10"><text:span text:style-name="T11">Develop action procedures for incident notification</text:span></text:p>
            </text:list-item>
            <text:list-item>
              <text:p text:style-name="P10"><text:span text:style-name="T17">Internal incident notification</text:span></text:p>
            </text:list-item>
            <text:list-item>
              <text:p text:style-name="P10"><text:span text:style-name="T11">Notification of incidents to whom it corresp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iapo" presentation:presentation-page-layout-name="AL1T11">
        <office:forms form:automatic-focus="false" form:apply-design-mode="false"/>
        <draw:custom-shape draw:name="object 9" draw:style-name="gr23" draw:text-style-name="P12" draw:layer="layout" svg:width="22.53cm" svg:height="12.614cm" svg:x="1.647cm" svg:y="3.333cm">
          <text:p text:style-name="P10"><text:span text:style-name="T10">Internal incident notification</text:span></text:p>
          <text:p text:style-name="P10"><text:span text:style-name="T13"/></text:p>
          <text:p text:style-name="P10"><text:span text:style-name="T32">Emergency plan : </text:span><text:span text:style-name="T33"><text:s/>Immediately !!</text:span></text:p>
          <text:p text:style-name="P10"><text:span text:style-name="T13"/></text:p>
          <text:p text:style-name="P10"><text:span text:style-name="T13">Rest of affected staff. Internal staff, suppliers and customers</text:span></text:p>
          <text:p text:style-name="P10"><text:span text:style-name="T13"/></text:p>
          <text:p text:style-name="P10"><text:span text:style-name="T13">(Consider secure internal communication channels and protocols to avoid attacks)</text:span></text:p>
          <text:p text:style-name="P10"><text:span text:style-name="T13"/></text:p>
          <text:p text:style-name="P10"><text:span text:style-name="T13"/></text:p>
          <text:p text:style-name="P10"><text:span text:style-name="T13">Communicating with employees in the event of any kind of incident is important to:</text:span></text:p>
          <text:list text:style-name="L4">
            <text:list-item>
              <text:p text:style-name="P10"><text:span text:style-name="T13"><text:s/></text:span><text:span text:style-name="T13">Minimise disruption</text:span></text:p>
            </text:list-item>
            <text:list-item>
              <text:p text:style-name="P10"><text:span text:style-name="T13"><text:s/></text:span><text:span text:style-name="T13">Stop the spread of </text:span><text:span text:style-name="T34">mis</text:span><text:span text:style-name="T13">information among employees.</text:span></text:p>
            </text:list-item>
            <text:list-item>
              <text:p text:style-name="P10"><text:span text:style-name="T13"><text:s/></text:span><text:span text:style-name="T13">Ensure that employees have accurate information about the situation when communicating with customers and stakeholders.</text:span><text:span text:style-name="T35">(partes interesadas)</text:span></text:p>
            </text:list-item>
            <text:list-item>
              <text:p text:style-name="P10"><text:span text:style-name="T13"><text:s/></text:span><text:span text:style-name="T13">Provide advice on steps to keep the business running.</text:span></text:p>
            </text:list-item>
            <text:list-item>
              <text:p text:style-name="P10"><text:span text:style-name="T13"><text:s/></text:span><text:span text:style-name="T13">Protect your revenue and reputation</text:span></text:p>
            </text:list-item>
          </text:list>
          <text:p text:style-name="P1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2" draw:text-style-name="P22" draw:layer="layout" svg:width="16.799cm" svg:height="13.364cm" svg:x="2.1cm" svg:y="14.107cm" presentation:class="notes" presentation:placeholder="true">
            <draw:text-box/>
          </draw:frame>
        </presentation:notes>
      </draw:page>
      <draw:page draw:name="page14" draw:style-name="dp1" draw:master-page-name="Diapo" presentation:presentation-page-layout-name="AL1T11">
        <office:forms form:automatic-focus="false" form:apply-design-mode="false"/>
        <draw:custom-shape draw:name="object 20" draw:style-name="gr24" draw:text-style-name="P12" draw:layer="layout" svg:width="21.5cm" svg:height="6.067cm" svg:x="2cm" svg:y="4.744cm">
          <text:list text:style-name="L4">
            <text:list-item>
              <text:p text:style-name="P10"><text:span text:style-name="T10">Compliance</text:span></text:p>
            </text:list-item>
            <text:list-item>
              <text:p text:style-name="P10"><text:span text:style-name="T11">Develop action procedures for incident notification</text:span></text:p>
            </text:list-item>
            <text:list-item>
              <text:p text:style-name="P10"><text:span text:style-name="T11">Internal incident notification</text:span></text:p>
            </text:list-item>
            <text:list-item>
              <text:p text:style-name="P10"><text:span text:style-name="T17">Notification of incidents to whom it corresp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iapo" presentation:presentation-page-layout-name="AL1T11">
        <office:forms form:automatic-focus="false" form:apply-design-mode="false"/>
        <draw:custom-shape draw:name="object 5" draw:style-name="gr25" draw:text-style-name="P12" draw:layer="layout" svg:width="21.5cm" svg:height="12.098cm" svg:x="1.5cm" svg:y="3.368cm">
          <text:p text:style-name="P10"><text:span text:style-name="T10">Notification of incidents to whom it corresponds</text:span></text:p>
          <text:p text:style-name="P10"><text:span text:style-name="T10"/></text:p>
          <text:list text:style-name="L4">
            <text:list-item>
              <text:p text:style-name="P10"><text:span text:style-name="T36">To all the workers</text:span></text:p>
            </text:list-item>
            <text:list-item>
              <text:p text:style-name="P10"><text:span text:style-name="T36">To all external people who work with the company</text:span></text:p>
            </text:list-item>
            <text:list-item>
              <text:p text:style-name="P10"><text:span text:style-name="T36">To all the people whose data has been compromised</text:span></text:p>
            </text:list-item>
            <text:list-item>
              <text:p text:style-name="P10"><text:span text:style-name="T36">Keep lines of communication open</text:span></text:p>
            </text:list-item>
            <text:list-item>
              <text:p text:style-name="P10"><text:span text:style-name="T36">Avoid technicalities</text:span></text:p>
            </text:list-item>
            <text:list-item>
              <text:p text:style-name="P10"><text:span text:style-name="T36">Transparency</text:span></text:p>
            </text:list-item>
          </text:list>
          <text:p text:style-name="P10"><text:span text:style-name="T36"/></text:p>
          <text:p text:style-name="P10"><text:span text:style-name="T36">Avoid reputational damage</text:span></text:p>
          <text:p text:style-name="P10"><text:span text:style-name="T36"><text:tab/></text:span><text:span text:style-name="T36">- Media</text:span></text:p>
          <text:p text:style-name="P10"><text:span text:style-name="T36"><text:tab/></text:span><text:span text:style-name="T36">- Social networks, organization account.</text:span></text:p>
          <text:p text:style-name="P10"><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22" draw:layer="layout" svg:width="16.799cm" svg:height="13.364cm" svg:x="2.1cm" svg:y="14.107cm" presentation:class="notes" presentation:placeholder="true">
            <draw:text-box/>
          </draw:frame>
        </presentation:notes>
      </draw:page>
      <draw:page draw:name="page16" draw:style-name="dp1" draw:master-page-name="Diapo" presentation:presentation-page-layout-name="AL1T11">
        <office:forms form:automatic-focus="false" form:apply-design-mode="false"/>
        <draw:custom-shape draw:name="object 10" draw:style-name="gr26" draw:text-style-name="P12" draw:layer="layout" svg:width="21.5cm" svg:height="11.928cm" svg:x="1.5cm" svg:y="3.416cm">
          <text:p text:style-name="P10"><text:span text:style-name="T10">Notification of incidents to whom it corresponds</text:span></text:p>
          <text:p text:style-name="P10"><text:span text:style-name="T10"/></text:p>
          <text:p text:style-name="P10"><text:span text:style-name="T10">security breach</text:span></text:p>
          <text:p text:style-name="P10"><text:span text:style-name="T10"><text:tab/></text:span><text:span text:style-name="T10">- RGPD</text:span></text:p>
          <text:p text:style-name="P10"><text:span text:style-name="T10"><text:tab/></text:span><text:span text:style-name="T10">- </text:span><text:span text:style-name="T36">All those security failures that cause the accidental or unlawful destruction, loss or alteration of personal data transmitted, stored or otherwise treated, or the unauthorized communication or access to this data</text:span></text:p>
          <text:p text:style-name="P10"><text:span text:style-name="T36"><text:tab/></text:span><text:span text:style-name="T36">- First notification in the first 72 hours</text:span></text:p>
          <text:p text:style-name="P10"><text:span text:style-name="T36"><text:tab/></text:span><text:span text:style-name="T36">- where? at https://sedeagpd.gob.es/sede-electronica-web</text:span></text:p>
          <text:p text:style-name="P10"><text:span text:style-name="T38"/></text:p>
          <text:p text:style-name="P10"><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6" presentation:class="page"/>
          <draw:frame presentation:style-name="pr2" draw:text-style-name="P22" draw:layer="layout" svg:width="16.799cm" svg:height="13.364cm" svg:x="2.1cm" svg:y="14.107cm" presentation:class="notes" presentation:placeholder="true">
            <draw:text-box/>
          </draw:frame>
        </presentation:notes>
      </draw:page>
      <draw:page draw:name="page17" draw:style-name="dp1" draw:master-page-name="Diapo" presentation:presentation-page-layout-name="AL1T11">
        <office:forms form:automatic-focus="false" form:apply-design-mode="false"/>
        <draw:custom-shape draw:name="object 12" draw:style-name="gr27" draw:text-style-name="P12" draw:layer="layout" svg:width="21.5cm" svg:height="10.861cm" svg:x="2cm" svg:y="4.744cm">
          <text:p text:style-name="P10"><text:span text:style-name="T10">We can see more information in the</text:span></text:p>
          <text:p text:style-name="P10"><text:span text:style-name="T10">Guide for the management and notification of security breaches</text:span></text:p>
          <text:p text:style-name="P10"><text:span text:style-name="T10"/></text:p>
          <text:p text:style-name="P10"><text:span text:style-name="T10"/></text:p>
          <text:p text:style-name="P10"><text:span text:style-name="T10"/></text:p>
          <text:p text:style-name="P10"><text:span text:style-name="T39"><text:a xlink:href="https://www.aepd.es/sites/default/files/2019-09/guia-brechas-seguridad.pdf" xlink:type="simple">https://www.aepd.es/sites/default/files/2019-09/guia-brechas-seguridad.pdf</text:a></text:span></text:p>
          <text:p text:style-name="P10"><text:span text:style-name="T10"/></text:p>
          <text:p text:style-name="P10"><text:span text:style-name="T38"/></text:p>
          <text:p text:style-name="P10"><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8" draw:layer="layout" svg:width="7.831cm" svg:height="3.773cm" svg:x="14.97cm" svg:y="7.748cm">
          <draw:image xlink:href="Pictures/10000000000001BC000000D696E7D9B7.png" xlink:type="simple" xlink:show="embed" xlink:actuate="onLoad" draw:mime-type="image/png">
            <text:p/>
          </draw:image>
        </draw:frame>
        <presentation:notes draw:style-name="dp2">
          <draw:page-thumbnail draw:style-name="gr5" draw:layer="layout" svg:width="19.798cm" svg:height="11.136cm" svg:x="0.6cm" svg:y="2.257cm" draw:page-number="17"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Default" style:family="graphic">
      <style:paragraph-properties fo:text-align="start"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Diapo-background" style:family="presentation">
      <style:graphic-properties draw:stroke="none" draw:fill="solid" draw:fill-color="#ffffff"/>
      <style:text-properties style:letter-kerning="true"/>
    </style:style>
    <style:style style:name="Diapo-backgroundobjects" style:family="presentation">
      <style:graphic-properties draw:textarea-horizontal-align="justify" draw:shadow="hidden" draw:shadow-offset-x="0.2cm" draw:shadow-offset-y="0.2cm" draw:shadow-color="#808080"/>
      <style:text-properties style:letter-kerning="true"/>
    </style:style>
    <style:style style:name="Diap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outline1" style:family="presentation">
      <style:graphic-properties draw:stroke="none" draw:fill="none" draw:auto-grow-height="false" draw:fit-to-size="false" style:shrink-to-fit="true">
        <text:list-style style:name="Diap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outline2" style:family="presentation" style:parent-style-name="Diapo-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3" style:family="presentation" style:parent-style-name="Diapo-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4" style:family="presentation" style:parent-style-name="Diapo-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5" style:family="presentation" style:parent-style-name="Diapo-outline4">
      <style:paragraph-properties fo:margin-left="0cm" fo:margin-right="0cm" fo:margin-top="0.1cm" fo:margin-bottom="0cm" fo:text-indent="0cm"/>
      <style:text-properties fo:font-size="20pt" style:font-size-asian="20pt" style:font-size-complex="20pt"/>
    </style:style>
    <style:style style:name="Diapo-outline6" style:family="presentation" style:parent-style-name="Diapo-outline5">
      <style:paragraph-properties fo:margin-left="0cm" fo:margin-right="0cm" fo:margin-top="0.1cm" fo:margin-bottom="0cm" fo:text-indent="0cm"/>
      <style:text-properties fo:font-size="20pt" style:font-size-asian="20pt" style:font-size-complex="20pt"/>
    </style:style>
    <style:style style:name="Diapo-outline7" style:family="presentation" style:parent-style-name="Diapo-outline6">
      <style:paragraph-properties fo:margin-left="0cm" fo:margin-right="0cm" fo:margin-top="0.1cm" fo:margin-bottom="0cm" fo:text-indent="0cm"/>
      <style:text-properties fo:font-size="20pt" style:font-size-asian="20pt" style:font-size-complex="20pt"/>
    </style:style>
    <style:style style:name="Diapo-outline8" style:family="presentation" style:parent-style-name="Diapo-outline7">
      <style:paragraph-properties fo:margin-left="0cm" fo:margin-right="0cm" fo:margin-top="0.1cm" fo:margin-bottom="0cm" fo:text-indent="0cm"/>
      <style:text-properties fo:font-size="20pt" style:font-size-asian="20pt" style:font-size-complex="20pt"/>
    </style:style>
    <style:style style:name="Diapo-outline9" style:family="presentation" style:parent-style-name="Diapo-outline8">
      <style:paragraph-properties fo:margin-left="0cm" fo:margin-right="0cm" fo:margin-top="0.1cm" fo:margin-bottom="0cm" fo:text-indent="0cm"/>
      <style:text-properties fo:font-size="20pt" style:font-size-asian="20pt" style:font-size-complex="20pt"/>
    </style:style>
    <style:style style:name="Diapo-subtitle" style:family="presentation">
      <style:graphic-properties draw:stroke="none" draw:fill="none" draw:textarea-vertical-align="middle">
        <text:list-style style:name="Diap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title" style:family="presentation">
      <style:graphic-properties draw:stroke="none" draw:fill="none" draw:textarea-vertical-align="middle">
        <text:list-style style:name="Diap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5f__5f_-background" style:display-name="Blank__-background" style:family="presentation">
      <style:graphic-properties draw:stroke="none" draw:fill="solid" draw:fill-color="#ffffff"/>
      <style:text-properties style:letter-kerning="true"/>
    </style:style>
    <style:style style:name="Blank_5f__5f_-backgroundobjects" style:display-name="Blank__-backgroundobjects" style:family="presentation">
      <style:graphic-properties draw:textarea-horizontal-align="justify" draw:shadow="hidden" draw:shadow-offset-x="0.2cm" draw:shadow-offset-y="0.2cm" draw:shadow-color="#808080"/>
      <style:text-properties style:letter-kerning="true"/>
    </style:style>
    <style:style style:name="Blank_5f__5f_-notes" style:display-name="Blank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outline1" style:display-name="Blank__-outline1" style:family="presentation">
      <style:graphic-properties draw:stroke="none" draw:fill="none" draw:auto-grow-height="false" draw:fit-to-size="false" style:shrink-to-fit="true">
        <text:list-style style:name="Blank_5f__5f_-outline1" style:display-name="Blank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5f__5f_-outline2" style:display-name="Blank__-outline2" style:family="presentation" style:parent-style-name="Blank_5f_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_5f_-outline3" style:display-name="Blank__-outline3" style:family="presentation" style:parent-style-name="Blank_5f_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_5f_-outline4" style:display-name="Blank__-outline4" style:family="presentation" style:parent-style-name="Blank_5f_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_5f_-outline5" style:display-name="Blank__-outline5" style:family="presentation" style:parent-style-name="Blank_5f__5f_-outline4">
      <style:paragraph-properties fo:margin-left="0cm" fo:margin-right="0cm" fo:margin-top="0.1cm" fo:margin-bottom="0cm" fo:text-indent="0cm"/>
      <style:text-properties fo:font-size="20pt" style:font-size-asian="20pt" style:font-size-complex="20pt"/>
    </style:style>
    <style:style style:name="Blank_5f__5f_-outline6" style:display-name="Blank__-outline6" style:family="presentation" style:parent-style-name="Blank_5f__5f_-outline5">
      <style:paragraph-properties fo:margin-left="0cm" fo:margin-right="0cm" fo:margin-top="0.1cm" fo:margin-bottom="0cm" fo:text-indent="0cm"/>
      <style:text-properties fo:font-size="20pt" style:font-size-asian="20pt" style:font-size-complex="20pt"/>
    </style:style>
    <style:style style:name="Blank_5f__5f_-outline7" style:display-name="Blank__-outline7" style:family="presentation" style:parent-style-name="Blank_5f__5f_-outline6">
      <style:paragraph-properties fo:margin-left="0cm" fo:margin-right="0cm" fo:margin-top="0.1cm" fo:margin-bottom="0cm" fo:text-indent="0cm"/>
      <style:text-properties fo:font-size="20pt" style:font-size-asian="20pt" style:font-size-complex="20pt"/>
    </style:style>
    <style:style style:name="Blank_5f__5f_-outline8" style:display-name="Blank__-outline8" style:family="presentation" style:parent-style-name="Blank_5f__5f_-outline7">
      <style:paragraph-properties fo:margin-left="0cm" fo:margin-right="0cm" fo:margin-top="0.1cm" fo:margin-bottom="0cm" fo:text-indent="0cm"/>
      <style:text-properties fo:font-size="20pt" style:font-size-asian="20pt" style:font-size-complex="20pt"/>
    </style:style>
    <style:style style:name="Blank_5f__5f_-outline9" style:display-name="Blank__-outline9" style:family="presentation" style:parent-style-name="Blank_5f__5f_-outline8">
      <style:paragraph-properties fo:margin-left="0cm" fo:margin-right="0cm" fo:margin-top="0.1cm" fo:margin-bottom="0cm" fo:text-indent="0cm"/>
      <style:text-properties fo:font-size="20pt" style:font-size-asian="20pt" style:font-size-complex="20pt"/>
    </style:style>
    <style:style style:name="Blank_5f__5f_-subtitle" style:display-name="Blank__-subtitle" style:family="presentation">
      <style:graphic-properties draw:stroke="none" draw:fill="none" draw:textarea-vertical-align="middle">
        <text:list-style style:name="Blank_5f__5f_-subtitle" style:display-name="Blank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title" style:display-name="Blank__-title" style:family="presentation">
      <style:graphic-properties draw:stroke="none" draw:fill="none" draw:textarea-vertical-align="middle">
        <text:list-style style:name="Blank_5f__5f_-title" style:display-name="Blank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Mgr8"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gr9" style:family="graphic" style:parent-style-name="standard">
      <style:graphic-properties draw:stroke="none" draw:fill="none" draw:fill-color="#ffffff" draw:auto-grow-width="true" fo:min-height="0.64cm" fo:min-width="3.11cm" loext:decorative="false"/>
      <style:paragraph-properties style:writing-mode="lr-tb"/>
    </style:style>
    <style:style style:name="Mgr10" style:family="graphic" style:parent-style-name="standard">
      <style:graphic-properties draw:stroke="none" draw:fill="none" draw:fill-color="#ffffff" fo:min-height="10.798cm" loext:decorative="false"/>
    </style:style>
    <style:style style:name="Mgr11" style:family="graphic" style:parent-style-name="standard">
      <style:graphic-properties draw:textarea-vertical-align="middle" fo:min-height="0cm" fo:min-width="0cm" loext:decorative="false"/>
    </style:style>
    <style:style style:name="Mgr12" style:family="graphic" style:parent-style-name="standard">
      <style:graphic-properties draw:stroke="none" draw:fill-color="#f44336" draw:textarea-vertical-align="middle" draw:auto-grow-height="false" fo:min-height="1.111cm" fo:min-width="0.861cm" loext:decorative="false"/>
    </style:style>
    <style:style style:name="Mgr13" style:family="graphic" style:parent-style-name="standard">
      <style:graphic-properties draw:stroke="none" draw:fill="none" draw:fill-color="#ffffff" fo:min-height="11.543cm" loext:decorative="false"/>
    </style:style>
    <style:style style:name="Mgr14" style:family="graphic" style:parent-style-name="standard">
      <style:graphic-properties draw:stroke="none" svg:stroke-width="0cm" draw:fill="solid" draw:fill-color="#f1f1f1" draw:textarea-vertical-align="top" draw:auto-grow-height="false" draw:fit-to-size="false" style:shrink-to-fit="false" fo:min-height="1.967cm" fo:min-width="24.204cm" fo:padding-top="0cm" fo:padding-bottom="0cm" fo:padding-left="0cm" fo:padding-right="0cm" fo:wrap-option="wrap" loext:decorative="false"/>
    </style:style>
    <style:style style:name="Mgr15"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16"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17"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18"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pr1" style:family="presentation" style:parent-style-name="Diapo-backgroundobjects">
      <style:graphic-properties draw:fill-color="#b4c7dc" draw:textarea-vertical-align="middle" draw:auto-grow-height="false" fo:min-height="1.5cm" fo:min-width="25.5cm" loext:decorative="false"/>
    </style:style>
    <style:style style:name="Mpr2" style:family="presentation" style:parent-style-name="Diapo-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3" style:family="presentation" style:parent-style-name="Diapo-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lank_5f_-backgroundobjects">
      <style:graphic-properties draw:fill-color="#b4c7dc" draw:textarea-vertical-align="middle" draw:auto-grow-height="false" fo:min-height="1.5cm" fo:min-width="25.5cm" loext:decorative="false"/>
    </style:style>
    <style:style style:name="Mpr15" style:family="presentation" style:parent-style-name="Blank_5f_-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16" style:family="presentation" style:parent-style-name="Blank_5f_-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lank_5f_-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Blank_5f__5f_-backgroundobjects">
      <style:graphic-properties draw:fill-color="#b4c7dc" draw:textarea-vertical-align="middle" draw:auto-grow-height="false" fo:min-height="1.5cm" fo:min-width="25.5cm" loext:decorative="false"/>
    </style:style>
    <style:style style:name="Mpr19" style:family="presentation" style:parent-style-name="Blank_5f__5f_-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20" style:family="presentation" style:parent-style-name="Blank_5f_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Blank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9" style:family="paragraph">
      <style:paragraph-properties fo:margin-left="0cm" fo:margin-right="0cm" fo:margin-top="0.035cm" fo:margin-bottom="0cm" fo:line-height="100%" fo:text-align="start" fo:text-indent="0cm" style:writing-mode="lr-tb"/>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draw:fill-color="#ffffff"/>
      <style:paragraph-properties fo:margin-left="0cm" fo:margin-right="0cm" fo:margin-top="0.035cm" fo:margin-bottom="0cm" fo:line-height="100%" fo:text-align="start" fo:text-indent="0cm"/>
    </style:style>
    <style:style style:name="MP12" style:family="paragraph">
      <style:paragraph-properties fo:margin-left="0.035cm" fo:margin-right="0cm" fo:margin-top="0cm" fo:margin-bottom="0cm" fo:line-height="0.707cm" fo:text-align="start" fo:text-indent="0cm"/>
    </style:style>
    <style:style style:name="MP13"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P14" style:family="paragraph">
      <loext:graphic-properties draw:fill="none"/>
      <style:paragraph-properties fo:text-align="center"/>
    </style:style>
    <style:style style:name="MP15" style:family="paragraph">
      <style:paragraph-properties fo:text-align="center"/>
    </style:style>
    <style:style style:name="MP16" style:family="paragraph">
      <loext:graphic-properties draw:fill="none" draw:fill-color="#ffffff"/>
      <style:paragraph-properties fo:text-align="center"/>
      <style:text-properties fo:font-size="6pt" style:font-size-asian="6pt" style:font-size-complex="6pt"/>
    </style:style>
    <style:style style:name="MP17" style:family="paragraph">
      <style:paragraph-properties fo:text-align="end"/>
    </style:style>
    <style:style style:name="MP18" style:family="paragraph">
      <loext:graphic-properties draw:fill="none" draw:fill-color="#ffffff"/>
      <style:paragraph-properties fo:text-align="end"/>
    </style:style>
    <style:style style:name="MP19" style:family="paragraph">
      <loext:graphic-properties draw:fill="none" draw:fill-color="#ffffff"/>
    </style:style>
    <style:style style:name="MP20" style:family="paragraph">
      <style:paragraph-properties fo:text-align="center" style:writing-mode="lr-tb"/>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P22" style:family="paragraph">
      <loext:graphic-properties draw:fill-color="#f44336"/>
      <style:paragraph-properties fo:text-align="center"/>
    </style:style>
    <style:style style:name="MP23" style:family="paragraph">
      <style:paragraph-properties fo:text-align="center" style:writing-mode="lr-tb"/>
    </style:style>
    <style:style style:name="MP24"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8" style:family="text">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T9" style:family="text">
      <style:text-properties fo:font-size="6pt" style:font-size-asian="6pt" style:font-size-complex="6pt"/>
    </style:style>
    <style:style style:name="MT10" style:family="text">
      <style:text-properties fo:color="#622422" loext:opacity="100%" style:font-name="Calibri"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apo"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3"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Diapo-title" draw:layer="backgroundobjects" svg:width="22.859cm" svg:height="2.334cm" svg:x="1.5cm" svg:y="2.666cm" presentation:class="title" presentation:placeholder="true">
        <draw:text-box/>
      </draw:frame>
      <draw:frame presentation:style-name="Diapo-outline1" draw:layer="backgroundobjects" svg:width="21.73cm" svg:height="6.543cm" svg:x="1.27cm" svg:y="5.457cm" presentation:class="outline" presentation:placeholder="true">
        <draw:text-box/>
      </draw:frame>
      <draw:custom-shape draw:name="object 16_0" draw:style-name="Mgr4"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12.5cm" svg:height="1.665cm" svg:x="3.542cm" svg:y="0.64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2" draw:text-style-name="MP13" draw:layer="backgroundobjects" svg:width="11.467cm" svg:height="0.708cm" svg:x="8.549cm" svg:y="18cm">
        <draw:text-box>
          <text:p text:style-name="MP12"><text:span text:style-name="MT8">UNIT 05 <text:s text:c="2"/>Cyber ​​incidents notification</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8" draw:text-style-name="MP15" draw:layer="backgroundobjects" svg:width="1.551cm" svg:height="0.546cm" svg:x="3.45cm" svg:y="18.334cm">
        <draw:image xlink:href="Pictures/10000001000000580000001F1F6C62EE.png" xlink:type="simple" xlink:show="embed" xlink:actuate="onLoad" draw:mime-type="image/png">
          <text:p/>
        </draw:image>
      </draw:frame>
      <draw:frame draw:style-name="Mgr9" draw:text-style-name="MP18" draw:layer="backgroundobjects" svg:width="3.61cm" svg:height="0.89cm" svg:x="21.583cm" svg:y="18.124cm">
        <draw:text-box>
          <text:p text:style-name="MP17"><text:span text:style-name="MT10">-</text:span><text:span text:style-name="MT10"><text:page-number>&lt;número&gt;</text:page-number></text:span><text:span text:style-name="MT10">-</text:span></text:p>
        </draw:text-box>
      </draw:frame>
      <presentation:notes style:page-layout-name="PM0">
        <draw:page-thumbnail presentation:style-name="Diapo-title" draw:layer="backgroundobjects" svg:width="19.798cm" svg:height="11.136cm" svg:x="0.6cm" svg:y="2.257cm" presentation:class="page"/>
        <draw:frame presentation:style-name="Diap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10" draw:text-style-name="MP19"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21" draw:layer="backgroundobjects" svg:width="8.051cm" svg:height="1.312cm" svg:x="8.686cm" svg:y="17.354cm" presentation:class="footer">
        <draw:text-box>
          <text:p text:style-name="MP20"><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5" draw:layer="backgroundobjects" svg:width="24.493cm" svg:height="3.024cm" svg:x="0.001cm" svg:y="0.604cm">
        <text:p/>
        <draw:enhanced-geometry svg:viewBox="0 0 21600 21600" draw:type="rectangle" draw:enhanced-path="M 0 0 L 21600 0 21600 21600 0 21600 0 0 Z N"/>
      </draw:custom-shape>
      <draw:custom-shape draw:style-name="Mgr11" draw:text-style-name="MP17" draw:layer="backgroundobjects" svg:width="6.35cm" svg:height="1.361cm" svg:x="19.05cm" svg:y="17.235cm">
        <text:p/>
        <draw:enhanced-geometry svg:viewBox="0 0 21600 21600" draw:type="rectangle" draw:enhanced-path="M 0 0 L 21600 0 21600 21600 0 21600 0 0 Z N"/>
      </draw:custom-shape>
      <draw:custom-shape draw:style-name="Mgr11" draw:text-style-name="MP15" draw:layer="backgroundobjects" svg:width="16.328cm" svg:height="1.361cm" svg:x="2.267cm" svg:y="17.235cm">
        <text:p/>
        <draw:enhanced-geometry svg:viewBox="0 0 21600 21600" draw:type="rectangle" draw:enhanced-path="M 0 0 L 21600 0 21600 21600 0 21600 0 0 Z N"/>
      </draw:custom-shape>
      <draw:custom-shape draw:style-name="Mgr12" draw:text-style-name="MP22"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3" draw:text-style-name="MP19" draw:layer="backgroundobjects" svg:width="23.132cm" svg:height="11.793cm" svg:x="0.907cm" svg:y="4.535cm">
        <draw:text-box>
          <text:p/>
        </draw:text-box>
      </draw:frame>
      <draw:custom-shape draw:style-name="Mgr11" draw:text-style-name="MP17"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15" draw:layer="backgroundobjects" svg:width="3.175cm" svg:height="1.361cm" svg:x="-0.453cm" svg:y="17.235cm" presentation:class="page-number">
        <draw:text-box>
          <text:p text:style-name="MP23"><text:page-number>&lt;número&gt;</text:page-number></text:p>
        </draw:text-box>
      </draw:frame>
      <draw:frame presentation:style-name="Mpr11" draw:text-style-name="MP14" draw:layer="backgroundobjects" svg:width="16.329cm" svg:height="1.361cm" svg:x="2.267cm" svg:y="17.235cm" presentation:class="footer">
        <draw:text-box>
          <text:p text:style-name="MP23"><presentation:footer/></text:p>
        </draw:text-box>
      </draw:frame>
      <draw:frame presentation:style-name="Mpr10" draw:text-style-name="MP17" draw:layer="backgroundobjects" svg:width="5.896cm" svg:height="1.315cm" svg:x="19.05cm" svg:y="17.235cm" presentation:class="date-time">
        <draw:text-box>
          <text:p text:style-name="MP24"><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14"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Blank_5f_-title" draw:layer="backgroundobjects" svg:width="22.859cm" svg:height="2.334cm" svg:x="1.5cm" svg:y="2.666cm" presentation:class="title" presentation:placeholder="true">
        <draw:text-box/>
      </draw:frame>
      <draw:frame presentation:style-name="Blank_5f_-outline1" draw:layer="backgroundobjects" svg:width="21.73cm" svg:height="6.543cm" svg:x="1.27cm" svg:y="5.457cm" presentation:class="outline" presentation:placeholder="true">
        <draw:text-box/>
      </draw:frame>
      <draw:custom-shape draw:name="object 16_0" draw:style-name="Mgr15"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6" draw:text-style-name="MP11" draw:layer="backgroundobjects" svg:width="12.5cm" svg:height="1.665cm" svg:x="3.542cm" svg:y="0.64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15" draw:text-style-name="MP13" draw:layer="backgroundobjects" svg:width="11.467cm" svg:height="0.708cm" svg:x="8.549cm" svg:y="18cm">
        <draw:text-box>
          <text:p text:style-name="MP12"><text:span text:style-name="MT8">UNIT 05 <text:s text:c="2"/>Cyber ​​incidents notification</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8" draw:text-style-name="MP15" draw:layer="backgroundobjects" svg:width="1.551cm" svg:height="0.546cm" svg:x="3.45cm" svg:y="18.334cm">
        <draw:image xlink:href="Pictures/10000001000000580000001F1F6C62EE.png" xlink:type="simple" xlink:show="embed" xlink:actuate="onLoad" draw:mime-type="image/png">
          <text:p/>
        </draw:image>
      </draw:frame>
      <presentation:notes style:page-layout-name="PM0">
        <draw:page-thumbnail presentation:style-name="Blank_5f_-title" draw:layer="backgroundobjects" svg:width="19.798cm" svg:height="11.136cm" svg:x="0.6cm" svg:y="2.257cm" presentation:class="page"/>
        <draw:frame presentation:style-name="Blank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_5f_" style:display-name="Blank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8"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14"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Blank_5f__5f_-title" draw:layer="backgroundobjects" svg:width="22.859cm" svg:height="2.334cm" svg:x="1.5cm" svg:y="2.666cm" presentation:class="title" presentation:placeholder="true">
        <draw:text-box/>
      </draw:frame>
      <draw:frame presentation:style-name="Blank_5f__5f_-outline1" draw:layer="backgroundobjects" svg:width="21.73cm" svg:height="6.543cm" svg:x="1.27cm" svg:y="5.457cm" presentation:class="outline" presentation:placeholder="true">
        <draw:text-box/>
      </draw:frame>
      <draw:custom-shape draw:name="object 16_0" draw:style-name="Mgr17"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8" draw:text-style-name="MP11" draw:layer="backgroundobjects" svg:width="12.5cm" svg:height="1.665cm" svg:x="3.542cm" svg:y="0.64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19" draw:text-style-name="MP13" draw:layer="backgroundobjects" svg:width="11.467cm" svg:height="0.708cm" svg:x="8.549cm" svg:y="18cm">
        <draw:text-box>
          <text:p text:style-name="MP12"><text:span text:style-name="MT8">UNIT 05 <text:s text:c="2"/>Cyber ​​incidents notification</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8" draw:text-style-name="MP15" draw:layer="backgroundobjects" svg:width="1.551cm" svg:height="0.546cm" svg:x="3.45cm" svg:y="18.334cm">
        <draw:image xlink:href="Pictures/10000001000000580000001F1F6C62EE.png" xlink:type="simple" xlink:show="embed" xlink:actuate="onLoad" draw:mime-type="image/png">
          <text:p/>
        </draw:image>
      </draw:frame>
      <presentation:notes style:page-layout-name="PM0">
        <draw:page-thumbnail presentation:style-name="Blank_5f__5f_-title" draw:layer="backgroundobjects" svg:width="19.798cm" svg:height="11.136cm" svg:x="0.6cm" svg:y="2.257cm" presentation:class="page"/>
        <draw:frame presentation:style-name="Blank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5</dc:title>
    <meta:creation-date>2021-09-17T12:45:34.110000000</meta:creation-date>
    <meta:editing-duration>PT5H29M3S</meta:editing-duration>
    <meta:generator>LibreOffice/24.8.4.2$Windows_X86_64 LibreOffice_project/bb3cfa12c7b1bf994ecc5649a80400d06cd71002</meta:generator>
    <meta:editing-cycles>58</meta:editing-cycles>
    <dc:date>2025-01-13T18:52:52.706000000</dc:date>
    <meta:print-date>2024-03-07T15:17:37.074000000</meta:print-date>
    <meta:printed-by>Archivos PDF</meta:printed-by>
    <meta:document-statistic meta:object-count="163"/>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