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D000002D01D8500B4.png" manifest:media-type="image/png"/>
  <manifest:file-entry manifest:full-path="Pictures/1000000000000500000002E4F025D7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list-style-name="L2">
      <style:paragraph-properties fo:margin-left="0cm" fo:margin-right="0cm" fo:margin-top="0cm" fo:margin-bottom="0cm" style:contextual-spacing="false" fo:text-indent="0cm" style:auto-text-indent="false"/>
    </style:style>
    <style:style style:name="P9" style:family="paragraph" style:parent-style-name="Text_20_body" style:list-style-name="L2">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draw:frame draw:style-name="fr1" draw:name="Imagen2" text:anchor-type="as-char" svg:width="16.686cm" svg:height="9.652cm" draw:z-index="1"><draw:image xlink:href="Pictures/10000000000004DD000002D01D8500B4.png" xlink:type="simple" xlink:show="embed" xlink:actuate="onLoad" draw:mime-type="image/png"/><svg:title>Comunicación de incidentes: 8 recomendaciones prácticas para empresas</svg:title></draw:frame></text:p>
      <text:p text:style-name="Standard"/>
      <text:p text:style-name="Standard"/>
      <text:h text:style-name="P1" text:outline-level="1">Comunicación de incidentes: 8 recomendaciones prácticas para empresas</text:h>
      <text:p text:style-name="Standard"/>
      <text:p text:style-name="Standard"/>
      <text:p text:style-name="P5">Las empresas deben estar preparadas para una variedad de escenarios que pueden suceder que su negocio se vea interrumpido de alguna manera. Estos se conocen como "incidentes" y pueden variar desde cortes de TI hasta emergencias como incendios o fugas de gas, y todo lo demás. Algunos incidentes son levemente inconvenientes, mientras que otros pueden tener un impacto significativo en las operaciones de la empresa. Este último, conocido como "incidentes mayores", se produce cuando hay un incidente que puede tener un gran impacto y afecta la mayor parte, si no toda, la capacidad de la empresa para llevar a cabo sus operaciones.</text:p>
      <text:p text:style-name="P5">Si bien un incidente menor puede causar leves molestias a los empleados, clientes y otras partes interesadas, un incidente mayor puede impedir que los empleados puedan realizar su trabajo y detener los proyectos, y evitar que los clientes puedan comprar cualquier cosa.</text:p>
      <text:p text:style-name="P5">En la vida, hay muchas cosas que suceden más allá del control de cualquier persona, mientras que otros incidentes pueden mitigarse de otras formas. Sin embargo, estar preparado para responder a estos desafíos en caso de que ocurran puede conducir a mejores resultados generales.</text:p>
      <text:h text:style-name="P2" text:outline-level="2"><text:soft-page-break/>Por qué la comunicación interna puede ayudarlo a superar un incidente</text:h>
      <text:p text:style-name="P5">Cuando su empresa está experimentando un incidente, puede superarlo mejor si cuenta con los procedimientos adecuados, incluido un plan eficaz de comunicación de incidentes. Esto puede servir como una hoja de ruta para ayudar a su empresa a gestionar la situación.</text:p>
      <text:p text:style-name="P5">No espere a que ocurra un incidente para comenzar a planificar: comience a planificar ahora. Tener protocolos de comunicación establecidos con suficiente anticipación le permitirá ahorrar tiempo durante un incidente real y garantizará que esté preparado para gestionar el incidente cuando ocurra.</text:p>
      <text:h text:style-name="P3" text:outline-level="3">Comunicarse con los empleados en caso de cualquier tipo de incidente es importante para:</text:h>
      <text:list text:style-name="L1">
        <text:list-item>
          <text:p text:style-name="P6">Minimizar la interrupción</text:p>
        </text:list-item>
        <text:list-item>
          <text:p text:style-name="P6">Detener la difusión de información errónea entre los empleados.</text:p>
        </text:list-item>
        <text:list-item>
          <text:p text:style-name="P6">Asegúrese de que los empleados tengan información precisa sobre la situación cuando se comuniquen con los clientes y las partes interesadas.</text:p>
        </text:list-item>
        <text:list-item>
          <text:p text:style-name="P6">Brindar asesoramiento sobre los pasos a seguir para mantener la empresa en funcionamiento</text:p>
        </text:list-item>
        <text:list-item>
          <text:p text:style-name="P7">Proteja sus ingresos y reputación.</text:p>
        </text:list-item>
      </text:list>
      <text:h text:style-name="P2" text:outline-level="2"/>
      <text:h text:style-name="P2" text:outline-level="2">Mejores prácticas de comunicación de incidentes</text:h>
      <text:p text:style-name="P5">Las mejores prácticas de comunicación de incidentes incluyen:</text:p>
      <text:h text:style-name="P3" text:outline-level="3">1. Disponer de un plan de comunicación para la respuesta a incidentes</text:h>
      <text:p text:style-name="P5">Sin un plan, simplemente lo inventará sobre la marcha. Muchas empresas no tienen un plan de comunicación para la gestión de incidentes y lo descubren por las malas.</text:p>
      <text:p text:style-name="P5">Su plan debe describir cómo se comunicará con sus empleados si hay un incidente que necesita su atención. Esto debe incluir los canales de entrega, la frecuencia de las comunicaciones y quién será el responsable de llevar a cabo el plan.</text:p>
      <text:p text:style-name="P5"><text:soft-page-break/><draw:frame draw:style-name="fr1" draw:name="Imagen1" text:anchor-type="as-char" svg:width="16.886cm" svg:height="9.761cm" draw:z-index="0"><draw:image xlink:href="Pictures/1000000000000500000002E4F025D734.png" xlink:type="simple" xlink:show="embed" xlink:actuate="onLoad" draw:mime-type="image/png"/><svg:title>Innatos Systems Group</svg:title></draw:frame></text:p>
      <text:h text:style-name="P3" text:outline-level="3">2. Utilice software de comunicación de incidentes</text:h>
      <text:p text:style-name="P5">La mejor manera de llegar a los empleados para informarles sobre cualquier tipo de incidente, menor o mayor, es con un software especialmente diseñado que puede proporcionar información a todos rápidamente, en tiempo real.</text:p>
      <text:p text:style-name="P5">Los canales de comunicación como el correo electrónico y la intranet no son formas confiables de informar a los empleados; las personas simplemente no prestan atención a cada correo electrónico que reciben o no buscan activamente actualizaciones en la intranet. El software de comunicaciones críticas puede enviar notificaciones de incidentes al personal en computadoras, teléfonos y tabletas para garantizar que se mantengan informados.</text:p>
      <text:h text:style-name="P3" text:outline-level="3"/>
      <text:h text:style-name="P3" text:outline-level="3">3. Determinar otros canales de comunicación</text:h>
      <text:p text:style-name="P5">Además de utilizar software de comunicación de incidentes, debe determinar otros métodos que pueda necesitar para comunicarse con los empleados, por ejemplo, SMS, llamadas telefónicas, teléfonos fijos. Es importante contar con opciones de comunicaciones de gestión de incidentes de respaldo.</text:p>
      <text:h text:style-name="P3" text:outline-level="3"/>
      <text:h text:style-name="P3" text:outline-level="3">4. Comparta información precisa y fácil de entender</text:h>
      <text:p text:style-name="P5">Es importante que brinde a las personas los hechos que necesitan saber (no incluya información irrelevante) y se asegure de que lo que les está diciendo sea fácil de entender y esté escrito en un lenguaje sencillo. Esto es especialmente importante si el incidente es un problema de TI; suponga que la mayoría de las personas no entenderán las explicaciones altamente técnicas de lo que está sucediendo.</text:p>
      <text:h text:style-name="P3" text:outline-level="3"><text:soft-page-break/></text:h>
      <text:h text:style-name="P3" text:outline-level="3">5. Comuníquese con regularidad, pero no se exceda</text:h>
      <text:p text:style-name="P5">Lograr el equilibrio adecuado entre no dar suficiente información a los empleados y saturarlos con demasiada información puede ser complicado. Cuando tenga un incidente en curso, debe esforzarse por mantener informados a sus empleados a medida que cambie la situación. Entonces, por ejemplo, si tiene una interrupción del sistema, puede darles un tiempo estimado de restauración.</text:p>
      <text:h text:style-name="P3" text:outline-level="3"/>
      <text:h text:style-name="P3" text:outline-level="3">6. Prepare plantillas con anticipación</text:h>
      <text:p text:style-name="P5">Ahorre tiempo y no "reinvente la rueda" cada vez que haya un incidente en su empresa mediante la preparación de plantillas de comunicación de incidentes que, en su mayoría, se rellenan previamente con información relevante que puede enviar cuando lo necesite.</text:p>
      <text:h text:style-name="P3" text:outline-level="3"/>
      <text:h text:style-name="P3" text:outline-level="3">7. Sea transparente en sus comunicaciones</text:h>
      <text:p text:style-name="P5">En particular, si hay un incidente importante, es importante que sea transparente en todas sus comunicaciones con el público interno y externo. Si la empresa ha cometido un error, debe shacerse responsable. Si hay un problema con sus productos y servicios, si ha sido hackeado, si no puede cumplir con las obligaciones contractuales, lo peor que puede hacer es intentar "darle vueltas" y mentir al respecto. Dañará sus relaciones con su personal y sus clientes, y empañará su reputación con el público de lo contrario.</text:p>
      <text:h text:style-name="P3" text:outline-level="3"/>
      <text:h text:style-name="P3" text:outline-level="3">8. Envíe comunicaciones a las audiencias adecuadas</text:h>
      <text:p text:style-name="P5">Hay muchos tipos diferentes de incidentes que pueden ocurrir. Enviar comunicaciones masivas a todos sus empleados puede ser apropiado en algunas circunstancias, por ejemplo, si todos los servidores de correo electrónico de la empresa están inactivos. Otras veces, es posible que solo necesite comunicarse con audiencias personalizadas.</text:p>
      <text:p text:style-name="P5">Por ejemplo, si hay un problema con los detectores de humo en su oficina de México, el personal de su oficina de Monterrey se molestará si recibe notificaciones al respecto. Del mismo modo, si tiene empleados que utilizan un sistema de software personalizado para hacer su trabajo, por ejemplo, el departamento de contabilidad, el resto de la organización no querrá saber si está experimentando un tiempo de inactividad.</text:p>
      <text:p text:style-name="P5"/>
      <text:h text:style-name="P2" text:outline-level="2">La comunicación posterior al incidente también es importante</text:h>
      <text:p text:style-name="P5">Cuando se resuelva el incidente, habrá ocasiones en las que deberá seguir comunicándose con los empleados para gestionar el regreso a las prácticas comerciales normales, especialmente si el evento ha causado una interrupción significativa.</text:p>
      <text:p text:style-name="P5"><text:soft-page-break/>Normalmente, esto formará parte de un plan de continuidad empresarial. Siga comunicándose con los empleados sobre la información importante que necesitan para hacer bien su trabajo y mantenerlos seguros. Esto incluye:</text:p>
      <text:list text:style-name="L2">
        <text:list-item>
          <text:p text:style-name="P8">Procesos y procedimientos que deben seguir.</text:p>
        </text:list-item>
        <text:list-item>
          <text:p text:style-name="P8">Cualquier política actualizada como resultado del incidente.</text:p>
        </text:list-item>
        <text:list-item>
          <text:p text:style-name="P8">Un recordatorio de que los incidentes pueden ocurrir en cualquier momento y que se mantenga alerta</text:p>
        </text:list-item>
        <text:list-item>
          <text:p text:style-name="P9">A quién contactar si encuentran algún problema con el regreso a la actividad normal. </text:p>
        </text:list-item>
      </text:list>
      <text:p text:style-name="P5">Cualquiera que sea el incidente que le ocurra a su organización, no tiene por qué ser un desastre total si está preparado y listo para manejarl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6:31:02.324000000</meta:creation-date>
    <dc:date>2024-03-04T16:33:35.535000000</dc:date>
    <meta:editing-duration>PT2M33S</meta:editing-duration>
    <meta:editing-cycles>2</meta:editing-cycles>
    <meta:generator>LibreOffice/7.6.4.1$Windows_X86_64 LibreOffice_project/e19e193f88cd6c0525a17fb7a176ed8e6a3e2aa1</meta:generator>
    <meta:document-statistic meta:table-count="0" meta:image-count="2" meta:object-count="0" meta:page-count="5" meta:paragraph-count="44" meta:word-count="1149" meta:character-count="7432" meta:non-whitespace-character-count="6333"/>
  </office:meta>
</office:document-meta>
</file>