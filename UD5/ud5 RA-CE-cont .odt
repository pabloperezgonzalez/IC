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58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0.794cm"/>
    </style:style>
    <style:style style:name="Tabla13.B" style:family="table-column">
      <style:table-column-properties style:column-width="16.792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77bc65" fo:padding="0.097cm" fo:border="0.5pt solid #000000">
        <style:background-image/>
      </style:table-cell-properties>
    </style:style>
    <style:style style:name="Tabla13.2" style:family="table-row">
      <style:table-row-properties fo:background-color="transparent" fo:keep-together="auto">
        <style:background-image/>
      </style:table-row-properties>
    </style:style>
    <style:style style:name="Tabla13.A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3.A3" style:family="table-cell">
      <style:table-cell-properties fo:background-color="#77bc6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3.A4" style:family="table-cell">
      <style:table-cell-properties fo:padding="0.097cm" fo:border-left="0.5pt solid #000000" fo:border-right="none" fo:border-top="none" fo:border-bottom="0.5pt solid #000000"/>
    </style:style>
    <style:style style:name="Tabla13.B4" style:family="table-cell">
      <style:table-cell-properties fo:padding="0.097cm" fo:border-left="0.5pt solid #000000" fo:border-right="0.5pt solid #000000" fo:border-top="none" fo:border-bottom="0.5pt solid #000000"/>
    </style:style>
    <style:style style:name="Tabla13.A5" style:family="table-cell">
      <style:table-cell-properties fo:padding="0.097cm" fo:border-left="0.5pt solid #000000" fo:border-right="none" fo:border-top="none" fo:border-bottom="0.5pt solid #000000"/>
    </style:style>
    <style:style style:name="Tabla13.B5" style:family="table-cell">
      <style:table-cell-properties fo:padding="0.097cm" fo:border-left="0.5pt solid #000000" fo:border-right="0.5pt solid #000000" fo:border-top="none" fo:border-bottom="0.5pt solid #000000"/>
    </style:style>
    <style:style style:name="Tabla13.A6" style:family="table-cell">
      <style:table-cell-properties fo:padding="0.097cm" fo:border-left="0.5pt solid #000000" fo:border-right="none" fo:border-top="none" fo:border-bottom="0.5pt solid #000000"/>
    </style:style>
    <style:style style:name="Tabla13.B6" style:family="table-cell">
      <style:table-cell-properties fo:padding="0.097cm" fo:border-left="0.5pt solid #000000" fo:border-right="0.5pt solid #000000" fo:border-top="none" fo:border-bottom="0.5pt solid #000000"/>
    </style:style>
    <style:style style:name="Tabla13.A7" style:family="table-cell">
      <style:table-cell-properties fo:padding="0.097cm" fo:border-left="0.5pt solid #000000" fo:border-right="none" fo:border-top="none" fo:border-bottom="0.5pt solid #000000"/>
    </style:style>
    <style:style style:name="Tabla13.B7" style:family="table-cell">
      <style:table-cell-properties fo:padding="0.097cm" fo:border-left="0.5pt solid #000000" fo:border-right="0.5pt solid #000000" fo:border-top="none" fo:border-bottom="0.5pt solid #000000"/>
    </style:style>
    <style:style style:name="Tabla13.A8" style:family="table-cell">
      <style:table-cell-properties fo:padding="0.097cm" fo:border-left="0.5pt solid #000000" fo:border-right="none" fo:border-top="none" fo:border-bottom="0.5pt solid #000000"/>
    </style:style>
    <style:style style:name="Tabla13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solid" style:text-underline-width="auto" style:text-underline-color="font-color" fo:font-weight="normal" officeooo:rsid="02829701" officeooo:paragraph-rsid="0015b522" style:font-size-asian="12pt" style:font-weight-asian="normal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shadow="none"/>
      <style:text-properties fo:color="#000000" loext:opacity="100%" style:text-line-through-style="none" style:text-line-through-type="none" style:font-name="Arial1" fo:font-size="12pt" fo:language="es" fo:country="ES" style:text-underline-style="solid" style:text-underline-width="auto" style:text-underline-color="font-color" fo:font-weight="normal" officeooo:rsid="004960d7" officeooo:paragraph-rsid="0015b522" style:font-size-asian="12pt" style:font-weight-asian="normal" style:font-size-complex="12pt"/>
    </style:style>
    <style:style style:name="P3" style:family="paragraph" style:parent-style-name="Pa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1" fo:font-size="12pt" fo:language="es" fo:country="ES" style:text-underline-style="none" fo:font-weight="normal" officeooo:rsid="026b0b1c" officeooo:paragraph-rsid="0015b522" style:font-size-asian="12pt" style:font-weight-asian="normal" style:font-size-complex="12pt"/>
    </style:style>
    <style:style style:name="P4" style:family="paragraph" style:parent-style-name="Standard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62578" officeooo:paragraph-rsid="00162578" style:font-size-asian="12pt" style:font-style-asian="normal" style:font-weight-asian="normal" style:font-size-complex="12pt" style:font-style-complex="normal"/>
    </style:style>
    <style:style style:name="P5" style:family="paragraph" style:parent-style-name="Standard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d5b7f" officeooo:paragraph-rsid="001d5b7f" style:font-size-asian="12pt" style:font-style-asian="normal" style:font-weight-asian="normal" style:font-size-complex="12pt" style:font-style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/>
      <style:text-properties fo:color="#ffffff" loext:opacity="100%" style:text-line-through-style="none" style:text-line-through-type="none" style:font-name="Arial1" fo:font-size="12pt" fo:language="es" fo:country="ES" style:text-underline-style="none" fo:font-weight="normal" officeooo:rsid="01bb72c9" officeooo:paragraph-rsid="0015b522" style:font-size-asian="12pt" style:font-weight-asian="normal" style:font-size-complex="12pt"/>
    </style:style>
    <style:style style:name="P7" style:family="paragraph" style:parent-style-name="Pa12">
      <loext:graphic-properties draw:fill="none"/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 fo:background-color="transparent" style:shadow="non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officeooo:rsid="01289979" officeooo:paragraph-rsid="0015b522" style:text-blinking="false" style:font-name-asian="NSimSun" style:font-size-asian="12pt" style:font-weight-asian="normal" style:font-name-complex="Lucida Sans" style:font-size-complex="12pt" style:font-weight-complex="bold" loext:shadow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officeooo:rsid="01289979" officeooo:paragraph-rsid="0015b522" style:text-blinking="false" style:font-name-asian="NSimSun" style:font-size-asian="12pt" style:font-weight-asian="normal" style:font-name-complex="Lucida Sans" style:font-size-complex="12pt" style:font-weight-complex="bold" loext:shadow="none"/>
    </style:style>
    <style:style style:name="P9" style:family="paragraph" style:parent-style-name="Pa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text-line-through-style="none" style:text-line-through-type="none" style:font-name="Arial1" fo:font-size="12pt" fo:language="es" fo:country="ES" style:text-underline-style="none" fo:font-weight="normal" officeooo:rsid="026b0b1c" officeooo:paragraph-rsid="0015b522" style:font-size-asian="12pt" style:font-weight-asian="normal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202124" loext:opacity="100%" style:text-line-through-style="none" style:text-line-through-type="none" style:font-name="Liberation Serif" fo:font-size="12pt" fo:letter-spacing="normal" fo:language="es" fo:country="ES" style:text-underline-style="none" fo:font-weight="normal" officeooo:rsid="0007eda7" officeooo:paragraph-rsid="001d5b7f" style:text-blinking="false" fo:background-color="#ffffff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202124" loext:opacity="100%" style:text-line-through-style="none" style:text-line-through-type="none" style:font-name="Liberation Serif" fo:font-size="12pt" fo:letter-spacing="normal" fo:language="es" fo:country="ES" style:text-underline-style="none" fo:font-weight="normal" officeooo:rsid="00097538" officeooo:paragraph-rsid="001d5b7f" style:text-blinking="false" fo:background-color="#ffffff" style:font-size-asian="12pt" style:font-size-complex="12pt"/>
    </style:style>
    <style:style style:name="P12" style:family="paragraph" style:parent-style-name="Standard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202124" loext:opacity="100%" style:text-line-through-style="none" style:text-line-through-type="none" style:font-name="Liberation Serif" fo:font-size="12pt" fo:letter-spacing="normal" fo:language="es" fo:country="ES" fo:font-style="normal" style:text-underline-style="none" fo:font-weight="normal" officeooo:rsid="0007eda7" officeooo:paragraph-rsid="001f0127" style:text-blinking="false" fo:background-color="#ffffff" style:font-size-asian="12pt" style:font-style-asian="normal" style:font-weight-asian="normal" style:font-size-complex="12pt" style:font-style-complex="normal"/>
    </style:style>
    <style:style style:name="P13" style:family="paragraph" style:parent-style-name="Standard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202124" loext:opacity="100%" style:text-line-through-style="none" style:text-line-through-type="none" style:font-name="Liberation Serif" fo:font-size="12pt" fo:letter-spacing="normal" fo:language="es" fo:country="ES" fo:font-style="normal" style:text-underline-style="none" fo:font-weight="normal" officeooo:rsid="001f0127" officeooo:paragraph-rsid="001f0127" style:text-blinking="false" fo:background-color="#ffffff" style:font-size-asian="12pt" style:font-style-asian="normal" style:font-weight-asian="normal" style:font-size-complex="12pt" style:font-style-complex="normal"/>
    </style:style>
    <style:style style:name="P14" style:family="paragraph" style:parent-style-name="Standard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202124" loext:opacity="100%" style:text-line-through-style="none" style:text-line-through-type="none" style:font-name="Liberation Serif" fo:font-size="12pt" fo:letter-spacing="normal" fo:language="es" fo:country="ES" fo:font-style="normal" style:text-underline-style="none" fo:font-weight="normal" officeooo:rsid="00266db5" officeooo:paragraph-rsid="00266db5" style:text-blinking="false" fo:background-color="#ffffff" style:font-size-asian="12pt" style:font-style-asian="normal" style:font-weight-asian="normal" style:font-size-complex="12pt" style:font-style-complex="normal"/>
    </style:style>
    <style:style style:name="P15" style:family="paragraph" style:parent-style-name="Pa18" style:list-style-name="L1" style:master-page-name="">
      <loext:graphic-properties draw:fill="none"/>
      <style:paragraph-properties fo:line-height="2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5ed1a" officeooo:paragraph-rsid="0015b522" style:font-size-asian="12pt" style:font-style-asian="normal" style:font-weight-asian="normal" style:font-size-complex="12pt" style:font-style-complex="normal"/>
    </style:style>
    <style:style style:name="P16" style:family="paragraph" style:parent-style-name="Pa18" style:list-style-name="L1">
      <loext:graphic-properties draw:fill="none"/>
      <style:paragraph-properties fo:line-height="200%" fo:text-align="justify" style:justify-single-word="false" fo:background-color="transparent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5ed1a" officeooo:paragraph-rsid="0015b522" style:font-size-asian="12pt" style:font-style-asian="normal" style:font-weight-asian="normal" style:font-size-complex="12pt" style:font-style-complex="normal"/>
    </style:style>
    <style:style style:name="P17" style:family="paragraph" style:parent-style-name="Pa18" style:list-style-name="L9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2bcaea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Pa18" style:list-style-name="L9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2bcaea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Pa18" style:list-style-name="L7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/>
    </style:style>
    <style:style style:name="P20" style:family="paragraph" style:parent-style-name="Pa18" style:list-style-name="L7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/>
    </style:style>
    <style:style style:name="P21" style:family="paragraph" style:parent-style-name="Pa18" style:list-style-name="L7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/>
    </style:style>
    <style:style style:name="P22" style:family="paragraph" style:parent-style-name="Pa18" style:list-style-name="L8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/>
    </style:style>
    <style:style style:name="P23" style:family="paragraph" style:parent-style-name="Pa18" style:list-style-name="L8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/>
    </style:style>
    <style:style style:name="P24" style:family="paragraph" style:parent-style-name="Pa18" style:list-style-name="L8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/>
    </style:style>
    <style:style style:name="P25" style:family="paragraph" style:parent-style-name="Pa18" style:list-style-name="L2" style:master-page-name="">
      <loext:graphic-properties draw:fill="none"/>
      <style:paragraph-properties fo:line-height="100%" fo:text-align="justify" style:justify-single-word="false" style:page-number="auto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a18" style:list-style-name="L2">
      <loext:graphic-properties draw:fill="none"/>
      <style:paragraph-properties fo:line-height="100%" fo:text-align="justify" style:justify-single-word="false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a18" style:list-style-name="L2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a18" style:list-style-name="L6">
      <style:paragraph-properties fo:line-height="100%" fo:text-align="justify" style:justify-single-word="false"/>
      <style:text-properties style:font-name="Calibri" fo:font-size="10pt" fo:language="es" fo:country="ES" officeooo:paragraph-rsid="002bcaea" style:font-size-asian="10pt" style:font-size-complex="10pt"/>
    </style:style>
    <style:style style:name="P29" style:family="paragraph" style:parent-style-name="Pa20">
      <style:paragraph-properties fo:line-height="100%" fo:text-align="justify" style:justify-single-word="fals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/>
    </style:style>
    <style:style style:name="P30" style:family="paragraph" style:parent-style-name="Pa20" style:master-page-name="">
      <style:paragraph-properties fo:margin-top="0cm" fo:margin-bottom="0cm" style:contextual-spacing="false" fo:line-height="100%" fo:text-align="justify" style:justify-single-word="false" style:page-number="auto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2bcaea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a20" style:master-page-name="">
      <style:paragraph-properties fo:line-height="100%" fo:text-align="justify" style:justify-single-word="false" style:page-number="auto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2bcaea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Pa20">
      <style:paragraph-properties fo:line-height="100%" fo:text-align="justify" style:justify-single-word="false"/>
      <style:text-properties style:font-name="Calibri" fo:font-size="10pt" fo:language="es" fo:country="ES" officeooo:paragraph-rsid="002bcaea" style:font-size-asian="10pt" style:font-size-complex="10pt"/>
    </style:style>
    <style:style style:name="P33" style:family="paragraph" style:parent-style-name="Standard" style:list-style-name="L1">
      <loext:graphic-properties draw:fill="none"/>
      <style:paragraph-properties fo:margin-top="0cm" fo:margin-bottom="0cm" style:contextual-spacing="false" fo:line-height="2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5ed1a" officeooo:paragraph-rsid="0015b522" style:font-size-asian="12pt" style:font-style-asian="normal" style:font-weight-asian="normal" style:font-size-complex="12pt" style:font-style-complex="normal"/>
    </style:style>
    <style:style style:name="P34" style:family="paragraph" style:parent-style-name="Standard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Arial1" fo:font-size="12pt" fo:language="es" fo:country="ES" fo:font-style="normal" style:text-underline-style="none" fo:font-weight="normal" officeooo:rsid="00162578" officeooo:paragraph-rsid="00162578" style:font-size-asian="12pt" style:font-style-asian="normal" style:font-weight-asian="normal" style:font-size-complex="12pt" style:font-style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Arial1" fo:font-size="12pt" fo:language="es" fo:country="ES" style:text-underline-style="solid" style:text-underline-width="auto" style:text-underline-color="font-color" fo:font-weight="normal" officeooo:rsid="004960d7" style:font-size-asian="12pt" style:font-weight-asian="normal" style:font-size-complex="12pt"/>
    </style:style>
    <style:style style:name="P36" style:family="paragraph" style:parent-style-name="Standard" style:list-style-name="L9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bold" officeooo:rsid="0015ed1a" officeooo:paragraph-rsid="002bcaea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 style:list-style-name="L6">
      <style:paragraph-properties fo:line-height="100%" fo:text-align="justify" style:justify-single-word="false"/>
      <style:text-properties style:font-name="Calibri" fo:font-size="10pt" fo:language="es" fo:country="ES" officeooo:paragraph-rsid="002bcaea" style:font-size-asian="10pt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style:shadow="none"/>
      <style:text-properties style:font-name="Calibri" fo:font-size="10pt" officeooo:paragraph-rsid="002bcaea" style:font-size-asian="10pt" style:font-size-complex="10pt"/>
    </style:style>
    <style:style style:name="T1" style:family="text">
      <style:text-properties officeooo:rsid="026b0b1c"/>
    </style:style>
    <style:style style:name="T2" style:family="text">
      <style:text-properties officeooo:rsid="00207aa0"/>
    </style:style>
    <style:style style:name="T3" style:family="text">
      <style:text-properties officeooo:rsid="002bcaea"/>
    </style:style>
    <style:style style:name="T4" style:family="text">
      <style:text-properties officeooo:rsid="003b914b"/>
    </style:style>
    <style:style style:name="T5" style:family="text">
      <style:text-properties officeooo:rsid="000b29e3"/>
    </style:style>
    <style:style style:name="T6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3afdb9" style:font-style-asian="normal" style:font-weight-asian="normal" style:font-style-complex="normal"/>
    </style:style>
    <style:style style:name="T7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2829701" style:font-style-asian="normal" style:font-weight-asian="normal" style:font-style-complex="normal"/>
    </style:style>
    <style:style style:name="T8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15ed1a" style:font-style-asian="normal" style:font-weight-asian="normal" style:font-style-complex="normal"/>
    </style:style>
    <style:style style:name="T9" style:family="text">
      <style:text-properties officeooo:rsid="00160a44"/>
    </style:style>
    <style:style style:name="T10" style:family="text">
      <style:text-properties officeooo:rsid="005197e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cm" fo:margin-left="1.799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  <style:text-properties style:font-name="StarSymbol"/>
      </text:list-level-style-bullet>
    </text:list-style>
    <text:list-style style:name="L3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6">Resultados de Aprendizaje</text:p>
          </table:table-cell>
          <table:covered-table-cell/>
        </table:table-row>
        <table:table-row table:style-name="Tabla13.2">
          <table:table-cell table:style-name="Tabla13.A2" table:number-columns-spanned="2" office:value-type="string">
            <text:p text:style-name="P7"><text:span text:style-name="T1">5</text:span>. Detecta y documenta incidentes de ciberseguridad siguiendo procedimientos de actuación establecidos</text:p>
          </table:table-cell>
          <table:covered-table-cell/>
        </table:table-row>
        <table:table-row table:style-name="Tabla13.1">
          <table:table-cell table:style-name="Tabla13.A3" table:number-columns-spanned="2" office:value-type="string">
            <text:p text:style-name="P6">Criterios de evaluación</text:p>
          </table:table-cell>
          <table:covered-table-cell/>
        </table:table-row>
        <table:table-row>
          <table:table-cell table:style-name="Tabla13.A4" office:value-type="string">
            <text:p text:style-name="P3">5a</text:p>
          </table:table-cell>
          <table:table-cell table:style-name="Tabla13.B4" office:value-type="string">
            <text:p text:style-name="P8">Se ha desarrollado un procedimiento de actuación detallado para la notificación de incidentes de ciberseguridad en los tiempos adecuados</text:p>
          </table:table-cell>
        </table:table-row>
        <table:table-row>
          <table:table-cell table:style-name="Tabla13.A5" office:value-type="string">
            <text:p text:style-name="P9">5b</text:p>
          </table:table-cell>
          <table:table-cell table:style-name="Tabla13.B5" office:value-type="string">
            <text:p text:style-name="P8">Se ha notificado el incidente de manera adecuada al personal interno de la organización responsable de la toma de decisiones</text:p>
          </table:table-cell>
        </table:table-row>
        <table:table-row>
          <table:table-cell table:style-name="Tabla13.A5" office:value-type="string">
            <text:p text:style-name="P9">5c</text:p>
          </table:table-cell>
          <table:table-cell table:style-name="Tabla13.B5" office:value-type="string">
            <text:p text:style-name="P8">Se ha notificado el incidente de manera adecuada a las autoridades competentes en el ámbito de la gestión de incidentes de ciberseguridad en caso de ser necesario.</text:p>
          </table:table-cell>
        </table:table-row>
        <table:table-row>
          <table:table-cell table:style-name="Tabla13.A5" office:value-type="string">
            <text:p text:style-name="P9">5d</text:p>
          </table:table-cell>
          <table:table-cell table:style-name="Tabla13.B5" office:value-type="string">
            <text:p text:style-name="P8">Se ha notificado formalmente el incidente a los afectados, personal interno, clientes, proveedores, etc., en caso de ser necesario</text:p>
          </table:table-cell>
        </table:table-row>
        <table:table-row>
          <table:table-cell table:style-name="Tabla13.A8" office:value-type="string">
            <text:p text:style-name="P9">5e</text:p>
          </table:table-cell>
          <table:table-cell table:style-name="Tabla13.B8" office:value-type="string">
            <text:p text:style-name="P8">Se ha notificado el incidente a los medios de comunicación en caso de ser necesario.</text:p>
          </table:table-cell>
        </table:table-row>
      </table:table>
      <text:p text:style-name="P2"/>
      <text:p text:style-name="P1">Contenidos:</text:p>
      <text:p text:style-name="P30"><text:span text:style-name="T4">1. </text:span>Desarrollo de planes de prevención y concienciación en ciberseguridad:</text:p>
      <text:list text:style-name="L2">
        <text:list-item>
          <text:p text:style-name="P25">− Principios generales en materia de ciberseguridad.</text:p>
        </text:list-item>
        <text:list-item>
          <text:p text:style-name="P26">− Normativa de protección del puesto del trabajo.</text:p>
        </text:list-item>
        <text:list-item>
          <text:p text:style-name="P26">− Plan de formación y concienciación en materia de ciberseguridad.</text:p>
        </text:list-item>
        <text:list-item>
          <text:p text:style-name="P26">− Materiales de formación y concienciación.</text:p>
        </text:list-item>
        <text:list-item>
          <text:p text:style-name="P27">− Auditorías internas de cumplimiento en materia de prevención.</text:p>
        </text:list-item>
      </text:list>
      <text:p text:style-name="P32"><text:span text:style-name="T5">2. </text:span>Auditoría de incidentes de ciberseguridad:</text:p>
      <text:list text:style-name="L6">
        <text:list-item>
          <text:list>
            <text:list-item>
              <text:p text:style-name="P37">− Taxonomía de incidentes de ciberseguridad.</text:p>
            </text:list-item>
            <text:list-item>
              <text:p text:style-name="P28">− Controles, herramientas y mecanismos de monitorización, identificación, detección y alerta de incidentes: tipos y fuentes</text:p>
            </text:list-item>
            <text:list-item>
              <text:p text:style-name="P28">− Controles, herramientas y mecanismos de detección e identificación de incidentes de seguridad física.</text:p>
            </text:list-item>
            <text:list-item>
              <text:p text:style-name="P28">− Controles, herramientas y mecanismos de monitorización, identificación, detección y alerta de incidentes a través de la investigación en fuentes abiertas (OSINT).</text:p>
            </text:list-item>
            <text:list-item>
              <text:p text:style-name="P37">− Clasificación, valoración, documentación, seguimiento inicial de incidentes de ciberseguridad.</text:p>
            </text:list-item>
          </text:list>
        </text:list-item>
      </text:list>
      <text:p text:style-name="P38"><text:span text:style-name="T6">3. </text:span><text:span text:style-name="T7">I</text:span><text:span text:style-name="T8">nvestigación de los incidentes de ciberseguridad:</text:span></text:p>
      <text:list text:style-name="L7">
        <text:list-item>
          <text:p text:style-name="P19">− Recopilación de evidencias. <text:span text:style-name="T9">(y almacenado de forma segura)</text:span></text:p>
        </text:list-item>
        <text:list-item>
          <text:p text:style-name="P20">− Análisis de evidencias.</text:p>
        </text:list-item>
        <text:list-item>
          <text:p text:style-name="P20">− Investigación del incidente</text:p>
        </text:list-item>
        <text:list-item>
          <text:p text:style-name="P20">− Intercambio de información del incidente con proveedores u organismos competentes.</text:p>
        </text:list-item>
        <text:list-item>
          <text:p text:style-name="P21">− Medidas de contención de incidentes.</text:p>
        </text:list-item>
      </text:list>
      <text:p text:style-name="P29"/>
      <text:p text:style-name="P29"><text:span text:style-name="T10">4. </text:span>Implementación de medidas de ciberseguridad:</text:p>
      <text:list text:style-name="L8">
        <text:list-item>
          <text:p text:style-name="P22">− Desarrollar procedimientos de actuación detallados para dar respuesta, mitigar, eliminar o contener los tipos de incidentes.</text:p>
        </text:list-item>
        <text:list-item>
          <text:p text:style-name="P23">− Implantar capacidades de ciberresiliencia.</text:p>
        </text:list-item>
        <text:list-item>
          <text:p text:style-name="P23">− Establecer flujos de toma de decisiones y escalado interno y/o externo adecuados.</text:p>
        </text:list-item>
        <text:list-item>
          <text:p text:style-name="P23">− Tareas para restablecer los servicios afectados por incidentes.</text:p>
        </text:list-item>
        <text:list-item>
          <text:p text:style-name="P23">− Documentación</text:p>
        </text:list-item>
        <text:list-item>
          <text:p text:style-name="P24">− Seguimiento de incidentes para evitar una situación similar.</text:p>
        </text:list-item>
      </text:list>
      <text:p text:style-name="P31"><text:span text:style-name="T3">5. </text:span>Detección y documentación de incidentes de ciberseguridad:</text:p>
      <text:list text:style-name="L9">
        <text:list-item>
          <text:list>
            <text:list-item>
              <text:p text:style-name="P17">− Desarrollar procedimientos de actuación para la notificación de incidentes.</text:p>
            </text:list-item>
            <text:list-item>
              <text:p text:style-name="P18">− Notificación interna de incidentes.</text:p>
            </text:list-item>
            <text:list-item>
              <text:p text:style-name="P36">− Notificación de incidentes a quienes corresponda.</text:p>
            </text:list-item>
          </text:list>
        </text:list-item>
      </text:list>
      <text:p text:style-name="P4"/>
      <text:p text:style-name="P4"/>
      <text:p text:style-name="P4"><text:soft-page-break/>Actividades</text:p>
      <text:p text:style-name="P4"/>
      <text:p text:style-name="P4"/>
      <text:p text:style-name="P4"/>
      <text:p text:style-name="P4">Recursos</text:p>
      <text:p text:style-name="P4"/>
      <text:p text:style-name="P4"/>
      <text:p text:style-name="P4"><text:a xlink:type="simple" xlink:href="https://www.incibe-cert.es/guias-y-estudios/guias/guia-nacional-notificacion-y-gestion-ciberincidentes" text:style-name="Internet_20_link" text:visited-style-name="Visited_20_Internet_20_Link">https://www.incibe-cert.es/guias-y-estudios/guias/guia-nacional-notificacion-y-gestion-ciberincidentes</text:a></text:p>
      <text:p text:style-name="P4"/>
      <text:p text:style-name="P4"><text:a xlink:type="simple" xlink:href="https://www.incibe-cert.es/sites/default/files/contenidos/guias/doc/guia_nacional_notificacion_gestion_ciberincidentes.pdf" text:style-name="Internet_20_link" text:visited-style-name="Visited_20_Internet_20_Link">https://www.incibe-cert.es/sites/default/files/contenidos/guias/doc/guia_nacional_notificacion_gestion_ciberincidentes.pdf</text:a></text:p>
      <text:p text:style-name="P4"/>
      <text:p text:style-name="P4"><text:a xlink:type="simple" xlink:href="https://www.incibe-cert.es/sites/default/files/contenidos/guias/doc/incibe-cert_gestion_ciberincidentes_sector_privado.pdf" text:style-name="Internet_20_link" text:visited-style-name="Visited_20_Internet_20_Link">https://www.incibe-cert.es/sites/default/files/contenidos/guias/doc/incibe-cert_gestion_ciberincidentes_sector_privado.pdf</text:a></text:p>
      <text:p text:style-name="P4"/>
      <text:p text:style-name="P4"><text:a xlink:type="simple" xlink:href="https://www.incibe.es/sala-prensa/notas-prensa/nueva-version-guia-nacional-notificacion-y-gestion-ciberincidentes" text:style-name="Internet_20_link" text:visited-style-name="Visited_20_Internet_20_Link">https://www.incibe.es/sala-prensa/notas-prensa/nueva-version-guia-nacional-notificacion-y-gestion-ciberincidentes</text:a></text:p>
      <text:p text:style-name="P4"/>
      <text:p text:style-name="P4"/>
      <text:p text:style-name="P4"><text:a xlink:type="simple" xlink:href="https://www.incibe-cert.es/blog/conoces-guia-nacional-notificacion-y-gestion-ciberincidentes" text:style-name="Internet_20_link" text:visited-style-name="Visited_20_Internet_20_Link">https://www.incibe-cert.es/blog/conoces-guia-nacional-notificacion-y-gestion-ciberincidentes</text:a></text:p>
      <text:p text:style-name="P4"/>
      <text:p text:style-name="P4"><text:a xlink:type="simple" xlink:href="https://www.boe.es/buscar/pdf/2021/BOE-A-2021-1192-consolidado.pdf" text:style-name="Internet_20_link" text:visited-style-name="Visited_20_Internet_20_Link">https://www.boe.es/buscar/pdf/2021/BOE-A-2021-1192-consolidado.pdf</text:a></text:p>
      <text:p text:style-name="P4"><text:a xlink:type="simple" xlink:href="https://www.prodat.es/blog/analisis-de-la-guia-nacional-de-notificacion-y-gestion-de-ciberincidentes/" text:style-name="Internet_20_link" text:visited-style-name="Visited_20_Internet_20_Link"/></text:p>
      <text:p text:style-name="P4">Análisis de la Guía Nacional de Notificación y Gestión de Ciberincidentes</text:p>
      <text:p text:style-name="P4"><text:a xlink:type="simple" xlink:href="https://www.prodat.es/blog/analisis-de-la-guia-nacional-de-notificacion-y-gestion-de-ciberincidentes/" text:style-name="Internet_20_link" text:visited-style-name="Visited_20_Internet_20_Link">https://www.prodat.es/blog/analisis-de-la-guia-nacional-de-notificacion-y-gestion-de-ciberincidentes/</text:a></text:p>
      <text:p text:style-name="P4"/>
      <text:p text:style-name="P4"><text:a xlink:type="simple" xlink:href="https://www.boe.es/buscar/doc.php?id=BOE-A-2018-5370" text:style-name="Internet_20_link" text:visited-style-name="Visited_20_Internet_20_Link">https://www.boe.es/buscar/doc.php?id=BOE-A-2018-5370</text:a></text:p>
      <text:p text:style-name="P4"/>
      <text:p text:style-name="P4"><text:a xlink:type="simple" xlink:href="https://www.ccn-cert.cni.es/series-ccn-stic/800-guia-esquema-nacional-de-seguridad/988-ccn-stic-817-gestion-de-ciberincidentes/file.html" text:style-name="Internet_20_link" text:visited-style-name="Visited_20_Internet_20_Link">https://www.ccn-cert.cni.es/series-ccn-stic/800-guia-esquema-nacional-de-seguridad/988-ccn-stic-817-gestion-de-ciberincidentes/file.html</text:a></text:p>
      <text:p text:style-name="P4"/>
      <text:p text:style-name="P4"><text:a xlink:type="simple" xlink:href="https://www.boe.es/buscar/doc.php?id=BOE-A-2010-1330" text:style-name="Internet_20_link" text:visited-style-name="Visited_20_Internet_20_Link">https://www.boe.es/buscar/doc.php?id=BOE-A-2010-1330</text:a></text:p>
      <text:p text:style-name="P4"/>
      <text:p text:style-name="P4"><text:a xlink:type="simple" xlink:href="https://www.boe.es/buscar/act.php?id=BOE-A-2018-12257" text:style-name="Internet_20_link" text:visited-style-name="Visited_20_Internet_20_Link">https://www.boe.es/buscar/act.php?id=BOE-A-2018-12257</text:a></text:p>
      <text:p text:style-name="P4"><text:a xlink:type="simple" xlink:href="https://www.ccn-cert.cni.es/seguridad-al-dia/novedades-ccn-cert/11297-la-notificacion-de-incidentes-clave-para-la-seguridad-nacional.html" text:style-name="Internet_20_link" text:visited-style-name="Visited_20_Internet_20_Link"/></text:p>
      <text:p text:style-name="P4"><text:a xlink:type="simple" xlink:href="https://www.ccn-cert.cni.es/seguridad-al-dia/novedades-ccn-cert/11297-la-notificacion-de-incidentes-clave-para-la-seguridad-nacional.html" text:style-name="Internet_20_link" text:visited-style-name="Visited_20_Internet_20_Link">https://www.ccn-cert.cni.es/seguridad-al-dia/novedades-ccn-cert/11297-la-notificacion-de-incidentes-clave-para-la-seguridad-nacional.html</text:a></text:p>
      <text:p text:style-name="P4"><text:a xlink:type="simple" xlink:href="https://www.muyseguridad.net/2022/02/09/cinco-pasos-filtracion-datos/" text:style-name="Internet_20_link" text:visited-style-name="Visited_20_Internet_20_Link"/></text:p>
      <text:p text:style-name="P4"><text:a xlink:type="simple" xlink:href="https://www.muyseguridad.net/2022/02/09/cinco-pasos-filtracion-datos/" text:style-name="Internet_20_link" text:visited-style-name="Visited_20_Internet_20_Link">https://www.muyseguridad.net/2022/02/09/cinco-pasos-filtracion-datos/</text:a></text:p>
      <text:p text:style-name="P4"/>
      <text:p text:style-name="P5">OWASP 2.0</text:p>
      <text:p text:style-name="P5"><text:a xlink:type="simple" xlink:href="https://owasp.org/www-project-code-review-guide/assets/OWASP_Code_Review_Guide_v2.pdf" text:style-name="Internet_20_link" text:visited-style-name="Visited_20_Internet_20_Link">https://owasp.org/www-project-code-review-guide/assets/OWASP_Code_Review_Guide_v2.pdf</text:a></text:p>
      <text:p text:style-name="P5"/>
      <text:p text:style-name="P5"/>
      <text:p text:style-name="P11">Compliance. Articulo unico, 4, <text:s/>(modifica articulo 31) </text:p>
      <text:p text:style-name="P10"><text:a xlink:type="simple" xlink:href="https://www.boe.es/buscar/doc.php?id=BOE-A-2010-9953" text:style-name="Internet_20_link" text:visited-style-name="Visited_20_Internet_20_Link">https://www.boe.es/buscar/doc.php?id=BOE-A-2010-9953</text:a></text:p>
      <text:p text:style-name="P10"/>
      <text:p text:style-name="P10"><text:a xlink:type="simple" xlink:href="https://acpitiusos.com/blog/los-distintos-tipos-de-compliance-empresarial/" text:style-name="Internet_20_link" text:visited-style-name="Visited_20_Internet_20_Link">https://acpitiusos.com/blog/los-distintos-tipos-de-compliance-empresarial/</text:a></text:p>
      <text:p text:style-name="P10"><text:a xlink:type="simple" xlink:href="https://www.ealde.es/tipos-compliance/" text:style-name="Internet_20_link" text:visited-style-name="Visited_20_Internet_20_Link"><text:soft-page-break/></text:a></text:p>
      <text:p text:style-name="P12"><text:a xlink:type="simple" xlink:href="https://www.ealde.es/tipos-compliance/" text:style-name="Internet_20_link" text:visited-style-name="Visited_20_Internet_20_Link">https://www.ealde.es/tipos-compliance/</text:a></text:p>
      <text:p text:style-name="P12"/>
      <text:p text:style-name="P13">Gestion incidentes sector privado y <text:span text:style-name="T2">ciudadania</text:span></text:p>
      <text:p text:style-name="P12"><text:a xlink:type="simple" xlink:href="https://www.incibe-cert.es/sites/default/files/contenidos/guias/doc/incibe-cert_gestion_ciberincidentes_sector_privado.pdf" text:style-name="Internet_20_link" text:visited-style-name="Visited_20_Internet_20_Link">https://www.incibe-cert.es/sites/default/files/contenidos/guias/doc/incibe-cert_gestion_ciberincidentes_sector_privado.pdf</text:a></text:p>
      <text:p text:style-name="P12"/>
      <text:p text:style-name="P12"><text:a xlink:type="simple" xlink:href="https://www.aepd.es/sites/default/files/2019-09/guia-brechas-seguridad.pdf" text:style-name="Internet_20_link" text:visited-style-name="Visited_20_Internet_20_Link">https://www.aepd.es/sites/default/files/2019-09/guia-brechas-seguridad.pdf</text:a></text:p>
      <text:p text:style-name="P12"/>
      <text:p text:style-name="P14">Comunicacion incidentes</text:p>
      <text:p text:style-name="P12"><text:a xlink:type="simple" xlink:href="https://es.linkedin.com/pulse/comunicación-de-incidentes-8-recomendaciones-prácticas-fernando-peña" text:style-name="Internet_20_link" text:visited-style-name="Visited_20_Internet_20_Link">https://es.linkedin.com/pulse/comunicaci%C3%B3n-de-incidentes-8-recomendaciones-pr%C3%A1cticas-fernando-pe%C3%B1a</text:a></text:p>
      <text:p text:style-name="P12"><text:a xlink:type="simple" xlink:href="https://www.metacompliance.com/es/blog/cyber-security-awareness/the-importance-of-security-incident-reporting" text:style-name="Internet_20_link" text:visited-style-name="Visited_20_Internet_20_Link"/></text:p>
      <text:p text:style-name="P12">La importancia de la notificación de incidentes de seguridad</text:p>
      <text:p text:style-name="P12"><text:a xlink:type="simple" xlink:href="https://www.metacompliance.com/es/blog/cyber-security-awareness/the-importance-of-security-incident-reporting" text:style-name="Internet_20_link" text:visited-style-name="Visited_20_Internet_20_Link">https://www.metacompliance.com/es/blog/cyber-security-awareness/the-importance-of-security-incident-reporting</text:a></text:p>
      <text:p text:style-name="P12">Notificación de Incidentes de Seguridad</text:p>
      <text:p text:style-name="P12"><text:a xlink:type="simple" xlink:href="https://ciberseguridad.comillas.edu/notificacion-de-incidentes-de-seguridad/" text:style-name="Internet_20_link" text:visited-style-name="Visited_20_Internet_20_Link">https://ciberseguridad.comillas.edu/notificacion-de-incidentes-de-seguridad/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000000" loext:opacity="100%" style:text-line-through-style="none" style:text-line-through-type="none" style:font-name="Arial1" fo:font-family="Arial" style:font-family-generic="swiss" style:font-pitch="variable" fo:font-size="12pt" style:text-underline-style="none" fo:font-weight="normal" officeooo:rsid="004960d7" style:font-size-asian="12pt" style:font-weight-asian="normal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Pa12" style:family="paragraph" style:parent-style-name="Default" style:default-outline-level="">
      <style:paragraph-properties style:line-height-at-least="0.355cm"/>
    </style:style>
    <style:style style:name="Pa6" style:family="paragraph" style:parent-style-name="Default" style:default-outline-level="">
      <style:paragraph-properties style:line-height-at-least="0.355cm"/>
    </style:style>
    <style:style style:name="Pa20" style:family="paragraph" style:parent-style-name="Default" style:default-outline-level="">
      <style:paragraph-properties style:line-height-at-least="0.355cm"/>
    </style:style>
    <style:style style:name="Pa18" style:family="paragraph" style:parent-style-name="Default" style:default-outline-level="">
      <style:paragraph-properties style:line-height-at-least="0.355cm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Arial1" fo:font-family="Arial" style:font-family-generic="swiss" style:font-pitch="variable"/>
    </style:style>
    <style:style style:name="WW_5f_CharLFO1LVL3" style:display-name="WW_CharLFO1LVL3" style:family="text">
      <style:text-properties style:font-name="Arial1" fo:font-family="Arial" style:font-family-generic="swiss" style:font-pitch="variable"/>
    </style:style>
    <style:style style:name="WW_5f_CharLFO1LVL4" style:display-name="WW_CharLFO1LVL4" style:family="text">
      <style:text-properties style:font-name="Arial1" fo:font-family="Arial" style:font-family-generic="swiss" style:font-pitch="variable"/>
    </style:style>
    <style:style style:name="WW_5f_CharLFO1LVL5" style:display-name="WW_CharLFO1LVL5" style:family="text">
      <style:text-properties style:font-name="Arial1" fo:font-family="Arial" style:font-family-generic="swiss" style:font-pitch="variable"/>
    </style:style>
    <style:style style:name="WW_5f_CharLFO1LVL6" style:display-name="WW_CharLFO1LVL6" style:family="text">
      <style:text-properties style:font-name="Arial1" fo:font-family="Arial" style:font-family-generic="swiss" style:font-pitch="variable"/>
    </style:style>
    <style:style style:name="WW_5f_CharLFO1LVL7" style:display-name="WW_CharLFO1LVL7" style:family="text">
      <style:text-properties style:font-name="Arial1" fo:font-family="Arial" style:font-family-generic="swiss" style:font-pitch="variable"/>
    </style:style>
    <style:style style:name="WW_5f_CharLFO1LVL8" style:display-name="WW_CharLFO1LVL8" style:family="text">
      <style:text-properties style:font-name="Arial1" fo:font-family="Arial" style:font-family-generic="swiss" style:font-pitch="variable"/>
    </style:style>
    <style:style style:name="WW_5f_CharLFO1LVL9" style:display-name="WW_CharLFO1LVL9" style:family="text">
      <style:text-properties style:font-name="Arial1" fo:font-family="Ari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5T15:53:07.140000000</dc:date>
    <meta:editing-duration>PT1H8M44S</meta:editing-duration>
    <meta:editing-cycles>17</meta:editing-cycles>
    <meta:generator>LibreOffice/24.2.4.2$Windows_X86_64 LibreOffice_project/51a6219feb6075d9a4c46691dcfe0cd9c4fff3c2</meta:generator>
    <meta:document-statistic meta:table-count="1" meta:image-count="0" meta:object-count="0" meta:page-count="3" meta:paragraph-count="74" meta:word-count="470" meta:character-count="5018" meta:non-whitespace-character-count="4644"/>
  </office:meta>
</office:document-meta>
</file>