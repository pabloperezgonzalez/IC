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', Helvetic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5" style:family="table">
      <style:table-properties style:width="17.586cm" table:align="left" fo:background-color="transparent">
        <style:background-image/>
      </style:table-properties>
    </style:style>
    <style:style style:name="Tabla15.A" style:family="table-column">
      <style:table-column-properties style:column-width="0.794cm"/>
    </style:style>
    <style:style style:name="Tabla15.B" style:family="table-column">
      <style:table-column-properties style:column-width="16.792cm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77bc65" fo:padding="0.097cm" fo:border="0.5pt solid #000000">
        <style:background-image/>
      </style:table-cell-properties>
    </style:style>
    <style:style style:name="Tabla15.A2" style:family="table-cell">
      <style:table-cell-properties fo:padding="0.097cm" fo:border-left="0.5pt solid #000000" fo:border-right="0.5pt solid #000000" fo:border-top="none" fo:border-bottom="0.5pt solid #000000"/>
    </style:style>
    <style:style style:name="Tabla15.A3" style:family="table-cell">
      <style:table-cell-properties fo:background-color="#77bc6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5.A4" style:family="table-cell">
      <style:table-cell-properties fo:padding="0.097cm" fo:border-left="0.5pt solid #000000" fo:border-right="none" fo:border-top="none" fo:border-bottom="0.5pt solid #000000"/>
    </style:style>
    <style:style style:name="Tabla15.B4" style:family="table-cell">
      <style:table-cell-properties fo:padding="0.097cm" fo:border-left="0.5pt solid #000000" fo:border-right="0.5pt solid #000000" fo:border-top="none" fo:border-bottom="0.5pt solid #000000"/>
    </style:style>
    <style:style style:name="Tabla15.A5" style:family="table-cell">
      <style:table-cell-properties fo:padding="0.097cm" fo:border-left="0.5pt solid #000000" fo:border-right="none" fo:border-top="none" fo:border-bottom="0.5pt solid #000000"/>
    </style:style>
    <style:style style:name="Tabla15.B5" style:family="table-cell">
      <style:table-cell-properties fo:padding="0.097cm" fo:border-left="0.5pt solid #000000" fo:border-right="0.5pt solid #000000" fo:border-top="none" fo:border-bottom="0.5pt solid #000000"/>
    </style:style>
    <style:style style:name="Tabla15.A6" style:family="table-cell">
      <style:table-cell-properties fo:padding="0.097cm" fo:border-left="0.5pt solid #000000" fo:border-right="none" fo:border-top="none" fo:border-bottom="0.5pt solid #000000"/>
    </style:style>
    <style:style style:name="Tabla15.B6" style:family="table-cell">
      <style:table-cell-properties fo:padding="0.097cm" fo:border-left="0.5pt solid #000000" fo:border-right="0.5pt solid #000000" fo:border-top="none" fo:border-bottom="0.5pt solid #000000"/>
    </style:style>
    <style:style style:name="Tabla15.A7" style:family="table-cell">
      <style:table-cell-properties fo:padding="0.097cm" fo:border-left="0.5pt solid #000000" fo:border-right="none" fo:border-top="none" fo:border-bottom="0.5pt solid #000000"/>
    </style:style>
    <style:style style:name="Tabla15.B7" style:family="table-cell">
      <style:table-cell-properties fo:padding="0.097cm" fo:border-left="0.5pt solid #000000" fo:border-right="0.5pt solid #000000" fo:border-top="none" fo:border-bottom="0.5pt solid #000000"/>
    </style:style>
    <style:style style:name="Tabla15.A8" style:family="table-cell">
      <style:table-cell-properties fo:padding="0.097cm" fo:border-left="0.5pt solid #000000" fo:border-right="none" fo:border-top="none" fo:border-bottom="0.5pt solid #000000"/>
    </style:style>
    <style:style style:name="Tabla15.B8" style:family="table-cell">
      <style:table-cell-properties fo:padding="0.097cm" fo:border-left="0.5pt solid #000000" fo:border-right="0.5pt solid #000000" fo:border-top="none" fo:border-bottom="0.5pt solid #000000"/>
    </style:style>
    <style:style style:name="Tabla15.A9" style:family="table-cell">
      <style:table-cell-properties fo:padding="0.097cm" fo:border-left="0.5pt solid #000000" fo:border-right="none" fo:border-top="none" fo:border-bottom="0.5pt solid #000000"/>
    </style:style>
    <style:style style:name="Tabla15.B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2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solid" style:text-underline-width="auto" style:text-underline-color="font-color" fo:font-weight="normal" officeooo:rsid="02829701" officeooo:paragraph-rsid="001553b2" style:font-size-asian="12pt" style:font-weight-asian="normal" style:font-size-complex="12pt"/>
    </style:style>
    <style:style style:name="P2" style:family="paragraph" style:parent-style-name="Pa18">
      <loext:graphic-properties draw:fill="none"/>
      <style:paragraph-properties fo:margin-top="0cm" fo:margin-bottom="0cm" style:contextual-spacing="false" fo:line-height="2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5ed1a" officeooo:paragraph-rsid="001553b2" style:font-size-asian="12pt" style:font-style-asian="normal" style:font-weight-asian="normal" style:font-size-complex="12pt" style:font-style-complex="normal"/>
    </style:style>
    <style:style style:name="P3" style:family="paragraph" style:parent-style-name="Pa18">
      <loext:graphic-properties draw:fill="none"/>
      <style:paragraph-properties fo:margin-top="0cm" fo:margin-bottom="0cm" style:contextual-spacing="false" fo:line-height="2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6f8ba" officeooo:paragraph-rsid="0016f8ba" style:font-size-asian="12pt" style:font-style-asian="normal" style:font-weight-asian="normal" style:font-size-complex="12pt" style:font-style-complex="normal"/>
    </style:style>
    <style:style style:name="P4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9b049" officeooo:paragraph-rsid="0019b049" style:font-size-asian="12pt" style:font-style-asian="normal" style:font-weight-asian="normal" style:font-size-complex="12pt" style:font-style-complex="normal"/>
    </style:style>
    <style:style style:name="P5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9b049" officeooo:paragraph-rsid="0022749c" style:font-size-asian="12pt" style:font-style-asian="normal" style:font-weight-asian="normal" style:font-size-complex="12pt" style:font-style-complex="normal"/>
    </style:style>
    <style:style style:name="P6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b082e" officeooo:paragraph-rsid="001b082e" style:font-size-asian="12pt" style:font-style-asian="normal" style:font-weight-asian="normal" style:font-size-complex="12pt" style:font-style-complex="normal"/>
    </style:style>
    <style:style style:name="P7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b082e" officeooo:paragraph-rsid="0019b049" style:font-size-asian="12pt" style:font-style-asian="normal" style:font-weight-asian="normal" style:font-size-complex="12pt" style:font-style-complex="normal"/>
    </style:style>
    <style:style style:name="P8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d3203" officeooo:paragraph-rsid="001d3203" style:font-size-asian="12pt" style:font-style-asian="normal" style:font-weight-asian="normal" style:font-size-complex="12pt" style:font-style-complex="normal"/>
    </style:style>
    <style:style style:name="P9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ed13a" officeooo:paragraph-rsid="001ed13a" style:font-size-asian="12pt" style:font-style-asian="normal" style:font-weight-asian="normal" style:font-size-complex="12pt" style:font-style-complex="normal"/>
    </style:style>
    <style:style style:name="P10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22749c" officeooo:paragraph-rsid="0022749c" style:font-size-asian="12pt" style:font-style-asian="normal" style:font-weight-asian="normal" style:font-size-complex="12pt" style:font-style-complex="normal"/>
    </style:style>
    <style:style style:name="P11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22ed45" officeooo:paragraph-rsid="0022ed45" style:font-size-asian="12pt" style:font-style-asian="normal" style:font-weight-asian="normal" style:font-size-complex="12pt" style:font-style-complex="normal"/>
    </style:style>
    <style:style style:name="P12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232d06" officeooo:paragraph-rsid="00232d06" style:font-size-asian="12pt" style:font-style-asian="normal" style:font-weight-asian="normal" style:font-size-complex="12pt" style:font-style-complex="normal"/>
    </style:style>
    <style:style style:name="P13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250333" officeooo:paragraph-rsid="00250333" style:font-size-asian="12pt" style:font-style-asian="normal" style:font-weight-asian="normal" style:font-size-complex="12pt" style:font-style-complex="normal"/>
    </style:style>
    <style:style style:name="P14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26d27e" officeooo:paragraph-rsid="0026d27e" style:font-size-asian="12pt" style:font-style-asian="normal" style:font-weight-asian="normal" style:font-size-complex="12pt" style:font-style-complex="normal"/>
    </style:style>
    <style:style style:name="P15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2f8554" officeooo:paragraph-rsid="002f8554" style:font-size-asian="12pt" style:font-style-asian="normal" style:font-weight-asian="normal" style:font-size-complex="12pt" style:font-style-complex="normal"/>
    </style:style>
    <style:style style:name="P16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3a3cb3" officeooo:paragraph-rsid="003a3cb3" style:font-size-asian="12pt" style:font-style-asian="normal" style:font-weight-asian="normal" style:font-size-complex="12pt" style:font-style-complex="normal"/>
    </style:style>
    <style:style style:name="P17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422ea9" officeooo:paragraph-rsid="00422ea9" style:font-size-asian="12pt" style:font-style-asian="normal" style:font-weight-asian="normal" style:font-size-complex="12pt" style:font-style-complex="normal"/>
    </style:style>
    <style:style style:name="P18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461f3b" officeooo:paragraph-rsid="00461f3b" style:font-size-asian="12pt" style:font-style-asian="normal" style:font-weight-asian="normal" style:font-size-complex="12pt" style:font-style-complex="normal"/>
    </style:style>
    <style:style style:name="P19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4ac6fb" officeooo:paragraph-rsid="004ac6fb" style:font-size-asian="12pt" style:font-style-asian="normal" style:font-weight-asian="normal" style:font-size-complex="12pt" style:font-style-complex="normal"/>
    </style:style>
    <style:style style:name="P20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4f0d93" officeooo:paragraph-rsid="004f0d93" style:font-size-asian="12pt" style:font-style-asian="normal" style:font-weight-asian="normal" style:font-size-complex="12pt" style:font-style-complex="normal"/>
    </style:style>
    <style:style style:name="P21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551e2c" officeooo:paragraph-rsid="00551e2c" style:font-size-asian="12pt" style:font-style-asian="normal" style:font-weight-asian="normal" style:font-size-complex="12pt" style:font-style-complex="normal"/>
    </style:style>
    <style:style style:name="P22" style:family="paragraph" style:parent-style-name="Standard"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124f12e" style:font-size-asian="12pt" style:font-weight-asian="normal" style:font-size-complex="12pt"/>
    </style:style>
    <style:style style:name="P23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style:rfc-language-tag="ca-ES-valencia" fo:language="ca" fo:country="ES" fo:font-style="normal" style:text-underline-style="none" fo:font-weight="normal" officeooo:rsid="001b082e" officeooo:paragraph-rsid="001b082e" style:font-size-asian="12pt" style:font-style-asian="normal" style:font-weight-asian="normal" style:font-size-complex="12pt" style:font-style-complex="normal"/>
    </style:style>
    <style:style style:name="P24" style:family="paragraph" style:parent-style-name="Pa20">
      <style:paragraph-properties fo:margin-top="0cm" fo:margin-bottom="0cm" style:contextual-spacing="false" fo:line-height="100%" fo:text-align="justify" style:justify-single-word="false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5197e9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Pa20">
      <style:paragraph-properties fo:line-height="100%" fo:text-align="justify" style:justify-single-word="fals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5197e9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Pa20" style:master-page-name="">
      <style:paragraph-properties fo:line-height="100%" fo:text-align="justify" style:justify-single-word="false" style:page-number="auto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5197e9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/>
      <style:text-properties fo:color="#ffffff" loext:opacity="100%" style:text-line-through-style="none" style:text-line-through-type="none" style:font-name="Arial1" fo:font-size="12pt" fo:language="es" fo:country="ES" style:text-underline-style="none" fo:font-weight="normal" officeooo:rsid="01bb72c9" officeooo:paragraph-rsid="001553b2" style:font-size-asian="12pt" style:font-weight-asian="normal" style:font-size-complex="12pt"/>
    </style:style>
    <style:style style:name="P28" style:family="paragraph" style:parent-style-name="Pa12">
      <loext:graphic-properties draw:fill="none"/>
      <style:paragraph-properties fo:margin-left="1cm" fo:margin-right="0cm" fo:margin-top="0cm" fo:margin-bottom="0cm" style:contextual-spacing="false" fo:line-height="100%" fo:text-align="justify" style:justify-single-word="false" fo:text-indent="0cm" style:auto-text-indent="false" fo:background-color="transparent" style:shadow="none"/>
      <style:text-properties fo:font-variant="normal" fo:text-transform="none" fo:color="#000000" loext:opacity="100%" style:text-line-through-style="none" style:text-line-through-type="none" style:font-name="Arial1" fo:font-size="12pt" fo:letter-spacing="normal" fo:language="es" fo:country="ES" fo:font-style="normal" style:text-underline-style="none" fo:font-weight="normal" officeooo:rsid="01289979" officeooo:paragraph-rsid="001553b2" style:text-blinking="false" style:font-name-asian="NSimSun" style:font-size-asian="12pt" style:font-weight-asian="normal" style:font-name-complex="Lucida Sans" style:font-size-complex="12pt" style:font-weight-complex="bold" loext:shadow="none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1" fo:font-size="12pt" fo:letter-spacing="normal" fo:language="es" fo:country="ES" fo:font-style="normal" style:text-underline-style="none" fo:font-weight="normal" officeooo:rsid="01289979" officeooo:paragraph-rsid="001553b2" style:text-blinking="false" style:font-name-asian="NSimSun" style:font-size-asian="12pt" style:font-weight-asian="normal" style:font-name-complex="Lucida Sans" style:font-size-complex="12pt" style:font-weight-complex="bold" loext:shadow="none"/>
    </style:style>
    <style:style style:name="P30" style:family="paragraph" style:parent-style-name="Text_20_body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font-variant="normal" fo:text-transform="none" fo:color="#444444" loext:opacity="100%" style:text-line-through-style="none" style:text-line-through-type="none" style:font-name="Roboto" fo:font-size="12pt" fo:letter-spacing="normal" fo:language="es" fo:country="ES" fo:font-style="normal" style:text-underline-style="none" fo:font-weight="normal" officeooo:rsid="0022ed45" officeooo:paragraph-rsid="0022ed45" style:font-size-asian="12pt" style:font-style-asian="normal" style:font-weight-asian="normal" style:font-size-complex="12pt" style:font-style-complex="normal"/>
    </style:style>
    <style:style style:name="P31" style:family="paragraph" style:parent-style-name="Heading_20_1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font-variant="normal" fo:text-transform="none" fo:color="#444444" loext:opacity="100%" style:text-line-through-style="none" style:text-line-through-type="none" style:font-name="Roboto" fo:font-size="12pt" fo:letter-spacing="normal" fo:language="es" fo:country="ES" fo:font-style="normal" style:text-underline-style="none" fo:font-weight="normal" officeooo:rsid="0022ed45" officeooo:paragraph-rsid="0022ed45" style:font-size-asian="12pt" style:font-style-asian="normal" style:font-weight-asian="normal" style:font-size-complex="12pt" style:font-style-complex="normal"/>
    </style:style>
    <style:style style:name="P32" style:family="paragraph" style:parent-style-name="Pa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text-line-through-style="none" style:text-line-through-type="none" style:font-name="Arial1" fo:font-size="12pt" fo:language="es" fo:country="ES" style:text-underline-style="none" fo:font-weight="normal" officeooo:rsid="026538f8" officeooo:paragraph-rsid="001553b2" style:font-size-asian="12pt" style:font-weight-asian="normal" style:font-size-complex="12pt"/>
    </style:style>
    <style:style style:name="P33" style:family="paragraph" style:parent-style-name="Standard">
      <style:text-properties officeooo:rsid="003daf8b" officeooo:paragraph-rsid="004ba4a7"/>
    </style:style>
    <style:style style:name="P34" style:family="paragraph" style:parent-style-name="Standard">
      <style:text-properties officeooo:rsid="001f3535" officeooo:paragraph-rsid="004e8520"/>
    </style:style>
    <style:style style:name="P35" style:family="paragraph" style:parent-style-name="Standard">
      <style:text-properties officeooo:rsid="00245468" officeooo:paragraph-rsid="004e8520"/>
    </style:style>
    <style:style style:name="P36" style:family="paragraph" style:parent-style-name="Pa20">
      <style:paragraph-properties fo:line-height="100%" fo:text-align="justify" style:justify-single-word="false"/>
      <style:text-properties style:font-name="Calibri" fo:font-size="10pt" fo:language="es" fo:country="ES" officeooo:paragraph-rsid="005197e9" style:font-size-asian="10pt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 style:shadow="none"/>
      <style:text-properties style:font-name="Calibri" fo:font-size="10pt" officeooo:paragraph-rsid="005197e9" style:font-size-asian="10pt" style:font-size-complex="10pt"/>
    </style:style>
    <style:style style:name="P38" style:family="paragraph" style:parent-style-name="Pa18" style:list-style-name="L1">
      <style:paragraph-properties fo:line-height="100%" fo:text-align="justify" style:justify-single-word="false"/>
      <style:text-properties style:font-name="Calibri" fo:font-size="10pt" fo:language="es" fo:country="ES" officeooo:paragraph-rsid="005197e9" style:font-size-asian="10pt" style:font-size-complex="10pt"/>
    </style:style>
    <style:style style:name="P39" style:family="paragraph" style:parent-style-name="Pa18" style:list-style-name="L2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5197e9" style:font-size-asian="10pt" style:font-style-asian="normal" style:font-weight-asian="normal" style:font-size-complex="10pt" style:font-style-complex="normal"/>
    </style:style>
    <style:style style:name="P40" style:family="paragraph" style:parent-style-name="Pa18" style:list-style-name="L2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5197e9" style:font-size-asian="10pt" style:font-style-asian="normal" style:font-weight-asian="normal" style:font-size-complex="10pt" style:font-style-complex="normal"/>
    </style:style>
    <style:style style:name="P41" style:family="paragraph" style:parent-style-name="Pa18" style:list-style-name="L2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5197e9" style:font-size-asian="10pt" style:font-style-asian="normal" style:font-weight-asian="normal" style:font-size-complex="10pt" style:font-style-complex="normal"/>
    </style:style>
    <style:style style:name="P42" style:family="paragraph" style:parent-style-name="Pa18" style:list-style-name="L4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5197e9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Pa18" style:list-style-name="L4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5197e9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Pa18" style:list-style-name="L3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5197e9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Pa18" style:list-style-name="L3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5197e9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Pa18" style:list-style-name="L3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5197e9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Pa18" style:list-style-name="L5">
      <loext:graphic-properties draw:fill="none"/>
      <style:paragraph-properties fo:margin-top="0cm" fo:margin-bottom="0cm" style:contextual-spacing="false" fo:line-height="2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6f8ba" officeooo:paragraph-rsid="0016f8ba" style:font-size-asian="12pt" style:font-style-asian="normal" style:font-weight-asian="normal" style:font-size-complex="12pt" style:font-style-complex="normal"/>
    </style:style>
    <style:style style:name="P48" style:family="paragraph" style:parent-style-name="Pa18" style:list-style-name="L5">
      <loext:graphic-properties draw:fill="none"/>
      <style:paragraph-properties fo:margin-top="0cm" fo:margin-bottom="0cm" style:contextual-spacing="false" fo:line-height="2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d0756" officeooo:paragraph-rsid="001d0756" style:font-size-asian="12pt" style:font-style-asian="normal" style:font-weight-asian="normal" style:font-size-complex="12pt" style:font-style-complex="normal"/>
    </style:style>
    <style:style style:name="P49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551e2c" officeooo:paragraph-rsid="00551e2c" style:font-size-asian="12pt" style:font-style-asian="normal" style:font-weight-asian="normal" style:font-size-complex="12pt" style:font-style-complex="normal"/>
    </style:style>
    <style:style style:name="P50" style:family="paragraph" style:parent-style-name="Pa1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571af0" officeooo:paragraph-rsid="00571af0" style:font-size-asian="12pt" style:font-style-asian="normal" style:font-weight-asian="normal" style:font-size-complex="12pt" style:font-style-complex="normal"/>
    </style:style>
    <style:style style:name="P51" style:family="paragraph" style:parent-style-name="Standard" style:list-style-name="L1">
      <style:paragraph-properties fo:line-height="100%" fo:text-align="justify" style:justify-single-word="false"/>
      <style:text-properties style:font-name="Calibri" fo:font-size="10pt" fo:language="es" fo:country="ES" officeooo:paragraph-rsid="005197e9" style:font-size-asian="10pt" style:font-size-complex="10pt"/>
    </style:style>
    <style:style style:name="P52" style:family="paragraph" style:parent-style-name="Standard" style:list-style-name="L4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5197e9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9b049"/>
    </style:style>
    <style:style style:name="T2" style:family="text">
      <style:text-properties officeooo:rsid="0022749c"/>
    </style:style>
    <style:style style:name="T3" style:family="text">
      <style:text-properties style:rfc-language-tag="ca-ES-valencia" fo:language="ca" fo:country="ES"/>
    </style:style>
    <style:style style:name="T4" style:family="text">
      <style:text-properties officeooo:rsid="00474f57"/>
    </style:style>
    <style:style style:name="T5" style:family="text">
      <style:text-properties officeooo:rsid="005116b6"/>
    </style:style>
    <style:style style:name="T6" style:family="text">
      <style:text-properties officeooo:rsid="005197e9"/>
    </style:style>
    <style:style style:name="T7" style:family="text">
      <style:text-properties officeooo:rsid="000b29e3"/>
    </style:style>
    <style:style style:name="T8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03afdb9" style:font-style-asian="normal" style:font-weight-asian="normal" style:font-style-complex="normal"/>
    </style:style>
    <style:style style:name="T9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2829701" style:font-style-asian="normal" style:font-weight-asian="normal" style:font-style-complex="normal"/>
    </style:style>
    <style:style style:name="T10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015ed1a" style:font-style-asian="normal" style:font-weight-asian="normal" style:font-style-complex="normal"/>
    </style:style>
    <style:style style:name="T11" style:family="text">
      <style:text-properties officeooo:rsid="00160a44"/>
    </style:style>
    <style:style style:name="T12" style:family="text">
      <style:text-properties officeooo:rsid="002bcaea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27">Resultados de Aprendizaje</text:p>
          </table:table-cell>
          <table:covered-table-cell/>
        </table:table-row>
        <table:table-row>
          <table:table-cell table:style-name="Tabla15.A2" table:number-columns-spanned="2" office:value-type="string">
            <text:p text:style-name="P28">4. Implementa medidas de ciberseguridad en redes y sistemas respondiendo a los incidentes detectados y aplicando las técnicas de protección adecuadas </text:p>
          </table:table-cell>
          <table:covered-table-cell/>
        </table:table-row>
        <table:table-row table:style-name="Tabla15.1">
          <table:table-cell table:style-name="Tabla15.A3" table:number-columns-spanned="2" office:value-type="string">
            <text:p text:style-name="P27">Criterios de evaluación</text:p>
          </table:table-cell>
          <table:covered-table-cell/>
        </table:table-row>
        <table:table-row>
          <table:table-cell table:style-name="Tabla15.A4" office:value-type="string">
            <text:p text:style-name="P32">4a</text:p>
          </table:table-cell>
          <table:table-cell table:style-name="Tabla15.B4" office:value-type="string">
            <text:p text:style-name="P29">Se han desarrollado procedimientos de actuación detallados para dar respuesta, mitigar, eliminar o contener los tipos de incidentes de ciberseguridad más habituales</text:p>
          </table:table-cell>
        </table:table-row>
        <table:table-row>
          <table:table-cell table:style-name="Tabla15.A5" office:value-type="string">
            <text:p text:style-name="P32">4b</text:p>
          </table:table-cell>
          <table:table-cell table:style-name="Tabla15.B5" office:value-type="string">
            <text:p text:style-name="P29">Se han preparado respuestas ciberresilientes ante incidentes que permitan seguir prestando los servicios de la organización y fortaleciendo las capacidades de identificación, detección, prevención, contención, recuperación y cooperación con terceros</text:p>
          </table:table-cell>
        </table:table-row>
        <table:table-row>
          <table:table-cell table:style-name="Tabla15.A5" office:value-type="string">
            <text:p text:style-name="P32">4c</text:p>
          </table:table-cell>
          <table:table-cell table:style-name="Tabla15.B5" office:value-type="string">
            <text:p text:style-name="P29">Se ha establecido un flujo de toma de decisiones y escalado de incidentes interno y/o externo adecuados</text:p>
          </table:table-cell>
        </table:table-row>
        <table:table-row>
          <table:table-cell table:style-name="Tabla15.A5" office:value-type="string">
            <text:p text:style-name="P32">4d</text:p>
          </table:table-cell>
          <table:table-cell table:style-name="Tabla15.B5" office:value-type="string">
            <text:p text:style-name="P29">Se han llevado a cabo las tareas de restablecimiento de los servicios afectados por un incidente hasta confirmar la vuelta a la normalidad</text:p>
          </table:table-cell>
        </table:table-row>
        <table:table-row>
          <table:table-cell table:style-name="Tabla15.A5" office:value-type="string">
            <text:p text:style-name="P32">4e</text:p>
          </table:table-cell>
          <table:table-cell table:style-name="Tabla15.B5" office:value-type="string">
            <text:p text:style-name="P29">Se han documentado las acciones realizadas y las conclusiones que permitan mantener un registro de “lecciones aprendidas”.</text:p>
          </table:table-cell>
        </table:table-row>
        <table:table-row>
          <table:table-cell table:style-name="Tabla15.A5" office:value-type="string">
            <text:p text:style-name="P32">4f</text:p>
          </table:table-cell>
          <table:table-cell table:style-name="Tabla15.B5" office:value-type="string">
            <text:p text:style-name="P29">Se ha realizado un seguimiento adecuado del incidente para evitar que una situación similar se vuelva a repetir</text:p>
          </table:table-cell>
        </table:table-row>
      </table:table>
      <text:p text:style-name="P1">Contenidos:</text:p>
      <text:p text:style-name="P24"/>
      <text:p text:style-name="P36"><text:span text:style-name="T7">2. </text:span>Auditoría de incidentes de ciberseguridad:</text:p>
      <text:list text:style-name="L1">
        <text:list-item>
          <text:list>
            <text:list-item>
              <text:p text:style-name="P51">− Taxonomía de incidentes de ciberseguridad.</text:p>
            </text:list-item>
            <text:list-item>
              <text:p text:style-name="P38">− Controles, herramientas y mecanismos de monitorización, identificación, detección y alerta de incidentes: tipos y fuentes</text:p>
            </text:list-item>
            <text:list-item>
              <text:p text:style-name="P38">− Controles, herramientas y mecanismos de detección e identificación de incidentes de seguridad física.</text:p>
            </text:list-item>
            <text:list-item>
              <text:p text:style-name="P38">− Controles, herramientas y mecanismos de monitorización, identificación, detección y alerta de incidentes a través de la investigación en fuentes abiertas (OSINT).</text:p>
            </text:list-item>
            <text:list-item>
              <text:p text:style-name="P51">− Clasificación, valoración, documentación, seguimiento inicial de incidentes de ciberseguridad.</text:p>
            </text:list-item>
          </text:list>
        </text:list-item>
      </text:list>
      <text:p text:style-name="P37"><text:span text:style-name="T8">3. </text:span><text:span text:style-name="T9">I</text:span><text:span text:style-name="T10">nvestigación de los incidentes de ciberseguridad:</text:span></text:p>
      <text:list text:style-name="L2">
        <text:list-item>
          <text:p text:style-name="P39">− Recopilación de evidencias. <text:span text:style-name="T11">(y almacenado de forma segura)</text:span></text:p>
        </text:list-item>
        <text:list-item>
          <text:p text:style-name="P40">− Análisis de evidencias.</text:p>
        </text:list-item>
        <text:list-item>
          <text:p text:style-name="P40">− Investigación del incidente</text:p>
        </text:list-item>
        <text:list-item>
          <text:p text:style-name="P40">− Intercambio de información del incidente con proveedores u organismos competentes.</text:p>
        </text:list-item>
        <text:list-item>
          <text:p text:style-name="P41">− Medidas de contención de incidentes.</text:p>
        </text:list-item>
      </text:list>
      <text:p text:style-name="P25"/>
      <text:p text:style-name="P25"><text:span text:style-name="T6">4. </text:span>Implementación de medidas de ciberseguridad:</text:p>
      <text:list text:style-name="L3">
        <text:list-item>
          <text:p text:style-name="P44">− Desarrollar procedimientos de actuación detallados para dar respuesta, mitigar, eliminar o contener los tipos de incidentes.</text:p>
        </text:list-item>
        <text:list-item>
          <text:p text:style-name="P45">− Implantar capacidades de ciberresiliencia.</text:p>
        </text:list-item>
        <text:list-item>
          <text:p text:style-name="P45">− Establecer flujos de toma de decisiones y escalado interno y/o externo adecuados.</text:p>
        </text:list-item>
        <text:list-item>
          <text:p text:style-name="P45">− Tareas para restablecer los servicios afectados por incidentes.</text:p>
        </text:list-item>
        <text:list-item>
          <text:p text:style-name="P45">− Documentación</text:p>
        </text:list-item>
        <text:list-item>
          <text:p text:style-name="P46">− Seguimiento de incidentes para evitar una situación similar.</text:p>
        </text:list-item>
      </text:list>
      <text:p text:style-name="P26"><text:span text:style-name="T12">5. </text:span>Detección y documentación de incidentes de ciberseguridad:</text:p>
      <text:list text:style-name="L4">
        <text:list-item>
          <text:list>
            <text:list-item>
              <text:p text:style-name="P42">− Desarrollar procedimientos de actuación para la notificación de incidentes.</text:p>
            </text:list-item>
            <text:list-item>
              <text:p text:style-name="P43">− Notificación interna de incidentes.</text:p>
            </text:list-item>
            <text:list-item>
              <text:p text:style-name="P52">− Notificación de incidentes a quienes corresponda.</text:p>
            </text:list-item>
          </text:list>
        </text:list-item>
      </text:list>
      <text:p text:style-name="P2"/>
      <text:p text:style-name="P3"/>
      <text:p text:style-name="P3"><text:soft-page-break/>Actividades:</text:p>
      <text:list text:style-name="L5">
        <text:list-item>
          <text:p text:style-name="P47">Política de contraseñas ( linux )</text:p>
        </text:list-item>
        <text:list-item>
          <text:p text:style-name="P47">Cifrar el correo ( enigmail, mailvelope )</text:p>
        </text:list-item>
        <text:list-item>
          <text:p text:style-name="P48">email extractor . Comprueba tu exposición en cuentas de correo</text:p>
        </text:list-item>
        <text:list-item>
          <text:p text:style-name="P47">Instalar aplicaciones antimalware y activar filtros antispam</text:p>
        </text:list-item>
      </text:list>
      <text:p text:style-name="P3"/>
      <text:p text:style-name="P4">Recursos</text:p>
      <text:p text:style-name="P4">Plan ante incidentes🚨 - <text:span text:style-name="T5">Fases</text:span></text:p>
      <text:p text:style-name="P4"><text:a xlink:type="simple" xlink:href="https://www.instagram.com/reel/C7hUViXtNz8/?igsh=NHFhOWFlM2d1NTUz" text:style-name="Internet_20_link" text:visited-style-name="Visited_20_Internet_20_Link">https://www.instagram.com/reel/C7hUViXtNz8/?igsh=NHFhOWFlM2d1NTUz</text:a></text:p>
      <text:p text:style-name="P4"/>
      <text:p text:style-name="P4"><text:a xlink:type="simple" xlink:href="https://wwhttps://www.jesusninoc.com/02/04/implementacion-de-medidas-de-ciberseguridad-incidentes-de-ciberseguridad/#Establecer_flujos_de_toma_de_decisiones_y_escalado_interno_yo_externo_adecuadosw.muycomputer.com/2020/12/30/ciberseguridad-en-2020/" text:style-name="Internet_20_link" text:visited-style-name="Visited_20_Internet_20_Link">https://wwhttps://www.jesusninoc.com/02/04/implementacion-de-medidas-de-ciberseguridad-incidentes-de-ciberseguridad/#Establecer_flujos_de_toma_de_decisiones_y_escalado_interno_yo_externo_adecuadosw.muycomputer.com/2020/12/30/ciberseguridad-en-2020/</text:a></text:p>
      <text:p text:style-name="P4"/>
      <text:p text:style-name="P4"><text:a xlink:type="simple" xlink:href="https://www.muycomputer.com/2021/12/29/ciberseguridad-en-2021/" text:style-name="Internet_20_link" text:visited-style-name="Visited_20_Internet_20_Link">https://www.muycomputer.com/2021/12/29/ciberseguridad-en-2021/</text:a></text:p>
      <text:p text:style-name="P4"/>
      <text:p text:style-name="P4"><text:a xlink:type="simple" xlink:href="https://www.incibe.es/protege-tu-empresa/blog/medidas-seguridad-correo-electronico" text:style-name="Internet_20_link" text:visited-style-name="Visited_20_Internet_20_Link">https://www.incibe.es/protege-tu-empresa/blog/medidas-seguridad-correo-electronico</text:a></text:p>
      <text:p text:style-name="P4"><text:a xlink:type="simple" xlink:href="https://www.incibe.es/protege-tu-empresa/kit-concienciacion" text:style-name="Internet_20_link" text:visited-style-name="Visited_20_Internet_20_Link">https://www.incibe.es/protege-tu-empresa/kit-concienciacion</text:a></text:p>
      <text:p text:style-name="P4"/>
      <text:p text:style-name="P4"/>
      <text:p text:style-name="P4"><text:a xlink:type="simple" xlink:href="https://www.incibe.es/protege-tu-empresa/blog/que-no-te-secuestren-el-ordenador-medidas-para-evitarlo" text:style-name="Internet_20_link" text:visited-style-name="Visited_20_Internet_20_Link">https://www.incibe.es/protege-tu-empresa/blog/que-no-te-secuestren-el-ordenador-medidas-para-evitarlo</text:a></text:p>
      <text:p text:style-name="P4"/>
      <text:p text:style-name="P4"><text:a xlink:type="simple" xlink:href="https://www.incibe.es/protege-tu-empresa/blog/hacer-frente-los-5-incidentes-ciberseguridad-mas-comunes-12" text:style-name="Internet_20_link" text:visited-style-name="Visited_20_Internet_20_Link">https://www.incibe.es/protege-tu-empresa/blog/hacer-frente-los-5-incidentes-ciberseguridad-mas-comunes-12</text:a></text:p>
      <text:p text:style-name="P4"><text:a xlink:type="simple" xlink:href="https://www.incibe.es/protege-tu-empresa/blog/hacer-frente-los-5-incidentes-ciberseguridad-mas-comunes-22" text:style-name="Internet_20_link" text:visited-style-name="Visited_20_Internet_20_Link">https://www.incibe.es/protege-tu-empresa/blog/hacer-frente-los-5-incidentes-ciberseguridad-mas-comunes-22</text:a></text:p>
      <text:p text:style-name="P4"/>
      <text:p text:style-name="P4">Consejos para construir una política de resguardo de datos efectiv<text:span text:style-name="T4">a</text:span></text:p>
      <text:p text:style-name="P4"><text:a xlink:type="simple" xlink:href="https://www.welivesecurity.com/es/seguridad-corporativa/politicas-resguardo-informacion-mitigar-danos/" text:style-name="Internet_20_link" text:visited-style-name="Visited_20_Internet_20_Link">https://www.welivesecurity.com/es/seguridad-corporativa/politicas-resguardo-informacion-mitigar-danos/</text:a></text:p>
      <text:p text:style-name="P4"/>
      <text:p text:style-name="P10">Fuga de información</text:p>
      <text:p text:style-name="P10"><text:a xlink:type="simple" xlink:href="https://www.incibe-cert.es/blog/evitando-fuga-informacion-sci" text:style-name="Internet_20_link" text:visited-style-name="Visited_20_Internet_20_Link">https://www.incibe-cert.es/blog/evitando-fuga-informacion-sci</text:a></text:p>
      <text:p text:style-name="P4"><text:a xlink:type="simple" xlink:href="https://www.incibe.es/protege-tu-empresa/blog/fuga-detectada-informacion-robada" text:style-name="Internet_20_link" text:visited-style-name="Visited_20_Internet_20_Link">https://www.incibe.es/protege-tu-empresa/blog/fuga-detectada-informacion-robada</text:a></text:p>
      <text:p text:style-name="P5"><text:a xlink:type="simple" xlink:href="https://www.incibe.es/protege-tu-empresa/guias/guia-fuga-informacion" text:style-name="Internet_20_link" text:visited-style-name="Visited_20_Internet_20_Link">https://www.incibe.es/protege-tu-empresa/guias/guia-fuga-informacion</text:a> <text:s text:c="3"/><text:span text:style-name="T2">guia incibe</text:span></text:p>
      <text:p text:style-name="P11">Que es DLP</text:p>
      <text:p text:style-name="P10"><text:a xlink:type="simple" xlink:href="https://www.netskope.com/security-defined/what-is-data-loss-prevention-dlp" text:style-name="Internet_20_link" text:visited-style-name="Visited_20_Internet_20_Link">https://www.netskope.com/security-defined/what-is-data-loss-prevention-dlp</text:a></text:p>
      <text:p text:style-name="P10">DLP , IRM</text:p>
      <text:p text:style-name="P5"><text:a xlink:type="simple" xlink:href="https://www.sealpath.com/es/blog/dlp-vs-irm-solucion-proteger-informacion-sensible/" text:style-name="Internet_20_link" text:visited-style-name="Visited_20_Internet_20_Link">https://www.sealpath.com/es/blog/dlp-vs-irm-solucion-proteger-informacion-sensible/</text:a></text:p>
      <text:p text:style-name="P5"><text:a xlink:type="simple" xlink:href="https://www.endpointprotector.es/lp/endpoint-protector-3" text:style-name="Internet_20_link" text:visited-style-name="Visited_20_Internet_20_Link">https://www.endpointprotector.es/lp/endpoint-protector-3</text:a></text:p>
      <text:p text:style-name="P5"><text:a xlink:type="simple" xlink:href="https://www.nextdlp.com/platform" text:style-name="Internet_20_link" text:visited-style-name="Visited_20_Internet_20_Link"/></text:p>
      <text:p text:style-name="P5"><text:a xlink:type="simple" xlink:href="https://www.nextdlp.com/platform" text:style-name="Internet_20_link" text:visited-style-name="Visited_20_Internet_20_Link">https://www.nextdlp.com/platform</text:a></text:p>
      <text:p text:style-name="P5"/>
      <text:p text:style-name="P10">ILM</text:p>
      <text:p text:style-name="P10"><text:a xlink:type="simple" xlink:href="https://es.wikipedia.org/wiki/Information_Lifecycle_Management" text:style-name="Internet_20_link" text:visited-style-name="Visited_20_Internet_20_Link"><text:soft-page-break/>https://es.wikipedia.org/wiki/Information_Lifecycle_Management</text:a></text:p>
      <text:p text:style-name="P11">Insider risk detection</text:p>
      <text:p text:style-name="P11"><text:a xlink:type="simple" xlink:href="https://www.avasecurity.com/cyber/reveal" text:style-name="Internet_20_link" text:visited-style-name="Visited_20_Internet_20_Link">https://www.avasecurity.com/cyber/reveal</text:a></text:p>
      <text:p text:style-name="P11">Data breach, Data Leak</text:p>
      <text:p text:style-name="P11"><text:a xlink:type="simple" xlink:href="https://www.redeszone.net/tutoriales/seguridad/data-breach-data-leak-diferencias/" text:style-name="Internet_20_link" text:visited-style-name="Visited_20_Internet_20_Link">https://www.redeszone.net/tutoriales/seguridad/data-breach-data-leak-diferencias/</text:a></text:p>
      <text:p text:style-name="P11"/>
      <text:p text:style-name="P5"/>
      <text:p text:style-name="P4">Prevenir phishing</text:p>
      <text:p text:style-name="P4"><text:a xlink:type="simple" xlink:href="https://www.incibe.es/protege-tu-empresa/blog/prevenir-phishing" text:style-name="Internet_20_link" text:visited-style-name="Visited_20_Internet_20_Link">https://www.incibe.es/protege-tu-empresa/blog/prevenir-phishing</text:a></text:p>
      <text:p text:style-name="P4"/>
      <text:p text:style-name="P4">DuckDuckGo Email Protection: el pato protege tu correo. Así puedes hacerlo</text:p>
      <text:p text:style-name="P4"><text:a xlink:type="simple" xlink:href="https://www.linuxadictos.com/duckduckgo-email-protection-el-pato-protege-tu-correo-asi-puedes-hacerlo.html" text:style-name="Internet_20_link" text:visited-style-name="Visited_20_Internet_20_Link">https://www.linuxadictos.com/duckduckgo-email-protection-el-pato-protege-tu-correo-asi-puedes-hacerlo.html</text:a></text:p>
      <text:p text:style-name="P4"/>
      <text:p text:style-name="P4"><text:a xlink:type="simple" xlink:href="https://www.incibe.es/protege-tu-empresa/blog/descubre-proteger-tu-empresa-del-malware" text:style-name="Internet_20_link" text:visited-style-name="Visited_20_Internet_20_Link">https://www.incibe.es/protege-tu-empresa/blog/descubre-proteger-tu-empresa-del-malware</text:a></text:p>
      <text:p text:style-name="P4"/>
      <text:p text:style-name="P33">analizar enlaces y navegar seguros</text:p>
      <text:p text:style-name="P33"><text:a xlink:type="simple" xlink:href="https://www.redeszone.net/tutoriales/seguridad/paginas-analizar-link-seguridad/" text:style-name="Internet_20_link" text:visited-style-name="Visited_20_Internet_20_Link">https://www.redeszone.net/tutoriales/seguridad/paginas-analizar-link-seguridad/</text:a></text:p>
      <text:p text:style-name="P33"/>
      <text:p text:style-name="P4"/>
      <text:p text:style-name="P4">Ciber resiliencia</text:p>
      <text:p text:style-name="P4"><text:a xlink:type="simple" xlink:href="https://www.incibe-cert.es/blog/anticipar-las-cuatro-metas-ciberresiliencia" text:style-name="Internet_20_link" text:visited-style-name="Visited_20_Internet_20_Link">https://www.incibe-cert.es/blog/anticipar-las-cuatro-metas-ciberresiliencia</text:a></text:p>
      <text:p text:style-name="P4"/>
      <text:p text:style-name="P4"><text:a xlink:type="simple" xlink:href="https://protecciondatos-lopd.com/empresas/ciber-resiliencia/" text:style-name="Internet_20_link" text:visited-style-name="Visited_20_Internet_20_Link">https://protecciondatos-lopd.com/empresas/ciber-resiliencia/</text:a></text:p>
      <text:p text:style-name="P4"><text:a xlink:type="simple" xlink:href="https://www.solucionesseguras.com/landing/guias-de-interes/48-4-elementos-de-la-ciberresiliencia-aaa" text:style-name="Internet_20_link" text:visited-style-name="Visited_20_Internet_20_Link">https://www.solucionesseguras.com/landing/guias-de-interes/48-4-elementos-de-la-ciberresiliencia-aaa</text:a></text:p>
      <text:p text:style-name="P4"><text:a xlink:type="simple" xlink:href="https://www.gb-advisors.com/es/ciber-resiliencia-enfoque-de-seguridad/" text:style-name="Internet_20_link" text:visited-style-name="Visited_20_Internet_20_Link">https://www.gb-advisors.com/es/ciber-resiliencia-enfoque-de-seguridad/</text:a></text:p>
      <text:p text:style-name="P4"/>
      <text:p text:style-name="P4"><text:a xlink:type="simple" xlink:href="https://www.incibe-cert.es/blog/ransomware-medidas-preventivas-i" text:style-name="Internet_20_link" text:visited-style-name="Visited_20_Internet_20_Link">https://www.incibe-cert.es/blog/ransomware-medidas-preventivas-i</text:a></text:p>
      <text:p text:style-name="P4"/>
      <text:p text:style-name="P9">11/3/22 <text:a xlink:type="simple" xlink:href="https://www.incibe.es/protege-tu-empresa/blog/los-habitos-pyme-ciberresiliente" text:style-name="Internet_20_link" text:visited-style-name="Visited_20_Internet_20_Link"><text:span text:style-name="T1">https://www.incibe.es/protege-tu-empresa/blog/los-habitos-pyme-ciberresiliente</text:span></text:a></text:p>
      <text:p text:style-name="P4"/>
      <text:p text:style-name="P4">IMC</text:p>
      <text:p text:style-name="P4"><text:a xlink:type="simple" xlink:href="https://www.incibe-cert.es/guias-y-estudios/guias/imc-indicadores-mejora-ciberresiliencia" text:style-name="Internet_20_link" text:visited-style-name="Visited_20_Internet_20_Link">https://www.incibe-cert.es/guias-y-estudios/guias/imc-indicadores-mejora-ciberresiliencia</text:a></text:p>
      <text:p text:style-name="P4"/>
      <text:p text:style-name="P4"><text:a xlink:type="simple" xlink:href="https://www.incibe-cert.es/blog/ciberresiliencia-clave-sobreponerse-los-incidentes" text:style-name="Internet_20_link" text:visited-style-name="Visited_20_Internet_20_Link">https://www.incibe-cert.es/blog/ciberresiliencia-clave-sobreponerse-los-incidentes</text:a></text:p>
      <text:p text:style-name="P4"/>
      <text:p text:style-name="P10">Notificación y gestión de incidentes</text:p>
      <text:p text:style-name="P10"><text:a xlink:type="simple" xlink:href="https://www.incibe-cert.es/blog/conoces-guia-nacional-notificacion-y-gestion-ciberincidentes" text:style-name="Internet_20_link" text:visited-style-name="Visited_20_Internet_20_Link">https://www.incibe-cert.es/blog/conoces-guia-nacional-notificacion-y-gestion-ciberincidentes</text:a></text:p>
      <text:p text:style-name="P5"/>
      <text:p text:style-name="P4">Presa de <text:span text:style-name="T3">decisions</text:span></text:p>
      <text:p text:style-name="P4"><text:a xlink:type="simple" xlink:href="https://www.incibe.es/protege-tu-empresa/blog/plan-de-crisis" text:style-name="Internet_20_link" text:visited-style-name="Visited_20_Internet_20_Link">https://www.incibe.es/protege-tu-empresa/blog/plan-de-crisis</text:a></text:p>
      <text:p text:style-name="P4"><text:a xlink:type="simple" xlink:href="https://www.incibe.es/sites/default/files/contenidos/dosieres/metad_plan_de_contingencia_y_continuidad_de_negocio.pdf" text:style-name="Internet_20_link" text:visited-style-name="Visited_20_Internet_20_Link"/></text:p>
      <text:p text:style-name="P4"><text:a xlink:type="simple" xlink:href="https://www.incibe.es/sites/default/files/contenidos/dosieres/metad_plan_de_contingencia_y_continuidad_de_negocio.pdf" text:style-name="Internet_20_link" text:visited-style-name="Visited_20_Internet_20_Link">https://www.incibe.es/sites/default/files/contenidos/dosieres/metad_plan_de_contingencia_y_continuidad_de_negocio.pdf</text:a></text:p>
      <text:p text:style-name="P7"/>
      <text:p text:style-name="P6"/>
      <text:p text:style-name="P6">Plan de recuperación de desastres</text:p>
      <text:p text:style-name="P6"><text:a xlink:type="simple" xlink:href="https://www.incibe.es/protege-tu-empresa/blog/tienes-tu-plan-recuperacion-desastres" text:style-name="Internet_20_link" text:visited-style-name="Visited_20_Internet_20_Link">https://www.incibe.es/protege-tu-empresa/blog/tienes-tu-plan-recuperacion-desastres</text:a></text:p>
      <text:p text:style-name="P6"/>
      <text:p text:style-name="P6"><text:soft-page-break/>Recuperar.</text:p>
      <text:p text:style-name="P6"><text:a xlink:type="simple" xlink:href="https://www.incibe-cert.es/blog/recuperar-capacidad-las-organizaciones-restaurar-sus-servicios-ciberataque" text:style-name="Internet_20_link" text:visited-style-name="Visited_20_Internet_20_Link">https://www.incibe-cert.es/blog/recuperar-capacidad-las-organizaciones-restaurar-sus-servicios-ciberataque</text:a></text:p>
      <text:p text:style-name="P6"/>
      <text:p text:style-name="P6">Cinco pasos que tienes que dar ante una filtración de datos</text:p>
      <text:p text:style-name="P6"><text:a xlink:type="simple" xlink:href="https://www.muyseguridad.net/2022/02/09/cinco-pasos-filtracion-datos/" text:style-name="Internet_20_link" text:visited-style-name="Visited_20_Internet_20_Link">https://www.muyseguridad.net/2022/02/09/cinco-pasos-filtracion-datos/</text:a></text:p>
      <text:p text:style-name="P6"/>
      <text:p text:style-name="P6"/>
      <text:p text:style-name="P6"/>
      <text:p text:style-name="P23">Documentació d’accions</text:p>
      <text:p text:style-name="P6"><text:a xlink:type="simple" xlink:href="https://www.incibe.es/protege-tu-empresa/blog/respuesta-incidentes-he-restaurado-los-sistemas-y-ahora" text:style-name="Internet_20_link" text:visited-style-name="Visited_20_Internet_20_Link">https://www.incibe.es/protege-tu-empresa/blog/respuesta-incidentes-he-restaurado-los-sistemas-y-ahora</text:a></text:p>
      <text:p text:style-name="P6"/>
      <text:p text:style-name="P6"><text:a xlink:type="simple" xlink:href="https://www.incibe-cert.es/respuesta-incidentes/rediris/respuesta-incidentes" text:style-name="Internet_20_link" text:visited-style-name="Visited_20_Internet_20_Link">https://www.incibe-cert.es/respuesta-incidentes/rediris/respuesta-incidentes</text:a></text:p>
      <text:p text:style-name="P6"/>
      <text:p text:style-name="P6">Guía nacional de notificación y gestión de ciberincidentes</text:p>
      <text:p text:style-name="P6"><text:a xlink:type="simple" xlink:href="http://www.interior.gob.es/documents/10180/9771228/Guía+Nacional+de+Notificación+y+Gestión+de+Ciberincidentes.pdf" text:style-name="Internet_20_link" text:visited-style-name="Visited_20_Internet_20_Link">http://www.interior.gob.es/documents/10180/9771228/Gu%C3%ADa+Nacional+de+Notificaci%C3%B3n+y+Gesti%C3%B3n+de+Ciberincidentes.pdf</text:a></text:p>
      <text:p text:style-name="P6"/>
      <text:p text:style-name="P8">Anti ransomware-</text:p>
      <text:p text:style-name="P8"><text:a xlink:type="simple" xlink:href="https://www.adslzone.net/reportajes/antivirus/anti-ransomware/" text:style-name="Internet_20_link" text:visited-style-name="Visited_20_Internet_20_Link">https://www.adslzone.net/reportajes/antivirus/anti-ransomware/</text:a></text:p>
      <text:p text:style-name="P8">Instrucciones para eliminar el virus criptográfico ENCRYPTED</text:p>
      <text:p text:style-name="P8"><text:a xlink:type="simple" xlink:href="https://www.pcrisk.es/guias-de-desinfeccion/8257-encrypted-ransomware" text:style-name="Internet_20_link" text:visited-style-name="Visited_20_Internet_20_Link">https://www.pcrisk.es/guias-de-desinfeccion/8257-encrypted-ransomware</text:a></text:p>
      <text:p text:style-name="P8">monitorización, detección y bloqueo de procesos de cifrado malicioso</text:p>
      <text:p text:style-name="P8"><text:a xlink:type="simple" xlink:href="http://diposit.ub.edu/dspace/bitstream/2445/117062/2/memoria.pdf" text:style-name="Internet_20_link" text:visited-style-name="Visited_20_Internet_20_Link">http://diposit.ub.edu/dspace/bitstream/2445/117062/2/memoria.pdf</text:a></text:p>
      <text:p text:style-name="P12"/>
      <text:p text:style-name="P12">170+ Herramientas Gratis para Descifrar Ransomware </text:p>
      <text:p text:style-name="P12"><text:a xlink:type="simple" xlink:href="https://esgeeks.com/herramientas-gratuitas-descifrar-ransomware/" text:style-name="Internet_20_link" text:visited-style-name="Visited_20_Internet_20_Link">https://esgeeks.com/herramientas-gratuitas-descifrar-ransomware/</text:a></text:p>
      <text:p text:style-name="P12"/>
      <text:p text:style-name="P12">ransom+engaño(no se puede desencriptar)</text:p>
      <text:p text:style-name="P8"><text:a xlink:type="simple" xlink:href="https://www.pcrisk.es/guias-de-desinfeccion/8257-encrypted-ransomware" text:style-name="Internet_20_link" text:visited-style-name="Visited_20_Internet_20_Link">https://www.pcrisk.es/guias-de-desinfeccion/8257-encrypted-ransomware</text:a></text:p>
      <text:p text:style-name="P8"/>
      <text:p text:style-name="P13">Como actuar frente a ransomware</text:p>
      <text:p text:style-name="P8"><text:a xlink:type="simple" xlink:href="https://www.pcrisk.es/guias-de-desinfeccion/11159-cip-ransomware" text:style-name="Internet_20_link" text:visited-style-name="Visited_20_Internet_20_Link">https://www.pcrisk.es/guias-de-desinfeccion/11159-cip-ransomware</text:a></text:p>
      <text:p text:style-name="P8"/>
      <text:p text:style-name="P8">How to effectively respond to a ransomware attack in four key steps</text:p>
      <text:p text:style-name="P8"><text:a xlink:type="simple" xlink:href="https://www.nccgroup.com/de/executive-analysis-how-to-effectively-respond-to-a-ransomware-attack-in-four-key-steps/" text:style-name="Internet_20_link" text:visited-style-name="Visited_20_Internet_20_Link">https://www.nccgroup.com/de/executive-analysis-how-to-effectively-respond-to-a-ransomware-attack-in-four-key-steps/</text:a></text:p>
      <text:p text:style-name="P8"/>
      <text:p text:style-name="P8">¿Dónde descargar virus y malware? Algunos de los mejores sitios</text:p>
      <text:p text:style-name="P8"><text:a xlink:type="simple" xlink:href="https://protegermipc.net/2017/06/22/donde-descargar-virus-malware/" text:style-name="Internet_20_link" text:visited-style-name="Visited_20_Internet_20_Link">https://protegermipc.net/2017/06/22/donde-descargar-virus-malware/</text:a></text:p>
      <text:p text:style-name="P8"><text:a xlink:type="simple" xlink:href="https://www.tutorialjinni.com/gandcrab-v5-ransomware-sample-download.html" text:style-name="Internet_20_link" text:visited-style-name="Visited_20_Internet_20_Link">https://www.tutorialjinni.com/gandcrab-v5-ransomware-sample-download.html</text:a></text:p>
      <text:p text:style-name="P8"/>
      <text:p text:style-name="P14">nomoreransom.org</text:p>
      <text:p text:style-name="P8"><text:a xlink:type="simple" xlink:href="https://www.nomoreransom.org/en/decryption-tools.html" text:style-name="Internet_20_link" text:visited-style-name="Visited_20_Internet_20_Link">https://www.nomoreransom.org/en/decryption-tools.html</text:a></text:p>
      <text:p text:style-name="P8"/>
      <text:p text:style-name="P8">Despliegue y ejecución de un Ransomware en laboratorio de pruebas</text:p>
      <text:p text:style-name="P8"><text:a xlink:type="simple" xlink:href="https://www.youtube.com/watch?app=desktop&amp;v=429yils0Hcc" text:style-name="Internet_20_link" text:visited-style-name="Visited_20_Internet_20_Link">https://www.youtube.com/watch?app=desktop&amp;v=429yils0Hcc</text:a></text:p>
      <text:p text:style-name="P8"/>
      <text:p text:style-name="P8"/>
      <text:p text:style-name="P8">Pegasus, Chrysaor y otras APT: cómo protegerte de los malware para móvil</text:p>
      <text:p text:style-name="P8"><text:a xlink:type="simple" xlink:href="https://www.kaspersky.es/blog/how-to-protect-from-pegasus-spyware/26812/" text:style-name="Internet_20_link" text:visited-style-name="Visited_20_Internet_20_Link"><text:soft-page-break/>https://www.kaspersky.es/blog/how-to-protect-from-pegasus-spyware/26812/</text:a></text:p>
      <text:p text:style-name="P8"/>
      <text:p text:style-name="P11">Threat hunting</text:p>
      <text:p text:style-name="P11"><text:a xlink:type="simple" xlink:href="https://www.welivesecurity.com/la-es/2021/12/30/herramientas-realizar-threat-hunting-threat-intelligence/" text:style-name="Internet_20_link" text:visited-style-name="Visited_20_Internet_20_Link">https://www.welivesecurity.com/la-es/2021/12/30/herramientas-realizar-threat-hunting-threat-intelligence/</text:a></text:p>
      <text:p text:style-name="P11"/>
      <text:p text:style-name="P11">Servicio anti botnet</text:p>
      <text:p text:style-name="P11"><text:a xlink:type="simple" xlink:href="https://www.incibe.es/protege-tu-empresa/herramientas/servicio-antibotnet" text:style-name="Internet_20_link" text:visited-style-name="Visited_20_Internet_20_Link">https://www.incibe.es/protege-tu-empresa/herramientas/servicio-antibotnet</text:a></text:p>
      <text:p text:style-name="P11"/>
      <text:p text:style-name="P11"/>
      <text:p text:style-name="P11">Empleados que se van de la empresa: cómo gestionar un proceso clave para la seguridad</text:p>
      <text:p text:style-name="P11"><text:a xlink:type="simple" xlink:href="https://www.welivesecurity.com/la-es/2022/01/18/empleados-van-empresa-como-gestionar-proceso-clave-seguridad/" text:style-name="Internet_20_link" text:visited-style-name="Visited_20_Internet_20_Link">https://www.welivesecurity.com/la-es/2022/01/18/empleados-van-empresa-como-gestionar-proceso-clave-seguridad/</text:a></text:p>
      <text:p text:style-name="P11"/>
      <text:p text:style-name="P11"/>
      <text:p text:style-name="P11"><text:a xlink:type="simple" xlink:href="https://blog.segu-info.com.ar/2022/04/iniciarse-en-analisis-de-malware-en.html" text:style-name="Internet_20_link" text:visited-style-name="Visited_20_Internet_20_Link">https://blog.segu-info.com.ar/2022/04/iniciarse-en-analisis-de-malware-en.html</text:a></text:p>
      <text:p text:style-name="P11"><text:a xlink:type="simple" xlink:href="https://www.welivesecurity.com/la-es/2022/01/05/herramientas-de-linux-para-el-analisis-de-malware/" text:style-name="Internet_20_link" text:visited-style-name="Visited_20_Internet_20_Link">https://www.welivesecurity.com/la-es/2022/01/05/herramientas-de-linux-para-el-analisis-de-malware/</text:a></text:p>
      <text:p text:style-name="P11"/>
      <text:p text:style-name="P11"/>
      <text:p text:style-name="P11"/>
      <text:p text:style-name="P11"/>
      <text:p text:style-name="P11"/>
      <text:p text:style-name="P11">Guía de medidas de ciberseguridad para protegerse contra amenazas críticas (CISA)</text:p>
      <text:p text:style-name="P11"><text:a xlink:type="simple" xlink:href="https://blog.segu-info.com.ar/2022/01/guia-de-medidas-de-ciberseguridad-para.html" text:style-name="Internet_20_link" text:visited-style-name="Visited_20_Internet_20_Link">https://blog.segu-info.com.ar/2022/01/guia-de-medidas-de-ciberseguridad-para.html</text:a></text:p>
      <text:p text:style-name="P11"/>
      <text:p text:style-name="P11">Todos los emails temporales que debes bloquear para evitar el SPAM</text:p>
      <text:p text:style-name="P11"><text:a xlink:type="simple" xlink:href="https://www.redeszone.net/tutoriales/seguridad/correos-temporales-bloquear-spam/" text:style-name="Internet_20_link" text:visited-style-name="Visited_20_Internet_20_Link">https://www.redeszone.net/tutoriales/seguridad/correos-temporales-bloquear-spam/</text:a></text:p>
      <text:p text:style-name="P11"/>
      <text:p text:style-name="P15">Recuperacion</text:p>
      <text:p text:style-name="P11">Lista de tareas a realizar en un AD comprometido</text:p>
      <text:p text:style-name="P11"><text:a xlink:type="simple" xlink:href="https://blog.segu-info.com.ar/2022/06/lista-de-tareas-realizar-en-un-ad.html" text:style-name="Internet_20_link" text:visited-style-name="Visited_20_Internet_20_Link">https://blog.segu-info.com.ar/2022/06/lista-de-tareas-realizar-en-un-ad.html</text:a></text:p>
      <text:p text:style-name="P11"/>
      <text:p text:style-name="P11">Cómo protegerte cuando colaboras con trabajadores autónomos</text:p>
      <text:p text:style-name="P11"><text:a xlink:type="simple" xlink:href="https://www.kaspersky.es/blog/working-with-freelances-dangers/26862/" text:style-name="Internet_20_link" text:visited-style-name="Visited_20_Internet_20_Link">https://www.kaspersky.es/blog/working-with-freelances-dangers/26862/</text:a></text:p>
      <text:p text:style-name="P11"/>
      <text:p text:style-name="P11">Pagos en línea más seguros: PCI DSS versión 4.0</text:p>
      <text:p text:style-name="P11"><text:a xlink:type="simple" xlink:href="https://www.incibe.es/protege-tu-empresa/blog/pagos-linea-mas-seguros-pci-dss-version-40" text:style-name="Internet_20_link" text:visited-style-name="Visited_20_Internet_20_Link">https://www.incibe.es/protege-tu-empresa/blog/pagos-linea-mas-seguros-pci-dss-version-40</text:a></text:p>
      <text:p text:style-name="P11"/>
      <text:p text:style-name="P11">5 HERRAMIENTAS GRATUITAS QUE EL GOBIERNO DE ESTADOS UNIDOS PROPORCIONA A LAS EMPRESAS PAR ASEGURAR LOS DATOS EMPRESARIALES</text:p>
      <text:h text:style-name="P31" text:outline-level="1"><text:a xlink:type="simple" xlink:href="https://noticiasseguridad.com/tutoriales/5-herramientas-gratuitas-que-el-gobierno-de-estados-unidos-proporciona-a-las-empresas-par-asegurar-los-datos-empresariales/" text:style-name="Internet_20_link" text:visited-style-name="Visited_20_Internet_20_Link">https://noticiasseguridad.com/tutoriales/5-herramientas-gratuitas-que-el-gobierno-de-estados-unidos-proporciona-a-las-empresas-par-asegurar-los-datos-empresariales/</text:a></text:h>
      <text:p text:style-name="P30"/>
      <text:p text:style-name="P11">NetCut: Aprende a ver, administrar los dispositivos y controlar la red local</text:p>
      <text:p text:style-name="P11"><text:a xlink:type="simple" xlink:href="https://www.redeszone.net/analisis/software/netcut-ver-dispositivos-conectados-red/" text:style-name="Internet_20_link" text:visited-style-name="Visited_20_Internet_20_Link">https://www.redeszone.net/analisis/software/netcut-ver-dispositivos-conectados-red/</text:a></text:p>
      <text:p text:style-name="P11"/>
      <text:p text:style-name="P11">NETCUT FOR WINDOWS,MACOS, ANDROID</text:p>
      <text:p text:style-name="P11"><text:a xlink:type="simple" xlink:href="https://arcai.com/downloads/" text:style-name="Internet_20_link" text:visited-style-name="Visited_20_Internet_20_Link">https://arcai.com/downloads/</text:a></text:p>
      <text:p text:style-name="P11"/>
      <text:p text:style-name="P11"><text:a xlink:type="simple" xlink:href="https://www.youtube.com/watch?app=desktop&amp;v=jscwMhk4lSI" text:style-name="Internet_20_link" text:visited-style-name="Visited_20_Internet_20_Link">https://www.youtube.com/watch?app=desktop&amp;v=jscwMhk4lSI</text:a></text:p>
      <text:p text:style-name="P11"><text:soft-page-break/></text:p>
      <text:p text:style-name="P11"/>
      <text:p text:style-name="P16">CCN-CERT post cuantica</text:p>
      <text:p text:style-name="P16"><text:a xlink:type="simple" xlink:href="https://www.ccn.cni.es/index.php/es/docman/documentos-publicos/boletines-pytec/495-ccn-tec-009-recomendaciones-transicion-postcuantica-segura/file" text:style-name="Internet_20_link" text:visited-style-name="Visited_20_Internet_20_Link">https://www.ccn.cni.es/index.php/es/docman/documentos-publicos/boletines-pytec/495-ccn-tec-009-recomendaciones-transicion-postcuantica-segura/file</text:a></text:p>
      <text:p text:style-name="P16"/>
      <text:p text:style-name="P16">¿CÓMO ASEGURAR PROTOCOLO DE ESCRITORIO REMOTO (RDP) ? 4 TÉCNICAS FÁCILES</text:p>
      <text:p text:style-name="P16"><text:a xlink:type="simple" xlink:href="https://noticiasseguridad.com/seguridad-informatica/como-asegurar-protocolo-de-escritorio-remoto-rdp-4-tecnicas-faciles/" text:style-name="Internet_20_link" text:visited-style-name="Visited_20_Internet_20_Link">https://noticiasseguridad.com/seguridad-informatica/como-asegurar-protocolo-de-escritorio-remoto-rdp-4-tecnicas-faciles/</text:a></text:p>
      <text:p text:style-name="P16"/>
      <text:p text:style-name="P16"/>
      <text:p text:style-name="P16">Protege tu PC: impide que nadie pueda conectar un USB sin tu permiso</text:p>
      <text:p text:style-name="P16"><text:a xlink:type="simple" xlink:href="https://hardzone.es/noticias/perifericos/protege-pc-conectar-usb/" text:style-name="Internet_20_link" text:visited-style-name="Visited_20_Internet_20_Link">https://hardzone.es/noticias/perifericos/protege-pc-conectar-usb/</text:a></text:p>
      <text:p text:style-name="P16"/>
      <text:p text:style-name="P17">Protector puerto USB , tapon, plastico con llave de poner <text:s/>y sacar.</text:p>
      <text:p text:style-name="P17"/>
      <text:p text:style-name="P17">SSO: Qué es y qué beneficios tiene para la ciberseguridad</text:p>
      <text:p text:style-name="P17"><text:a xlink:type="simple" xlink:href="https://www.watchguard.com/es/wgrd-news/blog" text:style-name="Internet_20_link" text:visited-style-name="Visited_20_Internet_20_Link">https://www.watchguard.com/es/wgrd-news/blog</text:a></text:p>
      <text:p text:style-name="P17"/>
      <text:p text:style-name="P17">The all-in-one Red Team browser extension for Web Pentesters</text:p>
      <text:p text:style-name="P18"><text:a xlink:type="simple" xlink:href="https://github.com/LasCC/HackTools" text:style-name="Internet_20_link" text:visited-style-name="Visited_20_Internet_20_Link">https://github.com/LasCC/HackTools</text:a></text:p>
      <text:p text:style-name="P18"/>
      <text:p text:style-name="P18">Cómo banear miles de direcciones IP's con ipset</text:p>
      <text:p text:style-name="P18"><text:a xlink:type="simple" xlink:href="https://blog.elhacker.net/2024/02/como-proteger-tu-servidor-linux-lista-paises-miles-direcciones-ip-iptables-ipset.html" text:style-name="Internet_20_link" text:visited-style-name="Visited_20_Internet_20_Link">https://blog.elhacker.net/2024/02/como-proteger-tu-servidor-linux-lista-paises-miles-direcciones-ip-iptables-ipset.html</text:a></text:p>
      <text:p text:style-name="P18"/>
      <text:p text:style-name="P19">phish check</text:p>
      <text:p text:style-name="P19"><text:a xlink:type="simple" xlink:href="https://derechodelared.com/phishcheck-comprobar-phishing/" text:style-name="Internet_20_link" text:visited-style-name="Visited_20_Internet_20_Link">https://derechodelared.com/phishcheck-comprobar-phishing/</text:a></text:p>
      <text:p text:style-name="P19"/>
      <text:p text:style-name="P35">Cómo funciona el ransomware remoto</text:p>
      <text:p text:style-name="P35"><text:a xlink:type="simple" xlink:href="https://www.muycomputerpro.com/2024/02/05/como-funciona-el-ransomware-remoto" text:style-name="Internet_20_link" text:visited-style-name="Visited_20_Internet_20_Link">https://www.muycomputerpro.com/2024/02/05/como-funciona-el-ransomware-remoto</text:a></text:p>
      <text:p text:style-name="P34"><text:a xlink:type="simple" xlink:href="https://www.incibe.es/incibe-cert/blog/familias-ransomware-acciones-de-respuesta-y-recuperacion" text:style-name="Internet_20_link" text:visited-style-name="Visited_20_Internet_20_Link">https://www.incibe.es/incibe-cert/blog/familias-ransomware-acciones-de-respuesta-y-recuperacion</text:a></text:p>
      <text:p text:style-name="P34"/>
      <text:p text:style-name="P34">Nuevo recuperador de archivos para el ransomware Black Basta</text:p>
      <text:p text:style-name="P34"><text:a xlink:type="simple" xlink:href="https://unaaldia.hispasec.com/2024/01/recuperador-de-archivos-para-el-ransomware-black-basta.html" text:style-name="Internet_20_link" text:visited-style-name="Visited_20_Internet_20_Link">https://unaaldia.hispasec.com/2024/01/recuperador-de-archivos-para-el-ransomware-black-basta.html</text:a></text:p>
      <text:p text:style-name="P19"/>
      <text:p text:style-name="P20">Top 8 Types of Cyber Attacks</text:p>
      <text:p text:style-name="P20"><text:a xlink:type="simple" xlink:href="https://www.checkpoint.com/cyber-hub/cyber-security/what-is-cyber-attack/types-of-cyber-attacks/" text:style-name="Internet_20_link" text:visited-style-name="Visited_20_Internet_20_Link">https://www.checkpoint.com/cyber-hub/cyber-security/what-is-cyber-attack/types-of-cyber-attacks/</text:a></text:p>
      <text:p text:style-name="P20"><text:a xlink:type="simple" xlink:href="https://www.fortinet.com/resources/cyberglossary/types-of-cyber-attacks" text:style-name="Internet_20_link" text:visited-style-name="Visited_20_Internet_20_Link">https://www.fortinet.com/resources/cyberglossary/types-of-cyber-attacks</text:a></text:p>
      <text:p text:style-name="P20"><text:a xlink:type="simple" xlink:href="https://www.instagram.com/reel/C5l0H9qyS9D/?igsh=MXh3dHZxcWo3cHc1cw%3D%3D" text:style-name="Internet_20_link" text:visited-style-name="Visited_20_Internet_20_Link">https://www.instagram.com/reel/C5l0H9qyS9D/?igsh=MXh3dHZxcWo3cHc1cw%3D%3D</text:a></text:p>
      <text:p text:style-name="P20"/>
      <text:p text:style-name="P21">Implementacion de fail2ban</text:p>
      <text:p text:style-name="P21"><text:a xlink:type="simple" xlink:href="https://www.instagram.com/reel/C_c0ylbgse-/?igsh=aXJmaHZoaHRnd2Ux" text:style-name="Internet_20_link" text:visited-style-name="Visited_20_Internet_20_Link">https://www.instagram.com/reel/C_c0ylbgse-/?igsh=aXJmaHZoaHRnd2Ux</text:a></text:p>
      <text:p text:style-name="P21"/>
      <text:p text:style-name="P50">Configurar <text:s/>IDS <text:s text:c="2"/>snort</text:p>
      <text:p text:style-name="P50"><text:a xlink:type="simple" xlink:href="https://www.instagram.com/reel/C_X2WuAgVfR/?igsh=MTBpaWoxb2NtOTA5OA%3D%3D" text:style-name="Internet_20_link" text:visited-style-name="Visited_20_Internet_20_Link">https://www.instagram.com/reel/C_X2WuAgVfR/?igsh=MTBpaWoxb2NtOTA5OA%3D%3D</text:a></text:p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', Helvetic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color="#000000" loext:opacity="100%" style:text-line-through-style="none" style:text-line-through-type="none" style:font-name="Arial1" fo:font-family="Arial" style:font-family-generic="swiss" style:font-pitch="variable" fo:font-size="12pt" style:text-underline-style="none" fo:font-weight="normal" officeooo:rsid="004960d7" style:font-size-asian="12pt" style:font-weight-asian="normal" style:font-size-complex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Pa12" style:family="paragraph" style:parent-style-name="Default" style:default-outline-level="">
      <style:paragraph-properties style:line-height-at-least="0.355cm"/>
    </style:style>
    <style:style style:name="Pa6" style:family="paragraph" style:parent-style-name="Default" style:default-outline-level="">
      <style:paragraph-properties style:line-height-at-least="0.355cm"/>
    </style:style>
    <style:style style:name="Pa20" style:family="paragraph" style:parent-style-name="Default" style:default-outline-level="">
      <style:paragraph-properties style:line-height-at-least="0.355cm"/>
    </style:style>
    <style:style style:name="Pa18" style:family="paragraph" style:parent-style-name="Default" style:default-outline-level="">
      <style:paragraph-properties style:line-height-at-least="0.355cm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Arial1" fo:font-family="Arial" style:font-family-generic="swiss" style:font-pitch="variable"/>
    </style:style>
    <style:style style:name="WW_5f_CharLFO1LVL3" style:display-name="WW_CharLFO1LVL3" style:family="text">
      <style:text-properties style:font-name="Arial1" fo:font-family="Arial" style:font-family-generic="swiss" style:font-pitch="variable"/>
    </style:style>
    <style:style style:name="WW_5f_CharLFO1LVL4" style:display-name="WW_CharLFO1LVL4" style:family="text">
      <style:text-properties style:font-name="Arial1" fo:font-family="Arial" style:font-family-generic="swiss" style:font-pitch="variable"/>
    </style:style>
    <style:style style:name="WW_5f_CharLFO1LVL5" style:display-name="WW_CharLFO1LVL5" style:family="text">
      <style:text-properties style:font-name="Arial1" fo:font-family="Arial" style:font-family-generic="swiss" style:font-pitch="variable"/>
    </style:style>
    <style:style style:name="WW_5f_CharLFO1LVL6" style:display-name="WW_CharLFO1LVL6" style:family="text">
      <style:text-properties style:font-name="Arial1" fo:font-family="Arial" style:font-family-generic="swiss" style:font-pitch="variable"/>
    </style:style>
    <style:style style:name="WW_5f_CharLFO1LVL7" style:display-name="WW_CharLFO1LVL7" style:family="text">
      <style:text-properties style:font-name="Arial1" fo:font-family="Arial" style:font-family-generic="swiss" style:font-pitch="variable"/>
    </style:style>
    <style:style style:name="WW_5f_CharLFO1LVL8" style:display-name="WW_CharLFO1LVL8" style:family="text">
      <style:text-properties style:font-name="Arial1" fo:font-family="Arial" style:font-family-generic="swiss" style:font-pitch="variable"/>
    </style:style>
    <style:style style:name="WW_5f_CharLFO1LVL9" style:display-name="WW_CharLFO1LVL9" style:family="text">
      <style:text-properties style:font-name="Arial1" fo:font-family="Arial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1T13:01:59.485000000</dc:date>
    <meta:editing-duration>PT2H1M47S</meta:editing-duration>
    <meta:editing-cycles>53</meta:editing-cycles>
    <meta:generator>LibreOffice/24.2.4.2$Windows_X86_64 LibreOffice_project/51a6219feb6075d9a4c46691dcfe0cd9c4fff3c2</meta:generator>
    <meta:document-statistic meta:table-count="1" meta:image-count="0" meta:object-count="0" meta:page-count="6" meta:paragraph-count="182" meta:word-count="868" meta:character-count="11861" meta:non-whitespace-character-count="11189"/>
  </office:meta>
</office:document-meta>
</file>