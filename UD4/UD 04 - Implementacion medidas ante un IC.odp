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E000001B4A98736F05B1CE62A.png" manifest:media-type="image/png"/>
  <manifest:file-entry manifest:full-path="Pictures/1000000000000133000000CF9F10296132CE9CC2.png" manifest:media-type="image/png"/>
  <manifest:file-entry manifest:full-path="Pictures/10000000000001870000004F596702303557769F.png" manifest:media-type="image/png"/>
  <manifest:file-entry manifest:full-path="Pictures/1000000000000421000002635DC9770A05CFFD6A.png" manifest:media-type="image/png"/>
  <manifest:file-entry manifest:full-path="Pictures/10000000000004BF000001E543846700E430BB7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1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491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5cm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65cm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pr1" style:family="presentation" style:parent-style-name="SVF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035cm" fo:margin-bottom="0cm" fo:line-height="100%" fo:text-align="start" style:writing-mode="lr-tb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margin-top="0.035cm" fo:margin-bottom="0cm" fo:line-height="100%"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P5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P6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.035cm" fo:margin-right="0.014cm" fo:margin-top="0.034cm" fo:margin-bottom="0cm" fo:line-height="100%" fo:text-align="center" fo:text-indent="1.18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035cm" fo:margin-right="0.014cm" fo:margin-top="0.034cm" fo:margin-bottom="0cm" fo:line-height="100%" fo:text-align="center" fo:text-indent="1.18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.169cm" fo:margin-right="0.155cm" fo:margin-top="0.002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.169cm" fo:margin-right="0.155cm" fo:margin-top="0.034cm" fo:margin-bottom="0cm" fo:line-height="100%" fo:text-align="center" fo:text-indent="0cm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 fo:background-color="transparent"/>
    </style:style>
    <style:style style:name="P16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 fo:background-color="transparent"/>
    </style:style>
    <style:style style:name="P17" style:family="paragraph">
      <loext:graphic-properties draw:fill="none" draw:fill-color="#ffffff"/>
      <style:paragraph-properties style:writing-mode="lr-tb"/>
      <style:text-properties fo:color="#28471f" loext:opacity="100%" style:font-name="Verdana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3465a4" loext:opacity="100%"/>
    </style:style>
    <style:style style:name="T1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2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3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4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6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7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8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letter-spacing="-0.039cm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style:style style:name="T9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letter-spacing="-0.009cm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style:style style:name="T10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style:style style:name="T11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28pt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style:style style:name="T12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Calibri" style:font-size-complex="27.5pt" style:font-style-complex="normal" style:font-weight-complex="normal"/>
    </style:style>
    <style:style style:name="T13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28pt" fo:font-style="normal" style:text-underline-style="none" fo:font-weight="bold" fo:background-color="#ffff00" style:font-size-asian="28pt" style:font-style-asian="normal" style:font-weight-asian="bold" style:font-name-complex="Calibri" style:font-size-complex="28pt" style:font-style-complex="normal" style:font-weight-complex="bold"/>
    </style:style>
    <style:style style:name="T14" style:family="text">
      <style:text-properties fo:color="#28471f" loext:opacity="100%" style:font-name="Verdana" fo:font-weight="bold" style:font-weight-asian="bold" style:font-weight-complex="bold"/>
    </style:style>
    <style:style style:name="T15" style:family="text">
      <style:text-properties fo:color="#2a6099" loext:opacity="100%" style:font-name="Verdana" fo:font-weight="bold" style:font-weight-asian="bold" style:font-weight-complex="bold"/>
    </style:style>
    <style:style style:name="T16" style:family="text">
      <style:text-properties fo:font-variant="normal" fo:text-transform="none" fo:color="#2a6099" loext:opacity="100%" style:text-line-through-style="none" style:text-line-through-type="none" style:text-position="0% 100%" style:font-name="Calibri" fo:font-size="18pt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style:style style:name="T17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18pt" fo:font-style="normal" style:text-underline-style="none" fo:font-weight="bold" fo:background-color="#ffff00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18pt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fo:color="#ff5429" loext:opacity="100%" style:text-line-through-style="none" style:text-line-through-type="none" style:text-position="0% 100%" style:font-name="Calibri" fo:font-size="18pt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14pt" fo:letter-spacing="normal" fo:font-style="normal" style:text-underline-style="none" fo:font-weight="bold" fo:background-color="transparent" style:font-size-asian="14pt" style:font-style-asian="normal" style:font-weight-asian="bold" style:font-name-complex="Calibri" style:font-size-complex="14pt" style:font-style-complex="normal" style:font-weight-complex="bold"/>
    </style:style>
    <style:style style:name="T24" style:family="text">
      <style:text-properties fo:font-variant="normal" fo:text-transform="none" fo:color="#999999" loext:opacity="100%" style:text-line-through-style="none" style:text-line-through-type="none" style:text-position="0% 100%" style:font-name="Calibri" fo:font-size="18pt" fo:letter-spacing="normal" fo:font-style="normal" style:text-underline-style="none" fo:font-weight="bold" fo:background-color="transparent" style:font-size-asian="14pt" style:font-style-asian="normal" style:font-weight-asian="bold" style:font-name-complex="Calibri" style:font-size-complex="14pt" style:font-style-complex="normal" style:font-weight-complex="bold"/>
    </style:style>
    <style:style style:name="T25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18pt" fo:letter-spacing="normal" fo:font-style="normal" style:text-underline-style="none" fo:font-weight="bold" fo:background-color="transparent" style:font-size-asian="14pt" style:font-style-asian="normal" style:font-weight-asian="bold" style:font-name-complex="Calibri" style:font-size-complex="14pt" style:font-style-complex="normal" style:font-weight-complex="bold"/>
    </style:style>
    <style:style style:name="T26" style:family="text">
      <style:text-properties fo:color="#3465a4" loext:opacity="100%"/>
    </style:style>
    <style:style style:name="T27" style:family="text">
      <style:text-properties fo:color="#3465a4" loext:opacity="100%" fo:font-weight="bold" style:font-weight-asian="bold" style:font-weight-complex="bold"/>
    </style:style>
    <style:style style:name="T28" style:family="text">
      <style:text-properties fo:color="#3465a4" loext:opacity="100%" fo:font-size="20pt" style:font-size-asian="20pt" style:font-size-complex="20pt"/>
    </style:style>
    <style:style style:name="T29" style:family="text">
      <style:text-properties fo:font-variant="normal" fo:text-transform="none" fo:color="#001f5f" loext:opacity="100%" style:text-line-through-style="none" style:text-line-through-type="none" style:text-position="0% 100%" style:font-name="Calibri" fo:font-size="28pt" fo:letter-spacing="normal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c9211e" loext:opacity="100%" fo:font-size="16pt" style:font-size-asian="16pt" style:font-size-complex="16pt"/>
    </style:style>
    <style:style style:name="T33" style:family="text">
      <style:text-properties fo:color="#3465a4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001f5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1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VF" presentation:presentation-page-layout-name="AL1T11">
        <office:forms form:automatic-focus="false" form:apply-design-mode="false"/>
        <draw:custom-shape draw:name="object 15" draw:style-name="gr1" draw:text-style-name="P3" draw:layer="layout" svg:width="10.976cm" svg:height="1.73cm" svg:x="3.482cm" svg:y="0.569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" draw:text-style-name="P6" draw:layer="layout" svg:width="3.67cm" svg:height="1.73cm" svg:x="20.959cm" svg:y="0.569cm">
          <text:p text:style-name="P4"><text:span text:style-name="T1">CURS</text:span><text:span text:style-name="T6"> 21</text:span><text:span text:style-name="T7">/22</text:span></text:p>
          <text:p text:style-name="P5"><text:span text:style-name="T7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3" draw:text-style-name="P8" draw:layer="layout" svg:width="19.5cm" svg:height="5.148cm" svg:x="2.5cm" svg:y="3.328cm">
          <text:p text:style-name="P7"><text:span text:style-name="T8">UNITAT</text:span><text:span text:style-name="T9"> 04</text:span></text:p>
          <text:p text:style-name="P7"><text:span text:style-name="T10">Implementació de mesures de ciberseguretat davant d’un 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459cm" svg:height="2.039cm" svg:x="0.577cm" svg:y="0.529cm">
          <draw:image xlink:href="Pictures/100000000000020E000001B4A98736F05B1CE62A.png" xlink:type="simple" xlink:show="embed" xlink:actuate="onLoad" draw:mime-type="image/png">
            <text:p/>
          </draw:image>
        </draw:frame>
        <draw:frame draw:style-name="gr4" draw:text-style-name="P9" draw:layer="layout" svg:width="10.994cm" svg:height="7.412cm" svg:x="7.265cm" svg:y="9.16cm">
          <draw:image xlink:href="Pictures/1000000000000133000000CF9F10296132CE9CC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office:forms form:automatic-focus="false" form:apply-design-mode="false"/>
        <draw:custom-shape draw:name="object 4" draw:style-name="gr6" draw:text-style-name="P13" draw:layer="layout" svg:width="21.5cm" svg:height="8.479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</text:list-item>
            <text:list-item>
              <text:p text:style-name="P11"><text:span text:style-name="T11">Realització de seguiment de IC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1">
        <office:forms form:automatic-focus="false" form:apply-design-mode="false"/>
        <draw:custom-shape draw:name="object 6" draw:style-name="gr7" draw:text-style-name="P14" draw:layer="layout" svg:width="21.5cm" svg:height="8.479cm" svg:x="2cm" svg:y="4.744cm">
          <text:list text:style-name="L3">
            <text:list-item>
              <text:p text:style-name="P11"><text:span text:style-name="T13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</text:list-item>
            <text:list-item>
              <text:p text:style-name="P11"><text:span text:style-name="T11">Realització de seguiment de IC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1">
        <office:forms form:automatic-focus="false" form:apply-design-mode="false"/>
        <draw:custom-shape draw:name="object 23" draw:style-name="gr8" draw:text-style-name="P16" draw:layer="layout" svg:width="21.5cm" svg:height="4.775cm" svg:x="1.987cm" svg:y="3.447cm">
          <text:list text:style-name="L3">
            <text:list-item>
              <text:p text:style-name="P15"><text:span text:style-name="T11">Desenvolupar procediments d’actuació detallats per donar resposta, mitigar, eliminar o contenir els tipus d’incidents de ciberseguretat més habitua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9.805cm" svg:height="4.101cm" svg:x="2.049cm" svg:y="11.764cm">
          <draw:text-box>
            <text:list text:style-name="L5">
              <text:list-item>
                <text:p><text:span text:style-name="T14">Enginyeria social</text:span></text:p>
              </text:list-item>
              <text:list-item>
                <text:p><text:span text:style-name="T14">Fugida d’informació</text:span></text:p>
              </text:list-item>
              <text:list-item>
                <text:p><text:span text:style-name="T14">Ransomware</text:span></text:p>
              </text:list-item>
              <text:list-item>
                <text:p><text:span text:style-name="T14">Phishing i defacement de pàgines web</text:span></text:p>
              </text:list-item>
              <text:list-item>
                <text:p><text:span text:style-name="T14">Formar part d’una Botnet que realitza atacs</text:span></text:p>
              </text:list-item>
            </text:list>
          </draw:text-box>
        </draw:frame>
        <draw:frame draw:style-name="gr10" draw:text-style-name="P18" draw:layer="layout" svg:width="22.672cm" svg:height="2.384cm" svg:x="2.023cm" svg:y="8.975cm">
          <draw:text-box>
            <text:p><text:a xlink:href="https://www.muycomputer.com/2020/12/30/ciberseguridad-en-2020/" xlink:type="simple">https://www.muycomputer.com/2020/12/30/ciberseguridad-en-2020/</text:a></text:p>
            <text:p><text:a xlink:href="https://www.muycomputer.com/2021/12/29/ciberseguridad-en-2021/" xlink:type="simple">https://www.muycomputer.com/2021/12/29/ciberseguridad-en-2021/</text:a></text:p>
            <text:p/>
          </draw:text-box>
        </draw:frame>
        <draw:frame draw:style-name="gr4" draw:text-style-name="P9" draw:layer="layout" svg:width="6.896cm" svg:height="1.392cm" svg:x="9.327cm" svg:y="11.041cm">
          <draw:image xlink:href="Pictures/10000000000001870000004F59670230355776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office:forms form:automatic-focus="false" form:apply-design-mode="false"/>
        <draw:frame draw:style-name="gr11" draw:text-style-name="P17" draw:layer="layout" svg:width="21.544cm" svg:height="12.571cm" svg:x="1.893cm" svg:y="3.022cm">
          <draw:text-box>
            <text:list text:style-name="L5">
              <text:list-item>
                <text:p><text:span text:style-name="T14">Enginyeria social</text:span></text:p>
                <text:list>
                  <text:list-item>
                    <text:p><text:span text:style-name="T15"><text:a xlink:href="https://www.incibe.es/protege-tu-empresa/blog/medidas-seguridad-correo-electronico" xlink:type="simple">medidas-seguridad-correo-electronico</text:a></text:span></text:p>
                    <text:p><text:span text:style-name="T15"><text:a xlink:href="https://www.incibe.es/protege-tu-empresa/kit-concienciacion" xlink:type="simple">kit-concienciacion</text:a></text:span></text:p>
                  </text:list-item>
                </text:list>
              </text:list-item>
              <text:list-item>
                <text:p><text:span text:style-name="T14">Fugida d’informació</text:span></text:p>
                <text:list>
                  <text:list-item>
                    <text:p><text:span text:style-name="T15"><text:a xlink:href="https://www.incibe.es/protege-tu-empresa/guias/guia-fuga-informacion" xlink:type="simple">guia-fuga-informacion</text:a></text:span></text:p>
                    <text:list>
                      <text:list-item>
                        <text:p><text:span text:style-name="T14">Polítiques d’accés a la informació</text:span></text:p>
                      </text:list-item>
                      <text:list-item>
                        <text:p><text:span text:style-name="T14">Campanyes conscienciació</text:span></text:p>
                      </text:list-item>
                      <text:list-item>
                        <text:p><text:span text:style-name="T14">ILM</text:span></text:p>
                      </text:list-item>
                      <text:list-item>
                        <text:p><text:span text:style-name="T14">DLP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Ransomware</text:span></text:p>
                <text:list>
                  <text:list-item>
                    <text:p><text:span text:style-name="T15"><text:a xlink:href="https://www.incibe.es/protege-tu-empresa/blog/que-no-te-secuestren-el-ordenador-medidas-para-evitarlo" xlink:type="simple">que-no-te-secuestren-el-ordenador</text:a></text:span></text:p>
                  </text:list-item>
                  <text:list-item>
                    <text:p><text:span text:style-name="T14"/></text:p>
                  </text:list-item>
                </text:list>
              </text:list-item>
              <text:list-item>
                <text:p><text:span text:style-name="T14">Phishing i defacement de pàgines web</text:span></text:p>
                <text:list>
                  <text:list-item>
                    <text:p><text:span text:style-name="T15"><text:a xlink:href="https://www.incibe.es/protege-tu-empresa/blog/prevenir-phishing" xlink:type="simple">prevenir-phishing</text:a></text:span></text:p>
                  </text:list-item>
                </text:list>
              </text:list-item>
              <text:list-item>
                <text:p><text:span text:style-name="T14">Formar part d’una Botnet que realitza atacs</text:span></text:p>
                <text:list>
                  <text:list-item>
                    <text:p><text:span text:style-name="T15"><text:a xlink:href="https://www.incibe.es/protege-tu-empresa/blog/descubre-proteger-tu-empresa-del-malware" xlink:type="simple">proteger-tu-empresa-del-malwar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1">
        <office:forms form:automatic-focus="false" form:apply-design-mode="false"/>
        <draw:custom-shape draw:name="object 1" draw:style-name="gr12" draw:text-style-name="P14" draw:layer="layout" svg:width="21.5cm" svg:height="8.479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3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</text:list-item>
            <text:list-item>
              <text:p text:style-name="P11"><text:span text:style-name="T11">Realització de seguiment de IC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11">
        <office:forms form:automatic-focus="false" form:apply-design-mode="false"/>
        <draw:custom-shape draw:name="object 8" draw:style-name="gr13" draw:text-style-name="P14" draw:layer="layout" svg:width="22.419cm" svg:height="9.976cm" svg:x="1.578cm" svg:y="6.109cm">
          <text:list text:style-name="L3">
            <text:list-header>
              <text:p text:style-name="P11"><text:span text:style-name="T13">Preparar respostes ciber-resilients</text:span></text:p>
              <text:p text:style-name="P11"><text:span text:style-name="T16"><text:a xlink:href="https://www.incibe-cert.es/blog/anticipar-las-cuatro-metas-ciberresiliencia" xlink:type="simple">https://www.incibe-cert.es/blog/anticipar-las-cuatro-metas-ciberresiliencia</text:a></text:span></text:p>
              <text:p text:style-name="P11"><text:span text:style-name="T17"/></text:p>
            </text:list-header>
            <text:list-item>
              <text:p text:style-name="P11"><text:span text:style-name="T18">Anticipar</text:span></text:p>
            </text:list-item>
            <text:list-item>
              <text:p text:style-name="P11"><text:span text:style-name="T18">Resistir</text:span></text:p>
            </text:list-item>
            <text:list-item>
              <text:p text:style-name="P11"><text:span text:style-name="T18">Recuperar</text:span></text:p>
            </text:list-item>
            <text:list-item>
              <text:p text:style-name="P11"><text:span text:style-name="T18">Evolucionar</text:span></text:p>
              <text:p text:style-name="P11"><text:span text:style-name="T18"/></text:p>
              <text:p text:style-name="P11"><text:span text:style-name="T18">Model IMC <text:s/></text:span><text:span text:style-name="T19"><text:a xlink:href="https://www.incibe-cert.es/guias-y-estudios/guias/imc-indicadores-mejora-ciberresiliencia" xlink:type="simple">imc-indicadores-mejora-ciberresiliencia</text:a></text:span><text:span text:style-name="T18"><text:s text:c="2"/>-&gt; tres documents</text:span></text:p>
              <text:list>
                <text:list-item>
                  <text:p text:style-name="P11"><text:span text:style-name="T18">Metodologia Avaluació</text:span></text:p>
                </text:list-item>
                <text:list-item>
                  <text:p text:style-name="P11"><text:span text:style-name="T18">Diccionari Indicadors</text:span></text:p>
                </text:list-item>
                <text:list-item>
                  <text:p text:style-name="P11"><text:span text:style-name="T18">Formulari Ciberresiliènci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1" draw:layer="layout" svg:width="23.423cm" svg:height="1.608cm" svg:x="1.373cm" svg:y="3.569cm">
          <draw:text-box>
            <text:p text:style-name="P20"><text:span text:style-name="T20">Ciberresiliència</text:span><text:span text:style-name="T21">: Capacitat de les organitzacions o sistemes de recuperar-se ràpidament d'atacs deliberats o incidents que impliquen l'ús de les tecnologies de la informació i la comunicació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11">
        <office:forms form:automatic-focus="false" form:apply-design-mode="false"/>
        <draw:frame draw:style-name="gr4" draw:text-style-name="P9" draw:layer="layout" svg:width="20.319cm" svg:height="11.744cm" svg:x="2.545cm" svg:y="3.638cm">
          <draw:image xlink:href="Pictures/1000000000000421000002635DC9770A05CFFD6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11">
        <office:forms form:automatic-focus="false" form:apply-design-mode="false"/>
        <draw:frame draw:style-name="gr4" draw:text-style-name="P9" draw:layer="layout" svg:width="23.103cm" svg:height="9.221cm" svg:x="1.091cm" svg:y="5.941cm">
          <draw:image xlink:href="Pictures/10000000000004BF000001E543846700E430BB79.png" xlink:type="simple" xlink:show="embed" xlink:actuate="onLoad" draw:mime-type="image/png">
            <text:p/>
          </draw:image>
        </draw:frame>
        <draw:frame draw:style-name="gr15" draw:text-style-name="P18" draw:layer="layout" svg:width="19.597cm" svg:height="1.673cm" svg:x="2.561cm" svg:y="3.889cm">
          <draw:text-box>
            <text:p text:style-name="P20"><text:span text:style-name="T22">Ciberresiliència</text:span></text:p>
            <text:p>INCIBE adopta dels estàndards els següents nivells de maduresa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11">
        <office:forms form:automatic-focus="false" form:apply-design-mode="false"/>
        <draw:custom-shape draw:name="object 2" draw:style-name="gr16" draw:text-style-name="P14" draw:layer="layout" svg:width="21.5cm" svg:height="8.479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3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</text:list-item>
            <text:list-item>
              <text:p text:style-name="P11"><text:span text:style-name="T11">Realització de seguiment de IC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11">
        <office:forms form:automatic-focus="false" form:apply-design-mode="false"/>
        <draw:custom-shape draw:name="object 9" draw:style-name="gr17" draw:text-style-name="P14" draw:layer="layout" svg:width="21.5cm" svg:height="10.458cm" svg:x="1.974cm" svg:y="3.434cm">
          <text:list text:style-name="L3">
            <text:list-header>
              <text:p text:style-name="P11"><text:span text:style-name="T13">Establir fluxe de presa de decisions</text:span></text:p>
            </text:list-header>
          </text:list>
          <text:p text:style-name="P11"><text:span text:style-name="T23">L'estratègia de contenció varia segons la mena d'incident i els criteris han d'estar ben documentats per a facilitar la ràpida i eficaç presa de decisions. Alguns criteris que poden ser presos com a base són:</text:span></text:p>
          <text:p text:style-name="P11"><text:span text:style-name="T23"/></text:p>
          <text:list text:continue-numbering="true" text:style-name="L3">
            <text:list-item>
              <text:p text:style-name="P11"><text:span text:style-name="T23">Criteris Forenses.</text:span></text:p>
            </text:list-item>
            <text:list-item>
              <text:p text:style-name="P11"><text:span text:style-name="T23">Mal potencial i furt d'actius.</text:span></text:p>
            </text:list-item>
            <text:list-item>
              <text:p text:style-name="P11"><text:span text:style-name="T23">Necessitats per a la preservació d'evidència.</text:span></text:p>
            </text:list-item>
            <text:list-item>
              <text:p text:style-name="P11"><text:span text:style-name="T23">Disponibilitat del servei.</text:span></text:p>
            </text:list-item>
            <text:list-item>
              <text:p text:style-name="P11"><text:span text:style-name="T23">Temps i recursos per a implementar l'estratègia.</text:span></text:p>
            </text:list-item>
            <text:list-item>
              <text:p text:style-name="P11"><text:span text:style-name="T23">Efectivitat de l'estratègia per a contindre l'incident (parcial o total).</text:span></text:p>
            </text:list-item>
            <text:list-item>
              <text:p text:style-name="P11"><text:span text:style-name="T23">Duració de la solució.</text:span></text:p>
            </text:list-item>
          </text:list>
          <text:p text:style-name="P11"><text:span text:style-name="T23"/></text:p>
          <text:p text:style-name="P11"><text:span text:style-name="T24"><text:a xlink:href="https://www.incibe.es/protege-tu-empresa/blog/plan-de-crisis" xlink:type="simple">https://www.incibe.es/protege-tu-empresa/blog/plan-de-crisis</text:a></text:span></text:p>
          <text:p text:style-name="P11"><text:span text:style-name="T25"/></text:p>
          <text:p text:style-name="P11"><text:span text:style-name="T24"><text:a xlink:href="https://www.incibe.es/sites/default/files/contenidos/dosieres/metad_plan_de_contingencia_y_continuidad_de_negocio.pdf" xlink:type="simple">plan_de_contingencia_y_continuidad_de_negocio.pdf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11">
        <office:forms form:automatic-focus="false" form:apply-design-mode="false"/>
        <draw:custom-shape draw:name="object 3" draw:style-name="gr18" draw:text-style-name="P14" draw:layer="layout" svg:width="21.5cm" svg:height="8.479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3">Tasques de restabliment de serveis afectats</text:span></text:p>
            </text:list-item>
            <text:list-item>
              <text:p text:style-name="P11"><text:span text:style-name="T11">Documentació d’accions realitzades</text:span></text:p>
            </text:list-item>
            <text:list-item>
              <text:p text:style-name="P11"><text:span text:style-name="T11">Realització de seguiment de IC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11">
        <office:forms form:automatic-focus="false" form:apply-design-mode="false"/>
        <draw:custom-shape draw:name="object 10" draw:style-name="gr19" draw:text-style-name="P14" draw:layer="layout" svg:width="21.5cm" svg:height="1.22cm" svg:x="2cm" svg:y="4.744cm">
          <text:list text:style-name="L3">
            <text:list-header>
              <text:p text:style-name="P11"><text:span text:style-name="T11">Tasques de restabliment de serveis afecta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22.36cm" svg:height="8.783cm" svg:x="1.608cm" svg:y="6.541cm">
          <draw:text-box>
            <text:p><text:span text:style-name="T26">La finalitat de la fase de recuperació consisteix a retornar el nivell d'operació al seu estat normal i que les àrees de negoci afectades puguen reprendre la seua activitat. És important </text:span><text:span text:style-name="T27">no precipitar-se</text:span><text:span text:style-name="T26"> en la posada en producció de sistemes que s'han vist implicats en ciberincidents.</text:span></text:p>
            <text:p><text:span text:style-name="T26"/></text:p>
            <text:p><text:span text:style-name="T26">Convé prestar especial atenció a aquests sistemes durant la posada en producció i buscar qualsevol signe d'activitat sospitosa, </text:span><text:span text:style-name="T27">definint un període de temps</text:span><text:span text:style-name="T26"> amb mesures addicionals de monitoratge.</text:span>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11">
        <office:forms form:automatic-focus="false" form:apply-design-mode="false"/>
        <draw:custom-shape draw:name="object 19" draw:style-name="gr21" draw:text-style-name="P14" draw:layer="layout" svg:width="21.5cm" svg:height="1.22cm" svg:x="2cm" svg:y="4.744cm">
          <text:list text:style-name="L3">
            <text:list-header>
              <text:p text:style-name="P11"><text:span text:style-name="T11">Tasques de restabliment de serveis afecta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8" draw:layer="layout" svg:width="22.36cm" svg:height="7.741cm" svg:x="1.654cm" svg:y="6.634cm">
          <draw:text-box>
            <text:p/>
            <text:p><text:a xlink:href="https://www.incibe.es/protege-tu-empresa/blog/tienes-tu-plan-recuperacion-desastres" xlink:type="simple">tienes-plan-recuperacion-desastres?</text:a></text:p>
            <text:p/>
            <text:list text:style-name="L5">
              <text:list-item>
                <text:p><text:span text:style-name="T28">Desenvolupar les mesures per a recuperació</text:span></text:p>
              </text:list-item>
              <text:list-item>
                <text:p><text:span text:style-name="T28">Realitzar proves</text:span></text:p>
              </text:list-item>
              <text:list-item>
                <text:p><text:span text:style-name="T28">Actualitzar i millorar el pla</text:span></text:p>
              </text:list-item>
              <text:list-item>
                <text:p><text:span text:style-name="T28">Capacitar als encarregats de posar-lo en marxa,</text:span></text:p>
              </text:list-item>
              <text:list-item>
                <text:p><text:span text:style-name="T28">Conscienciar i difondre el pla</text:span>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11">
        <office:forms form:automatic-focus="false" form:apply-design-mode="false"/>
        <draw:custom-shape draw:name="object 11" draw:style-name="gr23" draw:text-style-name="P14" draw:layer="layout" svg:width="21.5cm" svg:height="8.479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3">Documentació d’accions realitzades</text:span></text:p>
            </text:list-item>
            <text:list-item>
              <text:p text:style-name="P11"><text:span text:style-name="T11">Realització de seguiment de IC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11">
        <office:forms form:automatic-focus="false" form:apply-design-mode="false"/>
        <draw:custom-shape draw:name="object 12" draw:style-name="gr24" draw:text-style-name="P14" draw:layer="layout" svg:width="21.5cm" svg:height="2.439cm" svg:x="2cm" svg:y="4.744cm">
          <text:list text:style-name="L3">
            <text:list-item>
              <text:p text:style-name="P11"><text:span text:style-name="T11">Documentació d’accions realitzades</text:span></text:p>
              <text:p text:style-name="P11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22.425cm" svg:height="8.783cm" svg:x="1.193cm" svg:y="7.055cm">
          <draw:text-box>
            <text:p>Conviene pararse a reflexionar sobre lo sucedido, analizando las causas del problema, cómo se ha desarrollado la actividad durante la gestión del ciberincidente y todos los problemas asociados a la misma. La finalidad de este proceso es aprender de lo sucedido y que se puedan tomar las medidas adecuadas para evitar que una situación similar se pueda volver a repetir, además de mejorar los procedimientos.</text:p>
            <text:p/>
            <text:p>Por último se realizará un informe del ciberincidente que deberá detallar la causa del ciberincidente y coste (especialmente, en términos de compromiso de información o de impacto en los servicios prestados), así como las medidas que la organización debe tomar para prevenir futuros ciberincidentes de naturaleza similar.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1T11">
        <office:forms form:automatic-focus="false" form:apply-design-mode="false"/>
        <draw:custom-shape draw:name="object 20" draw:style-name="gr25" draw:text-style-name="P14" draw:layer="layout" svg:width="21.5cm" svg:height="1.22cm" svg:x="2.326cm" svg:y="3.488cm">
          <text:list text:style-name="L3">
            <text:list-item>
              <text:p text:style-name="P11"><text:span text:style-name="T11">Documentació d’accions realitza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22.425cm" svg:height="10.955cm" svg:x="1.147cm" svg:y="5.357cm">
          <draw:text-box>
            <text:p text:style-name="P20"><text:a xlink:href="https://www.incibe.es/protege-tu-empresa/blog/respuesta-incidentes-he-restaurado-los-sistemas-y-ahora" xlink:type="simple">respuesta-incidentes-he-restaurado-los-sistemas-y-ahora</text:a></text:p>
            <text:p/>
            <text:p>Documentar tot el succeït ens servirà per a comprendre l'incident i avaluar les accions preses. Amb això podem aprendre dels nostres errors i reforçar les bones pràctiques per si torna a ocórrer i per a intentar evitar-ho en el futur. En la documentació haurà de constar:</text:p>
            <text:p/>
            <text:p><text:span text:style-name="T22">Descripció de l'incident</text:span>. </text:p>
            <text:list text:style-name="L5">
              <text:list-item>
                <text:p><text:span text:style-name="T30">Quina data i hora es va identificar l'incident. </text:span></text:p>
              </text:list-item>
              <text:list-item>
                <text:p><text:span text:style-name="T30">Tipologia de l'incident: ransomware, fugida d'informació, denegació de servei, etc.</text:span></text:p>
              </text:list-item>
              <text:list-item>
                <text:p><text:span text:style-name="T30">Recursos afectats, amb quina gravetat i com va afectar l'empresa. <text:s/></text:span></text:p>
              </text:list-item>
              <text:list-item>
                <text:p><text:span text:style-name="T30">Registra si va ser necessari detindre serveis, avisar a clients o proveïdors, etc.</text:span></text:p>
              </text:list-item>
              <text:list-item>
                <text:p><text:span text:style-name="T30">Quines accions es van prendre per a solucionar-ho, quan es van dur a terme i per què es va fer així.</text:span></text:p>
              </text:list-item>
              <text:list-item>
                <text:p><text:span text:style-name="T30">Evidències recollides durant tot el procés, per exemple correus rebuts, o fitxers o unitats de disc xifrats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1T11">
        <office:forms form:automatic-focus="false" form:apply-design-mode="false"/>
        <draw:custom-shape draw:name="object 18" draw:style-name="gr27" draw:text-style-name="P14" draw:layer="layout" svg:width="21.5cm" svg:height="1.22cm" svg:x="2.326cm" svg:y="3.488cm">
          <text:list text:style-name="L3">
            <text:list-item>
              <text:p text:style-name="P11"><text:span text:style-name="T11">Documentació d’accions realitza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8" draw:layer="layout" svg:width="22.425cm" svg:height="4.64cm" svg:x="1.147cm" svg:y="5.357cm">
          <draw:text-box>
            <text:p text:style-name="P22"><text:span text:style-name="T20"/></text:p>
            <text:p><text:span text:style-name="T20">Possible origen</text:span><text:span text:style-name="T30">. Indicar quin ha pogut ser l'origen de l'incident sobre la base de tots els passos dels dos articles anteriors. També es registrarà si ja ha sigut resolt.</text:span></text:p>
            <text:p><text:span text:style-name="T20">Personal involucrat</text:span><text:span text:style-name="T30">. Totes les persones que han participat d'una manera o un altre en la resolució de l'incident han d'estar identificades convenientment.</text:span></text:p>
            <text:p><text:span text:style-name="T20">Data i hora de resolució de l'incident</text:span><text:span text:style-name="T30">. S'ha de portar un registre seqüencial d'actuacions.</text:span></text:p>
          </draw:text-box>
        </draw:frame>
        <draw:frame draw:style-name="gr29" draw:text-style-name="P18" draw:layer="layout" svg:width="20.957cm" svg:height="5.267cm" svg:x="1.489cm" svg:y="11.304cm">
          <draw:text-box>
            <text:p><text:span text:style-name="T31">Valorar els danys i costos de l'incident</text:span></text:p>
            <text:p><text:span text:style-name="T30"/></text:p>
            <text:list text:style-name="L5">
              <text:list-item>
                <text:p><text:span text:style-name="T30">Reposició d'equips o el seu programari</text:span></text:p>
              </text:list-item>
              <text:list-item>
                <text:p><text:span text:style-name="T30">Els danys reputacionals deguts, per exemple, a la divulgació d'informació confidencial</text:span></text:p>
              </text:list-item>
              <text:list-item>
                <text:p><text:span text:style-name="T30">Legals</text:span></text:p>
              </text:list-item>
              <text:list-item>
                <text:p><text:span text:style-name="T30">Els associats a la recuperació de l'activitat normal i anàlisi de l'incident</text:span></text:p>
              </text:list-item>
              <text:list-item>
                <text:p><text:span text:style-name="T30">Els deguts al temps d'inactivitat o lucre cessant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1T11">
        <office:forms form:automatic-focus="false" form:apply-design-mode="false"/>
        <draw:custom-shape draw:name="object 22" draw:style-name="gr30" draw:text-style-name="P14" draw:layer="layout" svg:width="21.5cm" svg:height="1.22cm" svg:x="2.326cm" svg:y="3.488cm">
          <text:list text:style-name="L3">
            <text:list-item>
              <text:p text:style-name="P11"><text:span text:style-name="T11">Documentació d’accions realitza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3" draw:layer="layout" svg:width="23.276cm" svg:height="10.715cm" svg:x="1.147cm" svg:y="5.357cm">
          <draw:text-box>
            <text:p text:style-name="P22"><text:span text:style-name="T32">Revisar les polítiques de l'empresa: lliçons apreses</text:span></text:p>
            <text:p text:style-name="P22"><text:span text:style-name="T33"/></text:p>
            <text:list text:style-name="L5">
              <text:list-item>
                <text:p><text:span text:style-name="T33">Què ha fallat perquè es produïra l'incident?</text:span></text:p>
              </text:list-item>
              <text:list-item>
                <text:p><text:span text:style-name="T33">Quina política de seguretat no ha funcionat?</text:span></text:p>
              </text:list-item>
              <text:list-item>
                <text:p><text:span text:style-name="T33">Què cal millorar perquè no torne a succeir? </text:span></text:p>
              </text:list-item>
              <text:list-item>
                <text:p><text:span text:style-name="T33">He informat els empleats del que ha ocorregut? </text:span></text:p>
              </text:list-item>
              <text:list-item>
                <text:p><text:span text:style-name="T33">És necessari formar als empleats perquè sàpien com actuar en aquests casos?</text:span></text:p>
              </text:list-item>
              <text:list-item>
                <text:p><text:span text:style-name="T33">La gestió de l'incident va ser correcta?</text:span></text:p>
              </text:list-item>
              <text:list-item>
                <text:p><text:span text:style-name="T33">Quins passos es poden millorar per a fer la gestió de l'incident més fluida?</text:span></text:p>
              </text:list-item>
              <text:list-item>
                <text:p><text:span text:style-name="T33">En cas d'haver de fer l'incident públic, la comunicació amb els mitjans va ser correcta i fluida?</text:span></text:p>
              </text:list-item>
              <text:list-item>
                <text:p><text:span text:style-name="T33">Es va realitzar un exercici de transparència amb l'opinió pública o per contra les comunicacions van ser opaques?</text:span></text:p>
              </text:list-item>
              <text:list-item>
                <text:p><text:span text:style-name="T33">Si l'incident va afectar informació privada de clients o proveïdors, es va realitzar la comunicació dins del termini i en la forma escaient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1T11">
        <office:forms form:automatic-focus="false" form:apply-design-mode="false"/>
        <draw:custom-shape draw:name="object 13" draw:style-name="gr32" draw:text-style-name="P14" draw:layer="layout" svg:width="21.5cm" svg:height="8.479cm" svg:x="2cm" svg:y="4.744cm">
          <text:list text:style-name="L3">
            <text:list-item>
              <text:p text:style-name="P11"><text:span text:style-name="T11">Desenvolupar procediments</text:span></text:p>
            </text:list-item>
            <text:list-item>
              <text:p text:style-name="P11"><text:span text:style-name="T11">Preparar respostes ciber-resilients</text:span></text:p>
            </text:list-item>
            <text:list-item>
              <text:p text:style-name="P11"><text:span text:style-name="T11">Establir fluxe de presa de decisions</text:span></text:p>
            </text:list-item>
            <text:list-item>
              <text:p text:style-name="P11"><text:span text:style-name="T11">Tasques de restabliment de serveis afectats</text:span></text:p>
            </text:list-item>
            <text:list-item>
              <text:p text:style-name="P11"><text:span text:style-name="T11">Documentació d’accions realitzades</text:span></text:p>
            </text:list-item>
            <text:list-item>
              <text:p text:style-name="P11"><text:span text:style-name="T13">Realització de seguiment de IC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1T11">
        <office:forms form:automatic-focus="false" form:apply-design-mode="false"/>
        <draw:custom-shape draw:name="object 14" draw:style-name="gr33" draw:text-style-name="P14" draw:layer="layout" svg:width="21.5cm" svg:height="1.22cm" svg:x="1.744cm" svg:y="3.697cm">
          <text:list text:style-name="L3">
            <text:list-header>
              <text:p text:style-name="P11"><text:span text:style-name="T11">Realització de seguiment de IC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22.126cm" svg:height="2.384cm" svg:x="1.479cm" svg:y="8.845cm">
          <draw:text-box>
            <text:p>Conviene prestar especial atención a estos sistemas durante la puesta en producción y buscar cualquier signo de actividad sospechosa, definiendo un periodo de tiempo con medidas adicionales de monitorización.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style:rfc-language-tag="ca-ES-valencia" fo:language="ca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style:rfc-language-tag="ca-ES-valencia" fo:language="ca" fo:country="ES" style:font-size-asian="12pt" style:language-asian="zh" style:country-asian="CN" style:font-size-complex="12pt" style:language-complex="hi" style:country-complex="IN"/>
    </style:style>
    <style:style style:name="Símbolos_20_de_20_numeración" style:display-name="Símbolos de numeración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ido_20_de_20_la_20_tabla" style:display-name="Contenido de la tabla" style:family="graphic">
      <style:paragraph-properties style:text-autospace="none"/>
    </style:style>
    <style:style style:name="Pa18" style:family="graphic">
      <style:paragraph-properties style:line-height-at-least="0.626cm" fo:text-align="start" style:text-autospace="none"/>
      <style:text-properties fo:color="#000000" loext:opacity="100%"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Arial1" fo:font-family="Arial" style:font-family-generic="roman" style:font-pitch="variable" fo:font-size="12pt" style:rfc-language-tag="ca-ES-valencia" fo:language="ca" fo:country="ES" style:font-name-asian="Arial1" style:font-family-asian="Arial" style:font-family-generic-asian="roman" style:font-pitch-asian="variable" style:font-size-asian="12pt" style:language-asian="zh" style:country-asian="CN" style:font-name-complex="Arial1" style:font-family-complex="Arial" style:font-family-generic-complex="roman" style:font-pitch-complex="variable" style:font-size-complex="12pt" style:language-complex="hi" style:country-complex="IN"/>
    </style:style>
    <style:style style:name="Pa20" style:family="graphic">
      <style:paragraph-properties style:line-height-at-least="0.626cm" fo:text-align="start" style:text-autospace="none"/>
      <style:text-properties fo:color="#000000" loext:opacity="100%"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Pa6" style:family="graphic">
      <style:paragraph-properties style:line-height-at-least="0.626cm" fo:text-align="start" style:text-autospace="none"/>
      <style:text-properties fo:color="#000000" loext:opacity="100%"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Pa12" style:family="graphic">
      <style:paragraph-properties style:line-height-at-least="0.626cm" fo:text-align="start" style:text-autospace="none"/>
      <style:text-properties fo:color="#000000" loext:opacity="100%"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Cuerpo_20_de_20_texto" style:display-name="Cuerpo de texto" style:family="graphic">
      <style:paragraph-properties fo:margin-top="0cm" fo:margin-bottom="0.436cm" fo:line-height="120%" style:text-autospace="none"/>
      <style:text-properties fo:color="#000000" loext:opacity="100%" style:text-line-through-style="none" style:text-line-through-type="none" style:font-name="Arial" fo:font-family="Arial" style:font-family-generic="swiss" style:font-pitch="variable" fo:font-size="12pt" style:text-underline-style="none" fo:font-weight="normal" style:font-name-complex="Arial" style:font-family-complex="Arial" style:font-family-generic-complex="swiss" style:font-pitch-complex="variable" style:font-size-complex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VF-background" style:family="presentation">
      <style:graphic-properties draw:stroke="none" draw:fill="none"/>
      <style:text-properties style:letter-kerning="true"/>
    </style:style>
    <style:style style:name="S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VF-outline1" style:family="presentation">
      <style:graphic-properties draw:stroke="none" draw:fill="none" draw:auto-grow-height="false" draw:fit-to-size="false" style:shrink-to-fit="true">
        <text:list-style style:name="S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outline2" style:family="presentation" style:parent-style-name="SVF-outline1">
      <style:paragraph-properties fo:margin-top="0.4cm" fo:margin-bottom="0cm"/>
      <style:text-properties fo:font-size="28pt" style:font-size-asian="28pt" style:font-size-complex="28pt"/>
    </style:style>
    <style:style style:name="SVF-outline3" style:family="presentation" style:parent-style-name="SVF-outline2">
      <style:paragraph-properties fo:margin-top="0.3cm" fo:margin-bottom="0cm"/>
      <style:text-properties fo:font-size="24pt" style:font-size-asian="24pt" style:font-size-complex="24pt"/>
    </style:style>
    <style:style style:name="SVF-outline4" style:family="presentation" style:parent-style-name="SVF-outline3">
      <style:paragraph-properties fo:margin-top="0.2cm" fo:margin-bottom="0cm"/>
      <style:text-properties fo:font-size="20pt" style:font-size-asian="20pt" style:font-size-complex="20pt"/>
    </style:style>
    <style:style style:name="SVF-outline5" style:family="presentation" style:parent-style-name="SVF-outline4">
      <style:paragraph-properties fo:margin-top="0.1cm" fo:margin-bottom="0cm"/>
      <style:text-properties fo:font-size="20pt" style:font-size-asian="20pt" style:font-size-complex="20pt"/>
    </style:style>
    <style:style style:name="SVF-outline6" style:family="presentation" style:parent-style-name="SVF-outline5">
      <style:paragraph-properties fo:margin-top="0.1cm" fo:margin-bottom="0cm"/>
      <style:text-properties fo:font-size="20pt" style:font-size-asian="20pt" style:font-size-complex="20pt"/>
    </style:style>
    <style:style style:name="SVF-outline7" style:family="presentation" style:parent-style-name="SVF-outline6">
      <style:paragraph-properties fo:margin-top="0.1cm" fo:margin-bottom="0cm"/>
      <style:text-properties fo:font-size="20pt" style:font-size-asian="20pt" style:font-size-complex="20pt"/>
    </style:style>
    <style:style style:name="SVF-outline8" style:family="presentation" style:parent-style-name="SVF-outline7">
      <style:paragraph-properties fo:margin-top="0.1cm" fo:margin-bottom="0cm"/>
      <style:text-properties fo:font-size="20pt" style:font-size-asian="20pt" style:font-size-complex="20pt"/>
    </style:style>
    <style:style style:name="SVF-outline9" style:family="presentation" style:parent-style-name="SVF-outline8">
      <style:paragraph-properties fo:margin-top="0.1cm" fo:margin-bottom="0cm"/>
      <style:text-properties fo:font-size="20pt" style:font-size-asian="20pt" style:font-size-complex="20pt"/>
    </style:style>
    <style:style style:name="SVF-subtitle" style:family="presentation">
      <style:graphic-properties draw:stroke="none" draw:fill="none" draw:textarea-vertical-align="middle">
        <text:list-style style:name="S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title" style:family="presentation">
      <style:graphic-properties draw:stroke="none" draw:fill="none" draw:textarea-vertical-align="middle">
        <text:list-style style:name="S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1cm" fo:text-indent="0cm"/>
      <style:text-properties style:font-name="Source Sans Pro Light" fo:font-family="'Source Sans Pro Light'" style:font-style-name="細字" style:font-family-generic="swiss" style:font-pitch="variable" fo:font-size="20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7cm" fo:text-indent="0cm"/>
      <style:text-properties fo:font-size="16.299999237060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9.1000003814697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1f1f1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M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fo:min-height="10.798cm"/>
    </style:style>
    <style:style style:name="Mgr8" style:family="graphic" style:parent-style-name="standard">
      <style:graphic-properties draw:textarea-vertical-align="middle" fo:min-height="0cm" fo:min-width="0cm"/>
    </style:style>
    <style:style style:name="Mgr9" style:family="graphic" style:parent-style-name="standard">
      <style:graphic-properties draw:stroke="none" draw:fill-color="#f44336" draw:textarea-vertical-align="middle" draw:auto-grow-height="false" fo:min-height="1.111cm" fo:min-width="0.861cm"/>
    </style:style>
    <style:style style:name="Mgr10" style:family="graphic" style:parent-style-name="standard">
      <style:graphic-properties draw:stroke="none" draw:fill="none" draw:fill-color="#ffffff" fo:min-height="11.543cm"/>
    </style:style>
    <style:style style:name="Mpr1" style:family="presentation" style:parent-style-name="Blank-backgroundobjects">
      <style:graphic-properties draw:fill-color="#b4c7dc" draw:textarea-vertical-align="middle" draw:auto-grow-height="false" fo:min-height="1.5cm" fo:min-width="25.5cm"/>
    </style:style>
    <style:style style:name="Mpr2" style:family="presentation" style:parent-style-name="Blank-backgroundobjects" style:list-style-name="ML4">
      <style:graphic-properties draw:stroke="none" svg:stroke-width="0cm" draw:fill="none" draw:fill-color="#ffffff" draw:textarea-vertical-align="top" draw:auto-grow-height="true" draw:fit-to-size="false" style:shrink-to-fit="false" fo:min-height="1.415cm" fo:padding-top="0cm" fo:padding-bottom="0cm" fo:padding-left="0cm" fo:padding-right="0cm" fo:wrap-option="no-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V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V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b4c7dc"/>
      <style:paragraph-properties fo:text-align="center"/>
    </style:style>
    <style:style style:name="MP6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MP8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MP9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MP10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margin-top="0.035cm" fo:margin-bottom="0cm" fo:line-height="100%" fo:text-align="start" fo:text-indent="0cm" style:writing-mode="lr-tb"/>
    </style:style>
    <style:style style:name="MP13" style:family="paragraph">
      <style:paragraph-properties fo:margin-left="0.035cm" fo:margin-right="0cm" fo:margin-top="0cm" fo:margin-bottom="0cm" fo:line-height="0.707cm" fo:text-align="start" fo:text-indent="0cm"/>
    </style:style>
    <style:style style:name="MP14" style:family="paragraph">
      <loext:graphic-properties draw:fill="none" draw:fill-color="#ffffff"/>
      <style:paragraph-properties fo:margin-left="0.035cm" fo:margin-right="0cm" fo:margin-top="0cm" fo:margin-bottom="0cm" fo:line-height="0.707cm" fo:text-align="start" fo:text-indent="0cm" style:writing-mode="lr-tb" style:font-independent-line-spacing="false"/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style:paragraph-properties fo:text-align="end"/>
    </style:style>
    <style:style style:name="MP21" style:family="paragraph">
      <loext:graphic-properties draw:fill-color="#f44336"/>
      <style:paragraph-properties fo:text-align="center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none"/>
      <style:paragraph-properties fo:text-align="center" style:writing-mode="lr-tb"/>
    </style:style>
    <style:style style:name="MP24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3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4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5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6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7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8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9" style:family="text"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style:style style:name="MT10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letter-kerning="true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custom-shape presentation:style-name="Mpr1" draw:text-style-name="MP5" draw:layer="backgroundobjects" svg:width="25.5cm" svg:height="1.5cm" svg:x="0cm" svg:y="17.5cm">
        <text:p/>
        <draw:enhanced-geometry svg:viewBox="0 0 21600 21600" draw:type="rectangle" draw:enhanced-path="M 0 0 L 21600 0 21600 21600 0 21600 0 0 Z N"/>
      </draw:custom-shape>
      <draw:custom-shape draw:name="bg object 16" draw:style-name="Mgr3" draw:text-style-name="MP6" draw:layer="backgroundobjects" svg:width="24.203cm" svg:height="1.966cm" svg:x="0.699cm" svg:y="0.524cm">
        <text:p/>
        <draw:enhanced-geometry draw:mirror-horizontal="false" draw:mirror-vertical="false" svg:viewBox="0 0 0 0" drawooo:sub-view-size="8713470 708025" draw:text-areas="0 0 ?f0 ?f1" draw:type="ooxml-non-primitive" draw:enhanced-path="M 8712962 0 L 0 0 0 707885 8712962 707885 8712962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34cm" svg:x="1.5cm" svg:y="2.666cm" presentation:class="title" presentation:placeholder="true">
        <draw:text-box/>
      </draw:frame>
      <draw:frame presentation:style-name="Blank-outline1" draw:layer="backgroundobjects" svg:width="21.73cm" svg:height="6.543cm" svg:x="1.27cm" svg:y="5.457cm" presentation:class="outline" presentation:placeholder="true">
        <draw:text-box/>
      </draw:frame>
      <draw:custom-shape draw:name="object 16_0" draw:style-name="Mgr4" draw:text-style-name="MP9" draw:layer="backgroundobjects" svg:width="3.67cm" svg:height="1.73cm" svg:x="20.964cm" svg:y="0.524cm">
        <text:p text:style-name="MP7"><text:span text:style-name="MT2">CURS</text:span><text:span text:style-name="MT3"> 21</text:span><text:span text:style-name="MT4">/22</text:span></text:p>
        <text:p text:style-name="MP8"><text:span text:style-name="MT4">CE - CE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12" draw:layer="backgroundobjects" svg:width="12.5cm" svg:height="1.665cm" svg:x="3.542cm" svg:y="0.641cm">
        <draw:text-box>
          <text:p text:style-name="MP10"><text:span text:style-name="MT2">IES</text:span><text:span text:style-name="MT5"> SANT</text:span><text:span text:style-name="MT6"> </text:span><text:span text:style-name="MT5">VICENT FERRER</text:span><text:span text:style-name="MT7"> </text:span><text:span text:style-name="MT2">(ALGEMESÍ)</text:span></text:p>
          <text:p text:style-name="MP11"><text:span text:style-name="MT8">INCIDENTS DE CIBERSEGURETAT</text:span></text:p>
        </draw:text-box>
      </draw:frame>
      <draw:frame draw:name="object 19_0" presentation:style-name="Mpr2" draw:text-style-name="MP14" draw:layer="backgroundobjects" svg:width="11.467cm" svg:height="1.415cm" svg:x="7.5cm" svg:y="17.604cm">
        <draw:text-box>
          <text:p text:style-name="MP13"><text:span text:style-name="MT9">UNITAT 04 <text:s text:c="2"/></text:span><text:span text:style-name="MT10">Implementació de mesures de ciberseguretat davant d’un </text:span><text:span text:style-name="MT9">IC</text:span></text:p>
        </draw:text-box>
      </draw:frame>
      <draw:frame draw:style-name="Mgr6" draw:text-style-name="MP15" draw:layer="backgroundobjects" svg:width="2.459cm" svg:height="2.039cm" svg:x="0.577cm" svg:y="0.529cm">
        <draw:image xlink:href="Pictures/100000000000020E000001B4A98736F05B1CE62A.png" xlink:type="simple" xlink:show="embed" xlink:actuate="onLoad" draw:mime-type="image/png">
          <text:p/>
        </draw:image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draw:style-name="Mgr7" draw:text-style-name="MP16" draw:layer="backgroundobjects" svg:width="22.859cm" svg:height="11.048cm" svg:x="1.27cm" svg:y="4.457cm">
        <draw:text-box>
          <text:p/>
        </draw:text-box>
      </draw:frame>
      <draw:frame presentation:style-name="Mpr5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8" draw:layer="backgroundobjects" svg:width="8.051cm" svg:height="1.312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5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VF" style:page-layout-name="PM1" draw:style-name="Mdp2">
      <draw:frame presentation:style-name="SVF-title" draw:layer="backgroundobjects" svg:width="22.859cm" svg:height="3.18cm" svg:x="1.27cm" svg:y="0.76cm" presentation:class="title" presentation:placeholder="true">
        <draw:text-box/>
      </draw:frame>
      <draw:frame presentation:style-name="SVF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VF-title" draw:layer="backgroundobjects" svg:width="14.848cm" svg:height="11.136cm" svg:x="3.075cm" svg:y="2.257cm" presentation:class="page"/>
        <draw:frame presentation:style-name="SVF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draw:custom-shape draw:style-name="Mgr8" draw:text-style-name="MP19" draw:layer="backgroundobjects" svg:width="24.493cm" svg:height="3.024cm" svg:x="0.001cm" svg:y="0.604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6.328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9" draw:text-style-name="MP21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419cm" svg:x="0.907cm" svg:y="0.907cm" presentation:class="title" presentation:placeholder="true">
        <draw:text-box/>
      </draw:frame>
      <draw:frame draw:style-name="Mgr10" draw:text-style-name="MP16" draw:layer="backgroundobjects" svg:width="23.132cm" svg:height="11.793cm" svg:x="0.907cm" svg:y="4.535cm">
        <draw:text-box>
          <text:p/>
        </draw:text-box>
      </draw:frame>
      <draw:custom-shape draw:style-name="Mgr8" draw:text-style-name="MP20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Mpr10" draw:text-style-name="MP22" draw:layer="backgroundobjects" svg:width="3.175cm" svg:height="1.361cm" svg:x="-0.453cm" svg:y="17.235cm" presentation:class="page-number">
        <draw:text-box>
          <text:p text:style-name="MP22"><text:page-number>&lt;número&gt;</text:page-number></text:p>
        </draw:text-box>
      </draw:frame>
      <draw:frame presentation:style-name="Mpr11" draw:text-style-name="MP23" draw:layer="backgroundobjects" svg:width="16.329cm" svg:height="1.361cm" svg:x="2.267cm" svg:y="17.235cm" presentation:class="footer">
        <draw:text-box>
          <text:p text:style-name="MP22"><presentation:footer/></text:p>
        </draw:text-box>
      </draw:frame>
      <draw:frame presentation:style-name="Mpr10" draw:text-style-name="MP24" draw:layer="backgroundobjects" svg:width="5.896cm" svg:height="1.315cm" svg:x="19.05cm" svg:y="17.235cm" presentation:class="date-time">
        <draw:text-box>
          <text:p text:style-name="MP24"><presentation:date-time/></text:p>
        </draw:text-box>
      </draw:frame>
      <draw:frame presentation:style-name="Alizari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E-CETI-IC</dc:title>
    <meta:creation-date>2021-09-17T12:45:34.110000000</meta:creation-date>
    <meta:editing-duration>PT3H47M4S</meta:editing-duration>
    <meta:generator>LibreOffice/7.3.0.3$Windows_X86_64 LibreOffice_project/0f246aa12d0eee4a0f7adcefbf7c878fc2238db3</meta:generator>
    <meta:editing-cycles>30</meta:editing-cycles>
    <dc:date>2022-03-02T11:49:03.577000000</dc:date>
    <meta:document-statistic meta:object-count="140"/>
    <meta:user-defined meta:name="AppVersion">12.0000</meta:user-defined>
    <meta:user-defined meta:name="Created" meta:value-type="date">2020-08-06T00:00:00</meta:user-defined>
    <meta:user-defined meta:name="Creator">Microsoft® PowerPoint® 2010</meta:user-defined>
    <meta:user-defined meta:name="LastSaved" meta:value-type="date">2021-09-17T00:00:00</meta:user-defined>
    <meta:user-defined meta:name="PresentationFormat" meta:value-type="string">On-screen Show (4:3)</meta:user-defined>
  </office:meta>
</office:document-meta>
</file>