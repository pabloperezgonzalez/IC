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3dca" officeooo:paragraph-rsid="00163dca"/>
    </style:style>
    <style:style style:name="P2" style:family="paragraph" style:parent-style-name="Standard">
      <style:text-properties officeooo:rsid="00177f24" officeooo:paragraph-rsid="00177f24"/>
    </style:style>
    <style:style style:name="P3" style:family="paragraph" style:parent-style-name="Standard">
      <style:text-properties officeooo:rsid="0018cf2d" officeooo:paragraph-rsid="0018cf2d"/>
    </style:style>
    <style:style style:name="P4" style:family="paragraph" style:parent-style-name="Standard">
      <style:text-properties officeooo:rsid="0018cf2d" officeooo:paragraph-rsid="002977ed"/>
    </style:style>
    <style:style style:name="P5" style:family="paragraph" style:parent-style-name="Standard">
      <style:text-properties officeooo:rsid="001a148a" officeooo:paragraph-rsid="001a148a"/>
    </style:style>
    <style:style style:name="P6" style:family="paragraph" style:parent-style-name="Standard">
      <style:text-properties officeooo:rsid="001a148a" officeooo:paragraph-rsid="00304f8f"/>
    </style:style>
    <style:style style:name="P7" style:family="paragraph" style:parent-style-name="Standard">
      <style:text-properties officeooo:rsid="001a148a" officeooo:paragraph-rsid="002e736b"/>
    </style:style>
    <style:style style:name="P8" style:family="paragraph" style:parent-style-name="Standard">
      <style:text-properties fo:font-style="normal" officeooo:rsid="001a148a" officeooo:paragraph-rsid="001a148a" style:font-style-asian="normal" style:font-style-complex="normal"/>
    </style:style>
    <style:style style:name="P9" style:family="paragraph" style:parent-style-name="Standard">
      <style:text-properties fo:font-style="normal" officeooo:rsid="001a148a" officeooo:paragraph-rsid="002e736b" style:font-style-asian="normal" style:font-style-complex="normal"/>
    </style:style>
    <style:style style:name="P10" style:family="paragraph" style:parent-style-name="Standard">
      <style:text-properties fo:font-style="normal" officeooo:rsid="001ae186" officeooo:paragraph-rsid="001ae186" style:font-style-asian="normal" style:font-style-complex="normal"/>
    </style:style>
    <style:style style:name="P11" style:family="paragraph" style:parent-style-name="Standard">
      <style:text-properties fo:font-style="normal" officeooo:rsid="001ae186" officeooo:paragraph-rsid="001a148a" style:font-style-asian="normal" style:font-style-complex="normal"/>
    </style:style>
    <style:style style:name="P12" style:family="paragraph" style:parent-style-name="Standard">
      <style:text-properties fo:font-style="normal" officeooo:rsid="001ae186" officeooo:paragraph-rsid="002e736b" style:font-style-asian="normal" style:font-style-complex="normal"/>
    </style:style>
    <style:style style:name="P13" style:family="paragraph" style:parent-style-name="Standard">
      <style:text-properties fo:color="#158466" loext:opacity="100%" officeooo:rsid="0018cf2d" officeooo:paragraph-rsid="0018cf2d"/>
    </style:style>
    <style:style style:name="P14" style:family="paragraph" style:parent-style-name="Standard">
      <style:text-properties fo:color="#158466" loext:opacity="100%" officeooo:rsid="001ed2c4" officeooo:paragraph-rsid="001ed2c4"/>
    </style:style>
    <style:style style:name="P15" style:family="paragraph" style:parent-style-name="Standard">
      <style:text-properties fo:color="#158466" loext:opacity="100%" officeooo:rsid="0022e4f2" officeooo:paragraph-rsid="0022e4f2"/>
    </style:style>
    <style:style style:name="P16" style:family="paragraph" style:parent-style-name="Standard">
      <style:text-properties fo:color="#158466" loext:opacity="100%" officeooo:rsid="0022e4f2" officeooo:paragraph-rsid="0023f5b4"/>
    </style:style>
    <style:style style:name="P17" style:family="paragraph" style:parent-style-name="Standard">
      <style:text-properties fo:color="#158466" loext:opacity="100%" officeooo:rsid="0023f5b4" officeooo:paragraph-rsid="0023f5b4"/>
    </style:style>
    <style:style style:name="P18" style:family="paragraph" style:parent-style-name="Standard">
      <style:text-properties fo:color="#158466" loext:opacity="100%" officeooo:rsid="00276bd8" officeooo:paragraph-rsid="00276bd8"/>
    </style:style>
    <style:style style:name="P19" style:family="paragraph" style:parent-style-name="Standard">
      <style:text-properties fo:color="#158466" loext:opacity="100%" officeooo:rsid="0028cb24" officeooo:paragraph-rsid="0028cb24"/>
    </style:style>
    <style:style style:name="P20" style:family="paragraph" style:parent-style-name="Standard">
      <style:text-properties fo:color="#158466" loext:opacity="100%" officeooo:rsid="0028cb24" officeooo:paragraph-rsid="003124c7"/>
    </style:style>
    <style:style style:name="P21" style:family="paragraph" style:parent-style-name="Standard">
      <style:text-properties fo:color="#158466" loext:opacity="100%" officeooo:rsid="002977ed" officeooo:paragraph-rsid="002977ed"/>
    </style:style>
    <style:style style:name="P22" style:family="paragraph" style:parent-style-name="Standard">
      <style:text-properties officeooo:rsid="00304f8f" officeooo:paragraph-rsid="00304f8f"/>
    </style:style>
    <style:style style:name="P23" style:family="paragraph" style:parent-style-name="Standard">
      <style:text-properties fo:font-style="normal" officeooo:rsid="001ae186" officeooo:paragraph-rsid="002e736b" style:font-style-asian="normal" style:font-style-complex="normal"/>
    </style:style>
    <style:style style:name="P24" style:family="paragraph" style:parent-style-name="Standard">
      <style:text-properties fo:font-style="normal" officeooo:rsid="00331835" officeooo:paragraph-rsid="00331835" style:font-style-asian="normal" style:font-style-complex="normal"/>
    </style:style>
    <style:style style:name="P25" style:family="paragraph" style:parent-style-name="Standard">
      <style:text-properties fo:font-style="normal" officeooo:rsid="003407e4" officeooo:paragraph-rsid="003407e4" style:font-style-asian="normal" style:font-style-complex="normal"/>
    </style:style>
    <style:style style:name="P26" style:family="paragraph" style:parent-style-name="Standard">
      <style:paragraph-properties fo:break-before="page"/>
      <style:text-properties fo:font-style="normal" officeooo:rsid="003407e4" officeooo:paragraph-rsid="003407e4" style:font-style-asian="normal" style:font-style-complex="normal"/>
    </style:style>
    <style:style style:name="T1" style:family="text">
      <style:text-properties officeooo:rsid="001a148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ae186"/>
    </style:style>
    <style:style style:name="T4" style:family="text">
      <style:text-properties officeooo:rsid="001b69dd"/>
    </style:style>
    <style:style style:name="T5" style:family="text">
      <style:text-properties fo:color="#158466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3f5b4"/>
    </style:style>
    <style:style style:name="T8" style:family="text">
      <style:text-properties officeooo:rsid="002977ed"/>
    </style:style>
    <style:style style:name="T9" style:family="text">
      <style:text-properties officeooo:rsid="002abb94"/>
    </style:style>
    <style:style style:name="T10" style:family="text">
      <style:text-properties officeooo:rsid="002c48d7"/>
    </style:style>
    <style:style style:name="T11" style:family="text">
      <style:text-properties officeooo:rsid="002dde93"/>
    </style:style>
    <style:style style:name="T12" style:family="text">
      <style:text-properties officeooo:rsid="003124c7"/>
    </style:style>
    <style:style style:name="T1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uentes</text:p>
      <text:p text:style-name="P1">Libro: Manual de ciberinvestigación en fuentes abiertas: OSINT para analistas (2019)</text:p>
      <text:p text:style-name="P1">de Félix Brezo Fernández (Autor), Yaiza Rubio Viñuela (Autor)</text:p>
      <text:p text:style-name="P1">Canal Discord: https://discord.gg/stgd27my</text:p>
      <text:p text:style-name="P1"/>
      <text:p text:style-name="P1">---------------------</text:p>
      <text:p text:style-name="P1"/>
      <text:p text:style-name="P1">Inteligencia.</text:p>
      <text:p text:style-name="P1">Tipos.</text:p>
      <text:p text:style-name="P1">Desinformación: CCN-CERT BP/13</text:p>
      <text:p text:style-name="P1"><text:a xlink:type="simple" xlink:href="https://www.dsn.gob.es/sites/dsn/files/CCN-CERT_BP_13_Desinformación%20en%20el%20Ciberespacio.pdf" text:style-name="Internet_20_link" text:visited-style-name="Visited_20_Internet_20_Link">https://www.dsn.gob.es/sites/dsn/files/CCN-CERT_BP_13_Desinformaci%C3%B3n%20en%20el%20Ciberespacio.pdf</text:a></text:p>
      <text:p text:style-name="P1">Evaluación de fuentes</text:p>
      <text:p text:style-name="P1">Archivado y gestión de información</text:p>
      <text:p text:style-name="P1">-ZOTERO</text:p>
      <text:p text:style-name="P1">-WAYBACK MACHINE</text:p>
      <text:p text:style-name="P1">-Archive.is</text:p>
      <text:p text:style-name="P1">-Egarante</text:p>
      <text:p text:style-name="P1"/>
      <text:p text:style-name="P1">Naturaleza de la información</text:p>
      <text:p text:style-name="P1">-formato de texto. ASCII, Unicode, base63, json, XML, CSV</text:p>
      <text:p text:style-name="P1">-expresiones regulares</text:p>
      <text:p text:style-name="P1">-busquedas con egrep</text:p>
      <text:p text:style-name="P1">-extracción de entidades con expresiones regulares</text:p>
      <text:p text:style-name="P1"><text:a xlink:type="simple" xlink:href="https://www.martinvigo.com/tools/phonerator/" text:style-name="Internet_20_link" text:visited-style-name="Visited_20_Internet_20_Link"><text:span text:style-name="T5">https://www.martinvigo.com/tools/phonerator/</text:span></text:a></text:p>
      <text:p text:style-name="P1"/>
      <text:p text:style-name="P1"/>
      <text:p text:style-name="P2">Analisis de ficheros y extraccion de metadatos.</text:p>
      <text:p text:style-name="P2">-Identificacion de formatos .. hexdump -C ... | head</text:p>
      <text:p text:style-name="P2">-extraccion de texto de ficheros ofimaticos. <text:s text:c="2"/>Abiword</text:p>
      <text:p text:style-name="P2">-Reconocimiento optico (OCR)</text:p>
      <text:p text:style-name="P2">tesseract</text:p>
      <text:p text:style-name="P2">GOCR</text:p>
      <text:p text:style-name="P2">-procesamiento de voz</text:p>
      <text:p text:style-name="P2">espeak + <text:s/>pyttsx3 (+python)</text:p>
      <text:p text:style-name="P2">SpeechRecognition ( pip3 ) + python</text:p>
      <text:p text:style-name="P2"/>
      <text:p text:style-name="P2">Analisis de metadatos</text:p>
      <text:p text:style-name="P2">Exiftool</text:p>
      <text:p text:style-name="P2">FOCA</text:p>
      <text:p text:style-name="P2"><text:tab/>Enumeración de activos de un dominio.</text:p>
      <text:p text:style-name="P2">Analisis forense de imágenes</text:p>
      <text:p text:style-name="P2">-Fotoforensics</text:p>
      <text:p text:style-name="P2">-Forensicaly</text:p>
      <text:p text:style-name="P2">-Error Level Analysis <text:s/>(ELA)</text:p>
      <text:p text:style-name="P2"/>
      <text:p text:style-name="P3">Usos avanzados de herramientas de busqueda</text:p>
      <text:p text:style-name="P3">Buscadores generalistas</text:p>
      <text:p text:style-name="P3">-google</text:p>
      <text:p text:style-name="P3">-bing</text:p>
      <text:p text:style-name="P3">-Baidu</text:p>
      <text:p text:style-name="P3"><text:soft-page-break/>-Yandex</text:p>
      <text:p text:style-name="P3">-Duckduckgo</text:p>
      <text:p text:style-name="P3">busquedas personalizadas</text:p>
      <text:p text:style-name="P3">-dorks de google</text:p>
      <text:p text:style-name="P3">-custom search de google</text:p>
      <text:p text:style-name="P3">-searX. Metabuscador en varias plataformas</text:p>
      <text:p text:style-name="P3">-Buscadores de imagenes</text:p>
      <text:p text:style-name="P3"><text:tab/>google imagenes</text:p>
      <text:p text:style-name="P3"><text:tab/>yandex imagenes</text:p>
      <text:p text:style-name="P3"><text:tab/>tineye</text:p>
      <text:p text:style-name="P3"><text:tab/>extensiones de navegador</text:p>
      <text:p text:style-name="P13"><text:tab/><text:span text:style-name="T4">Google Lens</text:span></text:p>
      <text:p text:style-name="P13"><text:tab/><text:a xlink:type="simple" xlink:href="https://smallseotools.com/es/reverse-image-search/" text:style-name="Internet_20_link" text:visited-style-name="Visited_20_Internet_20_Link">https://smallseotools.com/es/reverse-image-search/</text:a></text:p>
      <text:p text:style-name="P4"/>
      <text:p text:style-name="P4">buscador de redes WIFI, <text:span text:style-name="T8">mac, BSSID, </text:span><text:span text:style-name="T9">SSID</text:span></text:p>
      <text:p text:style-name="P21"><text:tab/><text:a xlink:type="simple" xlink:href="https://wigle.net/" text:style-name="Internet_20_link" text:visited-style-name="Visited_20_Internet_20_Link">https://wigle.net/</text:a> <text:s/><text:span text:style-name="T9">(requiere registro , con email ) </text:span><text:span text:style-name="T10">pots usar un emai temporal</text:span></text:p>
      <text:p text:style-name="P21"/>
      <text:p text:style-name="P3">buscadores en redes anonimas</text:p>
      <text:p text:style-name="P3"><text:tab/>ahmia.fi</text:p>
      <text:p text:style-name="P3"><text:tab/>Torch</text:p>
      <text:p text:style-name="P3"/>
      <text:p text:style-name="P3">buscadores en redes sociales</text:p>
      <text:p text:style-name="P3"><text:tab/><text:span text:style-name="T11">sherlock <text:s/>( consola )</text:span></text:p>
      <text:p text:style-name="P3"/>
      <text:p text:style-name="P3"/>
      <text:p text:style-name="P3">Atribución</text:p>
      <text:p text:style-name="P3">OSRFramework</text:p>
      <text:p text:style-name="P3"><text:tab/>usufy</text:p>
      <text:p text:style-name="P3"><text:tab/>alias_generator</text:p>
      <text:p text:style-name="P3"><text:tab/><text:span text:style-name="T1">mailfy</text:span></text:p>
      <text:p text:style-name="P3"><text:tab/><text:span text:style-name="T1">searchfy</text:span></text:p>
      <text:p text:style-name="P3"><text:tab/><text:span text:style-name="T1">domainfy</text:span></text:p>
      <text:p text:style-name="P5">Tinfoleak</text:p>
      <text:p text:style-name="P5">Recon-ng</text:p>
      <text:p text:style-name="P5">TheHarvester</text:p>
      <text:p text:style-name="P5">Maltego</text:p>
      <text:p text:style-name="P5">Namechk</text:p>
      <text:p text:style-name="P5">Socialbearing (twiter)</text:p>
      <text:p text:style-name="P5">Geosocial footprint</text:p>
      <text:p text:style-name="P5"><text:a xlink:type="simple" xlink:href="https://www.brigadaosint.com/sacando-id-de-linkedin/" text:style-name="Internet_20_link" text:visited-style-name="Visited_20_Internet_20_Link"><text:span text:style-name="T5">https://www.brigadaosint.com/sacando-id-de-linkedin/</text:span></text:a></text:p>
      <text:p text:style-name="P5"/>
      <text:p text:style-name="P6">email2phonenumber </text:p>
      <text:p text:style-name="P22">(A OSINT tool to obtain a target's phone number just by having his email address)</text:p>
      <text:p text:style-name="P5"><text:a xlink:type="simple" xlink:href="https://github.com/martinvigo/email2phonenumber" text:style-name="Internet_20_link" text:visited-style-name="Visited_20_Internet_20_Link">https://github.com/martinvigo/email2phonenumber</text:a></text:p>
      <text:p text:style-name="P5"/>
      <text:p text:style-name="P5">Buscadores tecnologicos</text:p>
      <text:p text:style-name="P5">Shodan</text:p>
      <text:p text:style-name="P5">Zoomeye</text:p>
      <text:p text:style-name="P5">Censys</text:p>
      <text:p text:style-name="P5">Whois</text:p>
      <text:p text:style-name="P5"><text:tab/>domaintools</text:p>
      <text:p text:style-name="P5"><text:tab/>viewdns</text:p>
      <text:p text:style-name="P5"><text:soft-page-break/>WhoisHistory</text:p>
      <text:p text:style-name="P5">Passive DNS</text:p>
      <text:p text:style-name="P5">Reverse whois</text:p>
      <text:p text:style-name="P5"/>
      <text:p text:style-name="P5">Localización IP <text:s/>(ip2location.com)</text:p>
      <text:p text:style-name="P5">ip-api.com</text:p>
      <text:p text:style-name="P5">Reverse <text:span text:style-name="T2">IP</text:span></text:p>
      <text:p text:style-name="P8">IP address blacklist</text:p>
      <text:p text:style-name="P8">sandboxing de ficheros</text:p>
      <text:p text:style-name="P8"><text:tab/>Virustotal</text:p>
      <text:p text:style-name="P8"><text:tab/>Hybrid Analysis</text:p>
      <text:p text:style-name="P8"><text:tab/>OTX</text:p>
      <text:p text:style-name="P8">Investigación sobre criptomonedas</text:p>
      <text:p text:style-name="P8"><text:tab/>Dirección, bloque, carteras, transaccion</text:p>
      <text:p text:style-name="P8"><text:tab/>Bitcoin, Ethereum, Monero, </text:p>
      <text:p text:style-name="P8"><text:tab/>PoW, PoS, Fork, </text:p>
      <text:p text:style-name="P8"><text:tab/><text:span text:style-name="T3">Blockseer</text:span></text:p>
      <text:p text:style-name="P8"><text:tab/><text:span text:style-name="T3">eXploration Tool</text:span></text:p>
      <text:p text:style-name="P8"><text:tab/><text:span text:style-name="T3">Criptomonedas con anonimato</text:span></text:p>
      <text:p text:style-name="P11"/>
      <text:p text:style-name="P10"/>
      <text:p text:style-name="P10">Herramientas de información cartográfica</text:p>
      <text:p text:style-name="P10">QGIS</text:p>
      <text:p text:style-name="P14">Generador de mapas</text:p>
      <text:p text:style-name="P14">Simulador de sombras por horas ( de edificios en mapas)</text:p>
      <text:p text:style-name="P14"/>
      <text:p text:style-name="P15">Reconocer el modelo y año de un coche con la cámara de un móvil. <text:span text:style-name="T6">Blippar</text:span></text:p>
      <text:p text:style-name="P16">Reconocer el modelo y año de un coche <text:span text:style-name="T7">subiendo foto a web <text:s/></text:span><text:a xlink:type="simple" xlink:href="https://carnet.ai/" text:style-name="Internet_20_link" text:visited-style-name="Visited_20_Internet_20_Link"><text:span text:style-name="T7">https://carnet.ai/</text:span></text:a></text:p>
      <text:p text:style-name="P16"/>
      <text:p text:style-name="P17">Reconocer pais, provincia con letras de matricula</text:p>
      <text:p text:style-name="P17"/>
      <text:p text:style-name="P17"><text:a xlink:type="simple" xlink:href="https://www.timeanddate.com/" text:style-name="Internet_20_link" text:visited-style-name="Visited_20_Internet_20_Link">https://www.timeanddate.com/</text:a></text:p>
      <text:p text:style-name="P17"/>
      <text:p text:style-name="P17">verify content on social networks</text:p>
      <text:p text:style-name="P17"><text:a xlink:type="simple" xlink:href="https://www.invid-project.eu/tools-and-services/invid-verification-plugin/" text:style-name="Internet_20_link" text:visited-style-name="Visited_20_Internet_20_Link">https://www.invid-project.eu/tools-and-services/invid-verification-plugin/</text:a></text:p>
      <text:p text:style-name="P17"><text:a xlink:type="simple" xlink:href="https://droidmaze.com/how-to-find-name-and-username-history-on-telegram/" text:style-name="Internet_20_link" text:visited-style-name="Visited_20_Internet_20_Link"/></text:p>
      <text:p text:style-name="P17"><text:a xlink:type="simple" xlink:href="https://droidmaze.com/how-to-find-name-and-username-history-on-telegram/" text:style-name="Internet_20_link" text:visited-style-name="Visited_20_Internet_20_Link">https://droidmaze.com/how-to-find-name-and-username-history-on-telegram/</text:a></text:p>
      <text:p text:style-name="P17"/>
      <text:p text:style-name="P17"/>
      <text:p text:style-name="P18">(31-3-22)</text:p>
      <text:p text:style-name="P18"/>
      <text:p text:style-name="P19">Curso OSINT gratuito</text:p>
      <text:p text:style-name="P19"><text:a xlink:type="simple" xlink:href="https://ciberpatrulla.com/afi-curso-osint-gratuito/?ref=V85308312D" text:style-name="Internet_20_link" text:visited-style-name="Visited_20_Internet_20_Link">https://ciberpatrulla.com/afi-curso-osint-gratuito/?ref=V85308312D</text:a></text:p>
      <text:p text:style-name="P19"/>
      <text:p text:style-name="P19"/>
      <text:p text:style-name="P20"><text:span text:style-name="T12">Herramientas </text:span>OSINT <text:span text:style-name="T12">ONLINE</text:span></text:p>
      <text:p text:style-name="P7"><text:a xlink:type="simple" xlink:href="https://osint.rocks/" text:style-name="Internet_20_link" text:visited-style-name="Visited_20_Internet_20_Link"><text:span text:style-name="T13">https://osint.rocks/</text:span></text:a><text:span text:style-name="T13"> <text:s text:c="2"/></text:span><text:a xlink:type="simple" xlink:href="https://www.instagram.com/reel/C_51cQ-N5l-/?igsh=dXllc3Boazl0bHhx" text:style-name="Internet_20_link" text:visited-style-name="Visited_20_Internet_20_Link"><text:span text:style-name="T13">https://www.instagram.com/reel/C_51cQ-N5l-/?igsh=dXllc3Boazl0bHhx</text:span></text:a></text:p>
      <text:p text:style-name="P7"><text:span text:style-name="T13"/></text:p>
      <text:p text:style-name="P9"/>
      <text:p text:style-name="P12">La pila ELK</text:p>
      <text:p text:style-name="P12">Logstash</text:p>
      <text:p text:style-name="P12">ElasticSearch</text:p>
      <text:p text:style-name="P12"><text:soft-page-break/>Kibana</text:p>
      <text:p text:style-name="P12"/>
      <text:p text:style-name="P12"/>
      <text:p text:style-name="P24">Pagines osint</text:p>
      <text:p text:style-name="P12"><text:a xlink:type="simple" xlink:href="https://www.osint4fun.eu/" text:style-name="Internet_20_link" text:visited-style-name="Visited_20_Internet_20_Link">https://www.osint4fun.eu/</text:a> </text:p>
      <text:p text:style-name="P12"><text:a xlink:type="simple" xlink:href="https://www.osint4fun.eu/advent2024/en/" text:style-name="Internet_20_link" text:visited-style-name="Visited_20_Internet_20_Link">https://www.osint4fun.eu/advent2024/en/</text:a> </text:p>
      <text:p text:style-name="P12"/>
      <text:p text:style-name="P12"/>
      <text:p text:style-name="P12"><text:a xlink:type="simple" xlink:href="https://osintswitzerland.ch/" text:style-name="Internet_20_link" text:visited-style-name="Visited_20_Internet_20_Link">https://osintswitzerland.ch/</text:a> </text:p>
      <text:p text:style-name="P12"/>
      <text:p text:style-name="P25"/>
      <text:p text:style-name="P26">conferencias ciberseguridad</text:p>
      <text:p text:style-name="P25">Actualización de una lista que tengo sobre conferencias, jornadas, congresos de ciberseguridad:<text:line-break/>Algunas de ellas las pueden ver sus grabaciones en Youtube. <text:line-break/><text:line-break/>RootedCON<text:line-break/>IntelCon<text:line-break/>OpenExpo Europe<text:line-break/>Navaja Negra<text:line-break/>Osintomatico<text:line-break/>Incibe<text:line-break/>Hack-en<text:line-break/>Hackfiis<text:line-break/>HackConRD<text:line-break/>UNIR - Jornada de ciberseguridad <text:line-break/>Congreso de ciberseguridad de andalucia<text:line-break/>CCN- CERT jornadas<text:line-break/>MorterueloCON<text:line-break/>Mundo hacker<text:line-break/>T3chFest<text:line-break/>Policia nacional cyberwall ponencia<text:line-break/>Ekoparty Security Conference<text:line-break/>Asturcontech<text:line-break/>Dragon jar<text:line-break/>Dev / Null<text:line-break/>BugCon<text:line-break/>HTB meetups<text:line-break/>Fluid Attacks<text:line-break/>Bishop Fox<text:line-break/>DC11506<text:line-break/>Hackron en Tenerife<text:line-break/>BSides LATAM<text:line-break/>8.8 en Chile<text:line-break/>FAQin<text:line-break/>NoConName<text:line-break/>Hcon<text:line-break/>NotPinkCon<text:line-break/>MorterueloCon<text:line-break/>Raices Cyber Org<text:line-break/>Vetcon<text:line-break/>Issa Puerto Rico Cibercurity Conference<text:line-break/>Summit Ciberseguridad - CITTDuocUC<text:line-break/>Cascamorrascon<text:line-break/>Open Hacking Guatemala<text:line-break/>PwnedCR<text:line-break/>HoneyCon<text:line-break/>UAD360<text:line-break/>HackOn<text:line-break/>Hackron<text:line-break/>Euskalhack<text:line-break/>No cON Name<text:line-break/>Cyber Security World Madrid<text:line-break/>SecAdmin<text:line-break/><text:soft-page-break/>HackGDL<text:line-break/>Mundial de Ciberseguridad - ciberseguridadenlinea<text:line-break/>Posadev<text:line-break/>Defcon<text:line-break/>Black Hat<text:line-break/>x33fc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4T19:07:36.016000000</dc:date>
    <meta:editing-duration>PT7H38M48S</meta:editing-duration>
    <meta:editing-cycles>17</meta:editing-cycles>
    <meta:generator>LibreOffice/24.2.6.2$Windows_X86_64 LibreOffice_project/ef66aa7e36a1bb8e65bfbc63aba53045a14d0871</meta:generator>
    <meta:document-statistic meta:table-count="0" meta:image-count="0" meta:object-count="0" meta:page-count="6" meta:paragraph-count="132" meta:word-count="497" meta:character-count="4295" meta:non-whitespace-character-count="3884"/>
  </office:meta>
</office:document-meta>
</file>