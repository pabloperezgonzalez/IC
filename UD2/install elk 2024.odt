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00000013059BE7DDF.png" manifest:media-type="image/png"/>
  <manifest:file-entry manifest:full-path="Pictures/10000000000000D30000004E7E94C193.png" manifest:media-type="image/png"/>
  <manifest:file-entry manifest:full-path="Pictures/100000000000052A000001B16AC240B0.png" manifest:media-type="image/png"/>
  <manifest:file-entry manifest:full-path="Pictures/10000000000004EE00000147BBFC56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Consolas" svg:font-family="Consolas" style:font-family-generic="modern" style:font-pitch="fixed"/>
    <style:font-face style:name="Consolas1" svg:font-family="Consolas, Menlo, 'DejaVu Sans Mono', 'Bitstream Vera Sans Mono', 'Lucida Console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1272cf" officeooo:paragraph-rsid="001272cf"/>
    </style:style>
    <style:style style:name="P2" style:family="paragraph" style:parent-style-name="Standard">
      <style:text-properties style:font-name="Consolas" fo:font-size="10pt" style:rfc-language-tag="ca-ES-valencia" fo:language="ca" fo:country="ES" officeooo:rsid="0018d86b" officeooo:paragraph-rsid="0018d86b" style:font-size-asian="10pt" style:font-size-complex="10pt"/>
    </style:style>
    <style:style style:name="P3" style:family="paragraph" style:parent-style-name="Standard">
      <style:text-properties officeooo:rsid="00159dd1" officeooo:paragraph-rsid="00159dd1"/>
    </style:style>
    <style:style style:name="P4" style:family="paragraph" style:parent-style-name="Standard">
      <style:text-properties officeooo:rsid="001792e8" officeooo:paragraph-rsid="001792e8"/>
    </style:style>
    <style:style style:name="P5" style:family="paragraph" style:parent-style-name="Standard">
      <style:text-properties style:rfc-language-tag="ca-ES-valencia" fo:language="ca" fo:country="ES"/>
    </style:style>
    <style:style style:name="P6" style:family="paragraph" style:parent-style-name="Standard">
      <style:text-properties style:rfc-language-tag="ca-ES-valencia" fo:language="ca" fo:country="ES" officeooo:rsid="001272cf" officeooo:paragraph-rsid="001272cf"/>
    </style:style>
    <style:style style:name="P7" style:family="paragraph" style:parent-style-name="Standard">
      <style:text-properties style:rfc-language-tag="ca-ES-valencia" fo:language="ca" fo:country="ES" officeooo:rsid="001792e8" officeooo:paragraph-rsid="001792e8"/>
    </style:style>
    <style:style style:name="P8" style:family="paragraph" style:parent-style-name="Standard">
      <style:text-properties style:rfc-language-tag="ca-ES-valencia" fo:language="ca" fo:country="ES" officeooo:rsid="00159dd1" officeooo:paragraph-rsid="00159dd1"/>
    </style:style>
    <style:style style:name="P9" style:family="paragraph" style:parent-style-name="Standard">
      <style:text-properties style:rfc-language-tag="ca-ES-valencia" fo:language="ca" fo:country="ES" officeooo:rsid="00159dd1" officeooo:paragraph-rsid="001f4c28"/>
    </style:style>
    <style:style style:name="P10" style:family="paragraph" style:parent-style-name="Standard">
      <style:text-properties style:rfc-language-tag="ca-ES-valencia" fo:language="ca" fo:country="ES" officeooo:rsid="0014f61a" officeooo:paragraph-rsid="0014f61a"/>
    </style:style>
    <style:style style:name="P11" style:family="paragraph" style:parent-style-name="Standard">
      <style:text-properties style:rfc-language-tag="ca-ES-valencia" fo:language="ca" fo:country="ES" officeooo:rsid="0014f61a" officeooo:paragraph-rsid="00159dd1"/>
    </style:style>
    <style:style style:name="P12" style:family="paragraph" style:parent-style-name="Standard">
      <style:text-properties style:rfc-language-tag="ca-ES-valencia" fo:language="ca" fo:country="ES" officeooo:rsid="0018d86b" officeooo:paragraph-rsid="0018d86b"/>
    </style:style>
    <style:style style:name="P13" style:family="paragraph" style:parent-style-name="Standard">
      <style:text-properties style:rfc-language-tag="ca-ES-valencia" fo:language="ca" fo:country="ES" officeooo:rsid="0018d86b" officeooo:paragraph-rsid="001a05d4"/>
    </style:style>
    <style:style style:name="P14" style:family="paragraph" style:parent-style-name="Standard">
      <style:text-properties style:rfc-language-tag="ca-ES-valencia" fo:language="ca" fo:country="ES" officeooo:rsid="0018d86b" officeooo:paragraph-rsid="001aa453"/>
    </style:style>
    <style:style style:name="P15" style:family="paragraph" style:parent-style-name="Standard">
      <style:text-properties style:rfc-language-tag="ca-ES-valencia" fo:language="ca" fo:country="ES" officeooo:paragraph-rsid="0018d86b"/>
    </style:style>
    <style:style style:name="P16" style:family="paragraph" style:parent-style-name="Standard">
      <style:text-properties style:rfc-language-tag="ca-ES-valencia" fo:language="ca" fo:country="ES" officeooo:rsid="001a05d4" officeooo:paragraph-rsid="001a05d4"/>
    </style:style>
    <style:style style:name="P17" style:family="paragraph" style:parent-style-name="Standard">
      <style:text-properties style:rfc-language-tag="ca-ES-valencia" fo:language="ca" fo:country="ES" officeooo:rsid="001a05d4" officeooo:paragraph-rsid="001c54f9"/>
    </style:style>
    <style:style style:name="P18" style:family="paragraph" style:parent-style-name="Standard">
      <style:text-properties style:rfc-language-tag="ca-ES-valencia" fo:language="ca" fo:country="ES" officeooo:rsid="001c54f9" officeooo:paragraph-rsid="001c54f9"/>
    </style:style>
    <style:style style:name="P19" style:family="paragraph" style:parent-style-name="Standard">
      <style:text-properties style:rfc-language-tag="ca-ES-valencia" fo:language="ca" fo:country="ES" fo:font-weight="bold" officeooo:rsid="00159dd1" officeooo:paragraph-rsid="00159dd1" style:font-weight-asian="bold" style:font-weight-complex="bold"/>
    </style:style>
    <style:style style:name="P20" style:family="paragraph" style:parent-style-name="Standard">
      <style:text-properties style:rfc-language-tag="ca-ES-valencia" fo:language="ca" fo:country="ES" fo:font-weight="bold" officeooo:rsid="001792e8" officeooo:paragraph-rsid="001792e8" style:font-weight-asian="bold" style:font-weight-complex="bold"/>
    </style:style>
    <style:style style:name="P21" style:family="paragraph" style:parent-style-name="Standard">
      <style:text-properties style:rfc-language-tag="ca-ES-valencia" fo:language="ca" fo:country="ES" officeooo:paragraph-rsid="001f4c28"/>
    </style:style>
    <style:style style:name="P22" style:family="paragraph" style:parent-style-name="Standard">
      <style:text-properties style:rfc-language-tag="ca-ES-valencia" fo:language="ca" fo:country="ES" officeooo:rsid="00218551" officeooo:paragraph-rsid="00218551"/>
    </style:style>
    <style:style style:name="P23" style:family="paragraph" style:parent-style-name="Standard">
      <style:text-properties style:rfc-language-tag="ca-ES-valencia" fo:language="ca" fo:country="ES" officeooo:rsid="001f4c28" officeooo:paragraph-rsid="001f4c28"/>
    </style:style>
    <style:style style:name="P24" style:family="paragraph" style:parent-style-name="Standard">
      <style:text-properties style:rfc-language-tag="ca-ES-valencia" fo:language="ca" fo:country="ES" officeooo:rsid="002b338f" officeooo:paragraph-rsid="002b338f"/>
    </style:style>
    <style:style style:name="P25" style:family="paragraph" style:parent-style-name="Standard">
      <style:text-properties officeooo:paragraph-rsid="001a05d4"/>
    </style:style>
    <style:style style:name="P26" style:family="paragraph" style:parent-style-name="Standard">
      <style:text-properties officeooo:rsid="001a05d4" officeooo:paragraph-rsid="001a05d4"/>
    </style:style>
    <style:style style:name="P27" style:family="paragraph" style:parent-style-name="Standard">
      <style:text-properties style:font-name="Candara" style:rfc-language-tag="ca-ES-valencia" fo:language="ca" fo:country="ES" officeooo:rsid="001c54f9" officeooo:paragraph-rsid="001c54f9"/>
    </style:style>
    <style:style style:name="P28" style:family="paragraph" style:parent-style-name="Standard">
      <style:text-properties style:font-name="Candara" style:rfc-language-tag="ca-ES-valencia" fo:language="ca" fo:country="ES" officeooo:rsid="001d0a0f" officeooo:paragraph-rsid="001d0a0f"/>
    </style:style>
    <style:style style:name="P29" style:family="paragraph" style:parent-style-name="Standard">
      <style:text-properties style:font-name="Candara" style:rfc-language-tag="ca-ES-valencia" fo:language="ca" fo:country="ES" officeooo:rsid="001a05d4" officeooo:paragraph-rsid="00218551"/>
    </style:style>
    <style:style style:name="P30" style:family="paragraph" style:parent-style-name="Standard">
      <style:text-properties style:font-name="Candara" style:rfc-language-tag="ca-ES-valencia" fo:language="ca" fo:country="ES" officeooo:rsid="00253144" officeooo:paragraph-rsid="00253144"/>
    </style:style>
    <style:style style:name="P31" style:family="paragraph" style:parent-style-name="Standard">
      <style:text-properties style:font-name="Candara" style:rfc-language-tag="ca-ES-valencia" fo:language="ca" fo:country="ES" officeooo:rsid="00282cdc" officeooo:paragraph-rsid="00282cdc"/>
    </style:style>
    <style:style style:name="P32" style:family="paragraph" style:parent-style-name="Standard">
      <style:text-properties style:font-name="Candara" style:rfc-language-tag="ca-ES-valencia" fo:language="ca" fo:country="ES" officeooo:rsid="002c5d17" officeooo:paragraph-rsid="002c5d17"/>
    </style:style>
    <style:style style:name="P33" style:family="paragraph" style:parent-style-name="Standard">
      <style:text-properties style:font-name="Candara" style:rfc-language-tag="ca-ES-valencia" fo:language="ca" fo:country="ES" officeooo:rsid="002c5d17" officeooo:paragraph-rsid="002e5b45"/>
    </style:style>
    <style:style style:name="P34" style:family="paragraph" style:parent-style-name="Standard">
      <style:text-properties style:font-name="Candara" fo:font-size="10pt" style:rfc-language-tag="ca-ES-valencia" fo:language="ca" fo:country="ES" officeooo:rsid="001c54f9" officeooo:paragraph-rsid="001c54f9" style:font-size-asian="10pt" style:font-size-complex="10pt"/>
    </style:style>
    <style:style style:name="P35" style:family="paragraph" style:parent-style-name="Standard">
      <style:text-properties style:font-name="Candara" fo:font-size="10pt" style:rfc-language-tag="ca-ES-valencia" fo:language="ca" fo:country="ES" officeooo:rsid="001d0a0f" officeooo:paragraph-rsid="001d0a0f" style:font-size-asian="10pt" style:font-size-complex="10pt"/>
    </style:style>
    <style:style style:name="P36" style:family="paragraph" style:parent-style-name="Standard">
      <style:text-properties style:font-name="Candara" fo:font-size="10pt" style:rfc-language-tag="ca-ES-valencia" fo:language="ca" fo:country="ES" officeooo:rsid="0022fd3d" officeooo:paragraph-rsid="0022fd3d" style:font-size-asian="10pt" style:font-size-complex="10pt"/>
    </style:style>
    <style:style style:name="P37" style:family="paragraph" style:parent-style-name="Standard">
      <style:text-properties style:font-name="Candara" fo:font-size="10pt" style:rfc-language-tag="ca-ES-valencia" fo:language="ca" fo:country="ES" officeooo:rsid="00282cdc" officeooo:paragraph-rsid="00282cdc" style:font-size-asian="10pt" style:font-size-complex="10pt"/>
    </style:style>
    <style:style style:name="P38" style:family="paragraph" style:parent-style-name="Standard">
      <style:text-properties style:font-name="Candara" fo:font-size="10pt" style:rfc-language-tag="ca-ES-valencia" fo:language="ca" fo:country="ES" fo:font-weight="bold" officeooo:rsid="001c54f9" officeooo:paragraph-rsid="001c54f9" style:font-size-asian="10pt" style:font-weight-asian="bold" style:font-size-complex="10pt" style:font-weight-complex="bold"/>
    </style:style>
    <style:style style:name="P39" style:family="paragraph" style:parent-style-name="Standard">
      <style:text-properties fo:color="#000000" loext:opacity="100%" style:font-name="Consolas" fo:font-size="8pt" style:rfc-language-tag="ca-ES-valencia" fo:language="ca" fo:country="ES" officeooo:rsid="0014f61a" officeooo:paragraph-rsid="0014f61a" fo:background-color="#ffffff" style:font-size-asian="8pt" style:font-size-complex="8pt"/>
    </style:style>
    <style:style style:name="P40" style:family="paragraph" style:parent-style-name="Standard">
      <style:text-properties fo:color="#000000" loext:opacity="100%" style:font-name="Consolas" fo:font-size="8pt" style:rfc-language-tag="ca-ES-valencia" fo:language="ca" fo:country="ES" officeooo:rsid="0014f61a" officeooo:paragraph-rsid="001f4c28" fo:background-color="#ffffff" style:font-size-asian="8pt" style:font-size-complex="8pt"/>
    </style:style>
    <style:style style:name="P41" style:family="paragraph" style:parent-style-name="Standard">
      <style:text-properties style:font-name="monospace" fo:font-size="10pt" style:rfc-language-tag="ca-ES-valencia" fo:language="ca" fo:country="ES" officeooo:rsid="0018d86b" officeooo:paragraph-rsid="0018d86b" style:font-size-asian="10pt" style:font-size-complex="10pt"/>
    </style:style>
    <style:style style:name="P42" style:family="paragraph" style:parent-style-name="Standard">
      <style:text-properties style:font-name="monospace" fo:font-size="10pt" style:rfc-language-tag="ca-ES-valencia" fo:language="ca" fo:country="ES" officeooo:rsid="001a05d4" officeooo:paragraph-rsid="001a05d4" style:font-size-asian="10pt" style:font-size-complex="10pt"/>
    </style:style>
    <style:style style:name="P4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paragraph-rsid="0022fd3d" fo:background-color="#ffffff" style:font-size-asian="14pt" style:font-size-complex="14pt" loext:padding="0cm" loext:border="none"/>
    </style:style>
    <style:style style:name="P4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22fd3d"/>
    </style:style>
    <style:style style:name="P45" style:family="paragraph" style:parent-style-name="Standard">
      <style:text-properties style:font-name="Candara" fo:font-size="10pt" style:rfc-language-tag="ca-ES-valencia" fo:language="ca" fo:country="ES" officeooo:rsid="00282cdc" officeooo:paragraph-rsid="00282cdc" style:font-size-asian="10pt" style:font-size-complex="10pt"/>
    </style:style>
    <style:style style:name="P46" style:family="paragraph" style:parent-style-name="Standard">
      <style:text-properties style:font-name="Candara" fo:font-size="10pt" style:rfc-language-tag="ca-ES-valencia" fo:language="ca" fo:country="ES" officeooo:rsid="001c54f9" officeooo:paragraph-rsid="001c54f9" style:font-size-asian="10pt" style:font-size-complex="10pt"/>
    </style:style>
    <style:style style:name="P47" style:family="paragraph" style:parent-style-name="Standard">
      <style:text-properties style:font-name="Candara" style:rfc-language-tag="ca-ES-valencia" fo:language="ca" fo:country="ES" officeooo:rsid="001c54f9" officeooo:paragraph-rsid="001c54f9"/>
    </style:style>
    <style:style style:name="P48" style:family="paragraph" style:parent-style-name="Standard">
      <style:text-properties style:font-name="Candara" style:rfc-language-tag="ca-ES-valencia" fo:language="ca" fo:country="ES" officeooo:rsid="00253144" officeooo:paragraph-rsid="00325014"/>
    </style:style>
    <style:style style:name="P49" style:family="paragraph" style:parent-style-name="Standard">
      <style:text-properties style:font-name="Candara" style:rfc-language-tag="ca-ES-valencia" fo:language="ca" fo:country="ES" officeooo:rsid="00253144" officeooo:paragraph-rsid="002531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font-name="monospace" fo:font-size="10pt" fo:background-color="#ffffff" loext:char-shading-value="0" style:font-size-asian="10pt" style:font-size-complex="10pt"/>
    </style:style>
    <style:style style:name="T3" style:family="text">
      <style:text-properties officeooo:rsid="00159dd1"/>
    </style:style>
    <style:style style:name="T4" style:family="text">
      <style:text-properties style:font-name="monospace" fo:font-size="10pt" style:font-size-asian="10pt" style:font-size-complex="10pt"/>
    </style:style>
    <style:style style:name="T5" style:family="text">
      <style:text-properties style:font-name="monospace" fo:font-size="10pt" officeooo:rsid="001a05d4" style:font-size-asian="10pt" style:font-size-complex="10pt"/>
    </style:style>
    <style:style style:name="T6" style:family="text">
      <style:text-properties style:font-name="monospace" fo:font-size="10pt" officeooo:rsid="001c54f9" style:font-size-asian="10pt" style:font-size-complex="10pt"/>
    </style:style>
    <style:style style:name="T7" style:family="text">
      <style:text-properties style:font-name="monospace" fo:font-size="10pt" style:rfc-language-tag="ca-ES-valencia" fo:language="ca" fo:country="ES" style:font-size-asian="10pt" style:font-size-complex="10pt"/>
    </style:style>
    <style:style style:name="T8" style:family="text">
      <style:text-properties style:font-name="monospace" fo:font-size="10pt" style:rfc-language-tag="ca-ES-valencia" fo:language="ca" fo:country="ES" officeooo:rsid="001a05d4" style:font-size-asian="10pt" style:font-size-complex="10pt"/>
    </style:style>
    <style:style style:name="T9" style:family="text">
      <style:text-properties style:font-name="monospace" fo:font-size="10pt" style:rfc-language-tag="ca-ES-valencia" fo:language="ca" fo:country="ES" officeooo:rsid="0018d86b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288934" style:font-size-asian="10pt" style:font-size-complex="10pt"/>
    </style:style>
    <style:style style:name="T12" style:family="text">
      <style:text-properties fo:font-size="10pt" officeooo:rsid="002d8c95" style:font-size-asian="10pt" style:font-size-complex="10pt"/>
    </style:style>
    <style:style style:name="T13" style:family="text">
      <style:text-properties fo:font-size="10pt" officeooo:rsid="003054da" style:font-size-asian="10pt" style:font-size-complex="10pt"/>
    </style:style>
    <style:style style:name="T14" style:family="text">
      <style:text-properties fo:font-size="10pt" officeooo:rsid="00325014" style:font-size-asian="10pt" style:font-size-complex="10pt"/>
    </style:style>
    <style:style style:name="T15" style:family="text">
      <style:text-properties fo:color="#127622" loext:opacity="100%" fo:font-weight="bold" style:font-weight-asian="bold" style:font-weight-complex="bold"/>
    </style:style>
    <style:style style:name="T16" style:family="text">
      <style:text-properties style:rfc-language-tag="ca-ES-valencia" fo:language="ca" fo:country="ES"/>
    </style:style>
    <style:style style:name="T17" style:family="text">
      <style:text-properties officeooo:rsid="001a05d4"/>
    </style:style>
    <style:style style:name="T18" style:family="text">
      <style:text-properties fo:font-variant="normal" fo:text-transform="none" fo:color="#555555" loext:opacity="100%" style:font-name="Consolas1" fo:font-size="10.5pt" fo:letter-spacing="normal" fo:font-style="normal" fo:font-weight="normal" style:font-size-asian="10pt" style:font-size-complex="10pt"/>
    </style:style>
    <style:style style:name="T19" style:family="text">
      <style:text-properties fo:font-variant="normal" fo:text-transform="none" fo:color="#000080" loext:opacity="100%" style:font-name="Calibri" fo:font-size="10pt" fo:letter-spacing="normal" fo:language="en" fo:country="GB" fo:font-style="normal" style:text-underline-style="solid" style:text-underline-width="auto" style:text-underline-color="font-color" fo:font-weight="normal" fo:background-color="#ffffff" loext:char-shading-value="0" style:font-size-asian="10pt" style:font-size-complex="10pt" loext:padding="0cm" loext:border="none"/>
    </style:style>
    <style:style style:name="T20" style:family="text">
      <style:text-properties fo:font-variant="normal" fo:text-transform="none" style:font-name="Calibri" fo:font-size="10pt" fo:letter-spacing="normal" fo:language="en" fo:country="GB" fo:font-style="normal" style:text-underline-style="solid" style:text-underline-width="auto" style:text-underline-color="font-color" fo:font-weight="normal" fo:background-color="#ffffff" loext:char-shading-value="0" style:font-size-asian="10pt" style:font-size-complex="10pt" loext:padding="0cm" loext:border="none"/>
    </style:style>
    <style:style style:name="T21" style:family="text">
      <style:text-properties fo:font-variant="normal" fo:text-transform="none" style:use-window-font-color="true" loext:opacity="0%" style:font-name="Calibri" fo:font-size="10pt" fo:letter-spacing="normal" fo:language="en" fo:country="GB" fo:font-style="normal" style:text-underline-style="solid" style:text-underline-width="auto" style:text-underline-color="font-color" fo:font-weight="normal" fo:background-color="#ffffff" loext:char-shading-value="0" style:font-size-asian="10pt" style:font-size-complex="10pt" loext:padding="0cm" loext:border="none"/>
    </style:style>
    <style:style style:name="T22" style:family="text">
      <style:text-properties fo:font-variant="normal" fo:text-transform="none" style:use-window-font-color="true" loext:opacity="0%" style:font-name="Calibri" fo:font-size="10pt" fo:letter-spacing="normal" fo:language="en" fo:country="GB" fo:font-style="normal" fo:font-weight="normal" fo:background-color="#ffffff" loext:char-shading-value="0" style:font-size-asian="10pt" style:font-size-complex="10pt" loext:padding="0cm" loext:border="none"/>
    </style:style>
    <style:style style:name="T23" style:family="text">
      <style:text-properties fo:font-variant="normal" fo:text-transform="none" style:use-window-font-color="true" loext:opacity="0%" style:font-name="Calibri" fo:font-size="10pt" fo:letter-spacing="normal" fo:language="en" fo:country="GB" fo:font-style="normal" style:text-underline-style="none" fo:font-weight="normal" fo:background-color="#ffffff" loext:char-shading-value="0" style:font-size-asian="10pt" style:font-size-complex="10pt" loext:padding="0cm" loext:border="none"/>
    </style:style>
    <style:style style:name="T24" style:family="text">
      <style:text-properties fo:font-variant="normal" fo:text-transform="none" style:use-window-font-color="true" loext:opacity="0%" style:font-name="Calibri" fo:font-size="10pt" fo:letter-spacing="normal" fo:language="en" fo:country="GB" fo:font-style="normal" style:text-underline-style="none" fo:font-weight="normal" officeooo:rsid="00325014" fo:background-color="#ffffff" loext:char-shading-value="0" style:font-size-asian="10pt" style:font-size-complex="10pt" loext:padding="0cm" loext:border="none"/>
    </style:style>
    <style:style style:name="T25" style:family="text">
      <style:text-properties fo:color="#2a6099" loext:opacity="100%" style:font-name="monospace" fo:font-size="10pt" fo:font-weight="bold" style:font-size-asian="10pt" style:font-weight-asian="bold" style:font-size-complex="10pt" style:font-weight-complex="bold"/>
    </style:style>
    <style:style style:name="T26" style:family="text">
      <style:text-properties officeooo:rsid="001aa453"/>
    </style:style>
    <style:style style:name="T27" style:family="text">
      <style:text-properties style:font-name="Candara" fo:font-size="10pt" style:font-size-asian="10pt" style:font-size-complex="10pt"/>
    </style:style>
    <style:style style:name="T28" style:family="text">
      <style:text-properties officeooo:rsid="001f4c28"/>
    </style:style>
    <style:style style:name="T29" style:family="text">
      <style:text-properties officeooo:rsid="0020de72"/>
    </style:style>
    <style:style style:name="T30" style:family="text">
      <style:text-properties officeooo:rsid="002b338f"/>
    </style:style>
    <style:style style:name="T31" style:family="text">
      <style:text-properties officeooo:rsid="0032501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<text:span text:style-name="T3">Preparar maq virtual amb <text:s text:c="2"/></text:span>Kubuntu <text:s text:c="2"/>8 <text:span text:style-name="T3">GB</text:span> <text:s/>ram <text:s/></text:p>
      <text:p text:style-name="P6"/>
      <text:p text:style-name="P1"><text:span text:style-name="T16">documentació oficial <text:s/></text:span><text:a xlink:type="simple" xlink:href="https://www.elastic.co/guide/en/elasticsearch/reference/8.17/setup.html" text:style-name="Internet_20_link" text:visited-style-name="Visited_20_Internet_20_Link"><text:span text:style-name="T16">https://www.elastic.co/guide/en/elasticsearch/reference/8.17/setup.html</text:span></text:a><text:span text:style-name="T16"> </text:span></text:p>
      <text:p text:style-name="P39">sudo apt update</text:p>
      <text:p text:style-name="P6"/>
      <text:p text:style-name="P6">seguir comandos <text:span text:style-name="T3">de la documentació oficial</text:span></text:p>
      <text:p text:style-name="P7">Primer pas: <text:s/>instalar i configurar <text:s/>Elasticsearch</text:p>
      <text:p text:style-name="P7">Segon pas: instalar Kibana</text:p>
      <text:p text:style-name="P7">Tercer pas: <text:s/>instalar i configurar <text:s/>Logstash</text:p>
      <text:p text:style-name="P7">Quart pas: <text:s/>instalar i configurar <text:s/>Filebeat</text:p>
      <text:p text:style-name="P7">Cinqué pas: Explorar els panells de Kibana</text:p>
      <text:p text:style-name="P6"/>
      <text:p text:style-name="P19">1. Instalar elasticsearch en debian</text:p>
      <text:p text:style-name="P1"><text:a xlink:type="simple" xlink:href="https://www.elastic.co/guide/en/elasticsearch/reference/8.17/deb.html" text:style-name="Internet_20_link" text:visited-style-name="Visited_20_Internet_20_Link"><text:span text:style-name="T16">https://www.elastic.co/guide/en/elasticsearch/reference/8.17/deb.html</text:span></text:a></text:p>
      <text:p text:style-name="P39">wget -qO - https://artifacts.elastic.co/GPG-KEY-elasticsearch | sudo gpg --dearmor -o /usr/share/keyrings/elasticsearch-keyring.gpg</text:p>
      <text:p text:style-name="P39"/>
      <text:p text:style-name="P39">sudo apt-get install apt-transport-https</text:p>
      <text:p text:style-name="P39"/>
      <text:p text:style-name="P39">echo "deb [signed-by=/usr/share/keyrings/elasticsearch-keyring.gpg] https://artifacts.elastic.co/packages/8.x/apt stable main" | sudo tee /etc/apt/sources.list.d/elastic-8.x.list</text:p>
      <text:p text:style-name="P39"/>
      <text:p text:style-name="P39">sudo apt-get update &amp;&amp; sudo apt-get install elasticsearch</text:p>
      <text:p text:style-name="P39"/>
      <text:p text:style-name="P9">En cada instalació ens dona una password inicial ( que deprés podrem canviar )</text:p>
      <text:p text:style-name="P40">============================================================================</text:p>
      <text:p text:style-name="P40">Authentication and authorization are enabled. <text:line-break/>TLS for the transport and HTTP layers is enabled and configured. <text:line-break/><text:line-break/>The generated password for the elastic built-in superuser is : <text:span text:style-name="T15">zoqrjUyi_NDO3UgVhOJT </text:span><text:line-break/><text:line-break/>If this node should join an existing cluster, you can reconfigure this with <text:line-break/>'/usr/share/elasticsearch/bin/elasticsearch-reconfigure-node --enrollment-token &lt;token-here&gt;' <text:line-break/>after creating an enrollment token on your existing cluster. <text:line-break/><text:line-break/>You can complete the following actions at any time: <text:line-break/><text:line-break/>Reset the password of the elastic built-in superuser with  <text:line-break/>'/usr/share/elasticsearch/bin/elasticsearch-reset-password -u elastic'. <text:line-break/><text:line-break/>Generate an enrollment token for Kibana instances with  <text:line-break/>'/usr/share/elasticsearch/bin/elasticsearch-create-enrollment-token -s kibana'. <text:line-break/><text:line-break/>Generate an enrollment token for Elasticsearch nodes with  <text:line-break/>'/usr/share/elasticsearch/bin/elasticsearch-create-enrollment-token -s node'. <text:line-break/><text:line-break/>------------------------------------------------------------------------------------------------- <text:line-break/>### NOT starting on installation, please execute the following statements to configure elasticsearch service t<text:line-break/>o start automatically using systemd <text:line-break/>sudo systemctl daemon-reload <text:line-break/>sudo systemctl enable elasticsearch.service <text:line-break/>### You can start elasticsearch service by executing <text:line-break/>sudo systemctl start elasticsearch.service<text:line-break/>============================================================================</text:p>
      <text:p text:style-name="P39"/>
      <text:p text:style-name="P39"/>
      <text:p text:style-name="P10"><text:span text:style-name="T3">en este </text:span><text:s/>pas cal sudo</text:p>
      <text:p text:style-name="P10"><text:span text:style-name="T1">sudo </text:span>curl --cacert /etc/elasticsearch/certs/http_ca.crt -u elastic:$ELASTIC_PASSWORD https://localhost:9200 </text:p>
      <text:p text:style-name="P10"/>
      <text:p text:style-name="P11"/>
      <text:p text:style-name="P8">estos també en sudo</text:p>
      <text:p text:style-name="P8"><text:span text:style-name="T1">sudo</text:span> bin/elasticsearch-keystore show xpack.security.http.ssl.keystore.secure_password</text:p>
      <text:p text:style-name="P8"><text:soft-page-break/><text:span text:style-name="T1">sudo</text:span> bin/elasticsearch-keystore show xpack.security.transport.ssl.keystore.secure_password</text:p>
      <text:p text:style-name="P8"/>
      <text:p text:style-name="P21"><text:span text:style-name="T3">el path <text:s/></text:span><text:span text:style-name="T28">per posar davant de bin <text:s text:c="2"/></text:span><text:span text:style-name="T3">es pot buscar amb <text:s/></text:span></text:p>
      <text:p text:style-name="P21"><text:span text:style-name="T2">find / -name elasticsearch-keystore 2&gt;/dev/null</text:span><text:span text:style-name="T4"><text:line-break/></text:span></text:p>
      <text:p text:style-name="P21"><text:span text:style-name="T4"/></text:p>
      <text:p text:style-name="P12"><text:span text:style-name="T4">obrir navegador amb </text:span><text:a xlink:type="simple" xlink:href="https://localhost:9200/" text:style-name="Internet_20_link" text:visited-style-name="Visited_20_Internet_20_Link"><text:span text:style-name="T4">https://localhost:9200</text:span></text:a></text:p>
      <text:p text:style-name="P41">usuari elastic, <text:s/>password , la que ens ha donat la instal·lació.</text:p>
      <text:p text:style-name="P15"><text:span text:style-name="T4"/></text:p>
      <text:p text:style-name="P8"/>
      <text:p text:style-name="P8">Configurar elasticsearch</text:p>
      <text:p text:style-name="P3"><text:a xlink:type="simple" xlink:href="https://www.elastic.co/guide/en/elasticsearch/reference/8.17/settings.html" text:style-name="Internet_20_link" text:visited-style-name="Visited_20_Internet_20_Link"><text:span text:style-name="T16">https://www.elastic.co/guide/en/elasticsearch/reference/8.17/settings.html</text:span></text:a></text:p>
      <text:p text:style-name="P8"/>
      <text:p text:style-name="P23">(per fer )</text:p>
      <text:p text:style-name="P23">/<text:span text:style-name="T30">etc/elasticsearch/elasticsearch.yml</text:span></text:p>
      <text:p text:style-name="P24">network.host:</text:p>
      <text:p text:style-name="P8"/>
      <text:p text:style-name="P8"/>
      <text:p text:style-name="P20"><text:span text:style-name="T29">2. </text:span>Instalar Kibana</text:p>
      <text:p text:style-name="P4"><text:a xlink:type="simple" xlink:href="https://www.elastic.co/guide/en/kibana/current/install.html" text:style-name="Internet_20_link" text:visited-style-name="Visited_20_Internet_20_Link"><text:span text:style-name="T16">https://www.elastic.co/guide/en/kibana/current/install.html</text:span></text:a></text:p>
      <text:p text:style-name="P7"/>
      <text:p text:style-name="P12">Si ja hem instal·lat elasticsearch, no cal fer els tres primers, <text:s text:c="2"/>anem directament a </text:p>
      <text:p text:style-name="P12"/>
      <text:p text:style-name="P2">sudo apt-get update &amp;&amp; sudo apt-get install kibana</text:p>
      <text:p text:style-name="P12"/>
      <text:p text:style-name="P12">este pas amb sudo <text:s/><text:span text:style-name="T17">(crea token per després unirse a elasticsearch )</text:span></text:p>
      <text:p text:style-name="P2"><text:span text:style-name="T1">sudo</text:span> /usr/share/elasticsearch/bin/elasticsearch-create-enrollment-token -s kibana</text:p>
      <text:p text:style-name="P12"/>
      <text:p text:style-name="P13"><text:span text:style-name="T5">per </text:span><text:span text:style-name="T4">obrir navegador </text:span></text:p>
      <text:p text:style-name="P25"><text:span text:style-name="T8">executar <text:s/></text:span><text:span text:style-name="T18">journalctl -u kibana.service</text:span><text:span text:style-name="T4"> </text:span></text:p>
      <text:p text:style-name="P42">i en la última linia <text:s/></text:p>
      <text:p text:style-name="P26"><text:span text:style-name="T7"><text:s text:c="2"/></text:span><text:span text:style-name="T9">amb </text:span><text:a xlink:type="simple" xlink:href="http://localhost:5601/?code=673066" text:style-name="Internet_20_link" text:visited-style-name="Visited_20_Internet_20_Link"><text:span text:style-name="T9">http://localhost:5601/?code=673066</text:span></text:a><text:span text:style-name="T9"> <text:s/></text:span><text:span text:style-name="T7">( o el que pose ahi)</text:span></text:p>
      <text:p text:style-name="P26"><text:span text:style-name="T7"/></text:p>
      <text:p text:style-name="P42">Ens demana el token en una finestra..</text:p>
      <text:p text:style-name="P42">el posem....</text:p>
      <text:p text:style-name="P16"><text:span text:style-name="T4">botó </text:span><text:span text:style-name="T25">configure elastic</text:span><text:span text:style-name="T4"> <text:s text:c="2"/></text:span></text:p>
      <text:p text:style-name="P42">ara ens demana usuari i password <text:s/>(elastic, i la primera passwd)</text:p>
      <text:p text:style-name="P16"><text:span text:style-name="T4"/></text:p>
      <text:p text:style-name="P42">pulsem el botó </text:p>
      <text:p text:style-name="P16"><draw:frame draw:style-name="fr2" draw:name="Imagen1" text:anchor-type="char" svg:x="3.224cm" svg:y="0.132cm" svg:width="3.722cm" svg:height="1.376cm" draw:z-index="0"><draw:image xlink:href="Pictures/10000000000000D30000004E7E94C193.png" xlink:type="simple" xlink:show="embed" xlink:actuate="onLoad" draw:mime-type="image/png"/></draw:frame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20"><text:span text:style-name="T29">3. </text:span>Instalar <text:span text:style-name="T26">Logstash</text:span></text:p>
      <text:p text:style-name="P7"><text:a xlink:type="simple" xlink:href="https://www.elastic.co/guide/en/logstash/current/installing-logstash.html" text:style-name="Internet_20_link" text:visited-style-name="Visited_20_Internet_20_Link">https://www.elastic.co/guide/en/logstash/current/installing-logstash.html</text:a></text:p>
      <text:p text:style-name="P14">Si ja hem instal·lat elasticsearch, no cal fer els tres primers</text:p>
      <text:p text:style-name="P14">anem directament a </text:p>
      <text:p text:style-name="P18">Instal·lar</text:p>
      <text:p text:style-name="P42">sudo apt-get update &amp;&amp; sudo apt-get install logstash</text:p>
      <text:p text:style-name="P18">Arrancar</text:p>
      <text:p text:style-name="P42">sudo systemctl start logstash.service</text:p>
      <text:p text:style-name="P18">Parar</text:p>
      <text:p text:style-name="P17"><text:span text:style-name="T4">sudo systemctl st</text:span><text:span text:style-name="T6">op</text:span><text:span text:style-name="T4"> logstash.service</text:span></text:p>
      <text:p text:style-name="P22"><text:span text:style-name="T4"/></text:p>
      <text:p text:style-name="P29"><text:span text:style-name="T10"/></text:p>
      <text:p text:style-name="P34"><text:soft-page-break/>Recursos</text:p>
      <text:p text:style-name="P18"><text:a xlink:type="simple" xlink:href="https://www.guru99.com/es/elk-stack-tutorial.html" text:style-name="Internet_20_link" text:visited-style-name="Visited_20_Internet_20_Link"><text:span text:style-name="T27">https://www.guru99.com/es/elk-stack-tutorial.html</text:span></text:a></text:p>
      <text:p text:style-name="P27"><text:span text:style-name="T10"/></text:p>
      <text:p text:style-name="P34">ELK vs <text:s/>Elastic Stack</text:p>
      <text:p text:style-name="P27"><text:span text:style-name="T10"/></text:p>
      <text:p text:style-name="P38">ELK</text:p>
      <text:p text:style-name="P27"><text:span text:style-name="T10"/></text:p>
      <text:p text:style-name="P27"><draw:frame draw:style-name="fr1" draw:name="Imagen2" text:anchor-type="char" svg:width="17cm" svg:height="5.567cm" draw:z-index="1"><draw:image xlink:href="Pictures/100000000000052A000001B16AC240B0.png" xlink:type="simple" xlink:show="embed" xlink:actuate="onLoad" draw:mime-type="image/png"/></draw:frame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38">Elastic Stack</text:p>
      <text:p text:style-name="P27"><draw:frame draw:style-name="fr2" draw:name="Imagen3" text:anchor-type="char" svg:x="0cm" svg:y="0.081cm" svg:width="17cm" svg:height="4.404cm" draw:z-index="2"><draw:image xlink:href="Pictures/10000000000004EE00000147BBFC5676.png" xlink:type="simple" xlink:show="embed" xlink:actuate="onLoad" draw:mime-type="image/png"/></draw:frame><text:span text:style-name="T10"/></text:p>
      <text:p text:style-name="P35">Per a grans quantitats de dades</text:p>
      <text:p text:style-name="P28"><draw:frame draw:style-name="fr1" draw:name="Imagen4" text:anchor-type="char" svg:width="17cm" svg:height="3.939cm" draw:z-index="3"><draw:image xlink:href="Pictures/10000000000005200000013059BE7DDF.png" xlink:type="simple" xlink:show="embed" xlink:actuate="onLoad" draw:mime-type="image/png"/></draw:frame><text:span text:style-name="T10"/></text:p>
      <text:p text:style-name="P27"><text:span text:style-name="T10"/></text:p>
      <text:p text:style-name="P27"><text:span text:style-name="T10"/></text:p>
      <text:p text:style-name="P36">Recursos <text:s/>Installing the Elastic Stack. <text:span text:style-name="T31">Docum oficial</text:span></text:p>
      <text:p text:style-name="P44"><text:a xlink:type="simple" xlink:href="https://www.elastic.co/guide/en/elastic-stack/current/installing-elastic-stack.html" text:style-name="Internet_20_link" text:visited-style-name="Visited_20_Internet_20_Link"><text:span text:style-name="T19">https://www.elastic.co/guide/en/elastic-stack/current/installing-elastic-stack.html</text:span></text:a></text:p>
      <text:p text:style-name="P44"><text:span text:style-name="T23">Empezamos con Elastic Stack: Instalación y primeros pasos con ElasticSearch y Kibana. </text:span><text:span text:style-name="T24">2019</text:span></text:p>
      <text:p text:style-name="P44"><text:a xlink:type="simple" xlink:href="https://www.youtube.com/watch?v=7i9VRJoeoOg" text:style-name="Internet_20_link" text:visited-style-name="Visited_20_Internet_20_Link"><text:span text:style-name="T19">https://www.youtube.com/watch?v=7i9VRJoeoOg</text:span></text:a></text:p>
      <text:p text:style-name="P43"><text:span text:style-name="T10">Selecciona un Beat. Cualquier Beat</text:span></text:p>
      <text:p text:style-name="P43"><text:a xlink:type="simple" xlink:href="https://www.elastic.co/es/downloads/beats" text:style-name="Internet_20_link" text:visited-style-name="Visited_20_Internet_20_Link"><text:span text:style-name="T10">https://www.elastic.co/es/downloads/beats</text:span></text:a></text:p>
      <text:p text:style-name="P43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48"><text:soft-page-break/><text:span text:style-name="T10">Logstash <text:s text:c="2"/></text:span></text:p>
      <text:p text:style-name="P48"><text:span text:style-name="T10">QUÉ es LOGSTASH, CÓMO INSTALARLO | DOS EJEMPLOS PRACTICOS </text:span><text:span text:style-name="T14">2020</text:span></text:p>
      <text:p text:style-name="P30"><text:a xlink:type="simple" xlink:href="https://www.youtube.com/watch?v=ENWa_KnJahY" text:style-name="Internet_20_link" text:visited-style-name="Visited_20_Internet_20_Link"><text:span text:style-name="T10">https://www.youtube.com/watch?v=ENWa_KnJahY</text:span></text:a></text:p>
      <text:p text:style-name="P30"><text:a xlink:type="simple" xlink:href="https://davinciti.com/que-es-logstash-ejemplo-practico-de-uso/" text:style-name="Internet_20_link" text:visited-style-name="Visited_20_Internet_20_Link"><text:span text:style-name="T10">https://davinciti.com/que-es-logstash-ejemplo-practico-de-uso/</text:span></text:a></text:p>
      <text:p text:style-name="P30"><text:span text:style-name="T10">Explorando Logstash y Beats en el Elastic Stack. <text:s text:c="2"/></text:span><text:span text:style-name="T14">2021. <text:s/>1h22m</text:span></text:p>
      <text:p text:style-name="P30"><text:a xlink:type="simple" xlink:href="https://www.youtube.com/watch?v=DKHyZoMJmi8" text:style-name="Internet_20_link" text:visited-style-name="Visited_20_Internet_20_Link"><text:span text:style-name="T10">https://www.youtube.com/watch?v=DKHyZoMJmi8</text:span></text:a></text:p>
      <text:p text:style-name="P30"><text:span text:style-name="T10">/</text:span><text:span text:style-name="T11">etc/logstash/conf.d</text:span></text:p>
      <text:p text:style-name="P30"><text:span text:style-name="T10"/></text:p>
      <text:p text:style-name="P33"><text:span text:style-name="T10">auditbeat <text:s text:c="2"/>(configurar un audit beat ) <text:s/></text:span><text:span text:style-name="T12">paso a paso <text:s/>1h16m</text:span></text:p>
      <text:p text:style-name="P33"><text:a xlink:type="simple" xlink:href="https://www.youtube.com/watch?v=4H054E7FBuI" text:style-name="Internet_20_link" text:visited-style-name="Visited_20_Internet_20_Link"><text:span text:style-name="T10">https://www.youtube.com/watch?v=4H054E7FBuI</text:span></text:a></text:p>
      <text:p text:style-name="P33"><text:span text:style-name="T10">Implementar ELASTIC SIEM, Instalar BEATS y comenzar el monitoreo y detección de ataques y amenazas</text:span></text:p>
      <text:p text:style-name="P33"><text:span text:style-name="T10"/></text:p>
      <text:p text:style-name="P33"><text:span text:style-name="T10"/></text:p>
      <text:p text:style-name="P37">filebeat <text:s/></text:p>
      <text:p text:style-name="P31"><text:a xlink:type="simple" xlink:href="https://www.youtube.com/watch?v=q8z4BgWQc2g" text:style-name="Internet_20_link" text:visited-style-name="Visited_20_Internet_20_Link"><text:span text:style-name="T10">https://www.youtube.com/watch?v=q8z4BgWQc2g</text:span></text:a></text:p>
      <text:p text:style-name="P37">/etc/filebeat</text:p>
      <text:p text:style-name="P37">filebeat.yml</text:p>
      <text:p text:style-name="P31"><text:a xlink:type="simple" xlink:href="https://davinciti.com/beats-elastic-ejemplo-filebeat/" text:style-name="Internet_20_link" text:visited-style-name="Visited_20_Internet_20_Link"><text:span text:style-name="T10">https://davinciti.com/beats-elastic-ejemplo-filebeat/</text:span></text:a></text:p>
      <text:p text:style-name="P31"><text:span text:style-name="T10"/></text:p>
      <text:p text:style-name="P31"><text:a xlink:type="simple" xlink:href="https://www.youtube.com/watch?v=kwpTEyqELKA" text:style-name="Internet_20_link" text:visited-style-name="Visited_20_Internet_20_Link"><text:span text:style-name="T10">https://www.youtube.com/watch?v=kwpTEyqELKA</text:span></text:a><text:span text:style-name="T10"> <text:s/></text:span><text:span text:style-name="T11">(parla super lento)</text:span></text:p>
      <text:p text:style-name="P31"><text:span text:style-name="T11"/></text:p>
      <text:p text:style-name="P31"><text:a xlink:type="simple" xlink:href="https://www.youtube.com/watch?v=j_oT0h4JUvY" text:style-name="Internet_20_link" text:visited-style-name="Visited_20_Internet_20_Link"><text:span text:style-name="T10">https://www.youtube.com/watch?v=j_oT0h4JUvY</text:span></text:a></text:p>
      <text:p text:style-name="P31"><text:span text:style-name="T10"/></text:p>
      <text:p text:style-name="P31"><text:span text:style-name="T10"/></text:p>
      <text:p text:style-name="P31"><text:a xlink:type="simple" xlink:href="https://www.youtube.com/watch?v=BchObcz__Z4" text:style-name="Internet_20_link" text:visited-style-name="Visited_20_Internet_20_Link"><text:span text:style-name="T10">https://www.youtube.com/watch?v=BchObcz__Z4</text:span></text:a></text:p>
      <text:p text:style-name="P31"><text:span text:style-name="T10"/></text:p>
      <text:p text:style-name="P31"><text:span text:style-name="T10"/></text:p>
      <text:p text:style-name="P32"><text:span text:style-name="T12">Detección y respuesta a incidentes con Elasticsearch <text:s/></text:span><text:span text:style-name="T13">1h14m</text:span></text:p>
      <text:p text:style-name="P32"><text:a xlink:type="simple" xlink:href="https://www.youtube.com/watch?v=k4RbKvKCZhE" text:style-name="Internet_20_link" text:visited-style-name="Visited_20_Internet_20_Link"><text:span text:style-name="T10">https://www.youtube.com/watch?v=k4RbKvKCZhE</text:span></text:a></text:p>
      <text:p text:style-name="P32"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Consolas" svg:font-family="Consolas" style:font-family-generic="modern" style:font-pitch="fixed"/>
    <style:font-face style:name="Consolas1" svg:font-family="Consolas, Menlo, 'DejaVu Sans Mono', 'Bitstream Vera Sans Mono', 'Lucida Console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4T12:42:12.666000000</meta:creation-date>
    <dc:date>2024-12-17T08:04:19.911000000</dc:date>
    <meta:editing-duration>PT4H18M44S</meta:editing-duration>
    <meta:editing-cycles>25</meta:editing-cycles>
    <meta:generator>LibreOffice/24.2.6.2$Windows_X86_64 LibreOffice_project/ef66aa7e36a1bb8e65bfbc63aba53045a14d0871</meta:generator>
    <meta:document-statistic meta:table-count="0" meta:image-count="4" meta:object-count="0" meta:page-count="4" meta:paragraph-count="89" meta:word-count="543" meta:character-count="5488" meta:non-whitespace-character-count="4951"/>
  </office:meta>
</office:document-meta>
</file>