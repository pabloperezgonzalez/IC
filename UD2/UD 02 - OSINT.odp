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1F6C62EE.png" manifest:media-type="image/png"/>
  <manifest:file-entry manifest:full-path="Pictures/100000000000020E000001B4494AA734.png" manifest:media-type="image/png"/>
  <manifest:file-entry manifest:full-path="Pictures/100000000000034A0000016CB9F8E87C.png" manifest:media-type="image/png"/>
  <manifest:file-entry manifest:full-path="Pictures/100000000000057300000263B18964A5.png" manifest:media-type="image/png"/>
  <manifest:file-entry manifest:full-path="Pictures/100000000000046D000000BBA7475E87.png" manifest:media-type="image/png"/>
  <manifest:file-entry manifest:full-path="Pictures/1000000000000333000002AF9CC6B171.png" manifest:media-type="image/png"/>
  <manifest:file-entry manifest:full-path="Pictures/10000000000005C400000208807408BB.png" manifest:media-type="image/png"/>
  <manifest:file-entry manifest:full-path="Pictures/100000000000035B000001D316C9DE52.png" manifest:media-type="image/png"/>
  <manifest:file-entry manifest:full-path="Pictures/10000000000001F8000000FF02D6F0CA.png" manifest:media-type="image/png"/>
  <manifest:file-entry manifest:full-path="Pictures/100000000000016E000000F8C4128BD8.png" manifest:media-type="image/png"/>
  <manifest:file-entry manifest:full-path="Pictures/10000000000002BB0000011A44750DE9.png" manifest:media-type="image/png"/>
  <manifest:file-entry manifest:full-path="Pictures/10000000000004DF000001A91EEB2DA8.png" manifest:media-type="image/png"/>
  <manifest:file-entry manifest:full-path="Pictures/10000000000004DB000002206A27347F.png" manifest:media-type="image/png"/>
  <manifest:file-entry manifest:full-path="Pictures/100000000000028B00000094750068BC.png" manifest:media-type="image/png"/>
  <manifest:file-entry manifest:full-path="Pictures/100000000000033B0000008F97FCD732.png" manifest:media-type="image/png"/>
  <manifest:file-entry manifest:full-path="Pictures/100000000000039C0000024309566E50.png" manifest:media-type="image/png"/>
  <manifest:file-entry manifest:full-path="Pictures/10000000000003130000029359FE9410.png" manifest:media-type="image/png"/>
  <manifest:file-entry manifest:full-path="Pictures/10000000000003D600000244EE4E41B3.png" manifest:media-type="image/png"/>
  <manifest:file-entry manifest:full-path="Pictures/100000000000019D000002733F9FB7FC.png" manifest:media-type="image/png"/>
  <manifest:file-entry manifest:full-path="Pictures/10000000000001F700000287BF6FD182.png" manifest:media-type="image/png"/>
  <manifest:file-entry manifest:full-path="Pictures/10000000000003B1000002695B3D5307.png" manifest:media-type="image/png"/>
  <manifest:file-entry manifest:full-path="Pictures/100000000000017F00000079231442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P6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.035cm" fo:margin-right="0.014cm" fo:margin-top="0.034cm" fo:margin-bottom="0cm" fo:line-height="100%" fo:text-align="center" fo:text-indent="1.18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</style:style>
    <style:style style:name="P12" style:family="paragraph">
      <loext:graphic-properties draw:fill-color="#ffffff"/>
    </style:style>
    <style:style style:name="P13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/>
    </style:style>
    <style:style style:name="P14" style:family="paragraph">
      <style:paragraph-properties fo:margin-left="0.169cm" fo:margin-right="0.155cm" fo:margin-top="0.034cm" fo:margin-bottom="0cm" fo:line-height="100%" fo:text-align="start" fo:text-indent="0cm"/>
      <style:text-properties fo:font-size="18pt"/>
    </style:style>
    <style:style style:name="P15" style:family="paragraph">
      <style:paragraph-properties fo:margin-left="0.169cm" fo:margin-right="0.155cm" fo:margin-top="0.002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style:text-properties style:font-name="Consolas" fo:font-size="13pt" style:font-size-asian="13pt" style:font-size-complex="13pt"/>
    </style:style>
    <style:style style:name="P20" style:family="paragraph">
      <loext:graphic-properties draw:fill="none" draw:fill-color="#ffffff"/>
      <style:text-properties style:font-name="Consolas" fo:font-size="13pt" style:font-size-asian="13pt" style:font-size-complex="13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9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8pt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12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16pt" fo:font-style="normal" style:text-underline-style="none" fo:font-weight="bold" fo:background-color="transparent" style:font-size-asian="16pt" style:font-style-asian="normal" style:font-weight-asian="bold" style:font-name-complex="Calibri" style:font-size-complex="16pt" style:font-style-complex="normal" style:font-weight-complex="bold"/>
    </style:style>
    <style:style style:name="T13" style:family="text">
      <style:text-properties fo:color="#001f5f" loext:opacity="100%" style:font-name="Calibri" fo:font-size="16pt" fo:font-weight="bold" style:font-size-asian="16pt" style:font-weight-asian="bold" style:font-name-complex="Calibri" style:font-size-complex="16pt" style:font-weight-complex="bold"/>
    </style:style>
    <style:style style:name="T14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Calibri" style:font-size-complex="27.5pt" style:font-style-complex="normal" style:font-weight-complex="normal"/>
    </style:style>
    <style:style style:name="T15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7.5pt" fo:letter-spacing="normal" fo:font-style="normal" style:text-underline-style="none" fo:font-weight="bold" fo:background-color="transparent" style:font-size-asian="27.5pt" style:font-style-asian="normal" style:font-weight-asian="bold" style:font-name-complex="Calibri" style:font-size-complex="27.5pt" style:font-style-complex="normal" style:font-weight-complex="bold"/>
    </style:style>
    <style:style style:name="T16" style:family="text">
      <style:text-properties style:font-name="Consola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1f5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478cm" svg:y="0.644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6" draw:layer="layout" svg:width="3.67cm" svg:height="1.73cm" svg:x="20.959cm" svg:y="0.569cm">
          <text:p text:style-name="P4"><text:span text:style-name="T1">CURS</text:span><text:span text:style-name="T6"> 23</text:span><text:span text:style-name="T7">/24</text:span></text:p>
          <text:p text:style-name="P5"><text:span text:style-name="T7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8" draw:layer="layout" svg:width="19.5cm" svg:height="3.455cm" svg:x="2.5cm" svg:y="3.328cm">
          <text:p text:style-name="P7"><text:span text:style-name="T8">OSINT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269cm" svg:height="1.881cm" svg:x="0.733cm" svg:y="0.678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5" draw:text-style-name="P11" draw:layer="layout" svg:width="21.5cm" svg:height="6.65cm" svg:x="2cm" svg:y="5.5cm">
          <draw:text-box>
            <text:p text:style-name="P10">Open-Source Intelligence (OSINT) is defined as intelligence produced by collecting, evaluating and analyzing <text:span text:style-name="T10">publicly available information</text:span> with the purpose of answering a specific intelligence question</text:p>
            <text:p text:style-name="P10"/>
            <text:p text:style-name="P10">It's important to note that information does not equal intelligence. Without <text:span text:style-name="T10">giving meaning to the data</text:span> we collect, open-source findings are considered raw data. It is only once this information is looked at from a critical thinking mindset and analyzed that it becomes intelligence</text:p>
            <text:p text:style-name="P10"/>
          </draw:text-box>
        </draw:frame>
        <draw:frame draw:style-name="gr4" draw:text-style-name="P9" draw:layer="layout" svg:width="14.851cm" svg:height="6.419cm" svg:x="5.649cm" svg:y="12.5cm">
          <draw:image xlink:href="Pictures/100000000000034A0000016CB9F8E87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4" draw:style-name="gr7" draw:text-style-name="P16" draw:layer="layout" svg:width="21.5cm" svg:height="13.367cm" svg:x="1.5cm" svg:y="4cm">
          <text:list text:style-name="L4">
            <text:list-item>
              <text:p text:style-name="P13"><text:span text:style-name="T11">Information archiving <text:s/></text:span><text:span text:style-name="T12">(WayBack Machine, ..</text:span></text:p>
            </text:list-item>
            <text:list-item>
              <text:p text:style-name="P14"><text:span text:style-name="T11">Metadata <text:s/></text:span><text:span text:style-name="T13">(Exiftool, FOCA, ..</text:span></text:p>
            </text:list-item>
            <text:list-item>
              <text:p text:style-name="P14"><text:span text:style-name="T11">Information format / nature </text:span><text:span text:style-name="T13">(ASCII, json, XML, ..</text:span></text:p>
            </text:list-item>
            <text:list-item>
              <text:p text:style-name="P13"><text:span text:style-name="T11">Dorks</text:span></text:p>
            </text:list-item>
            <text:list-item>
              <text:p text:style-name="P14"><text:span text:style-name="T11">Image search engines <text:s/></text:span><text:span text:style-name="T13">(+ GPS coordinates,…</text:span></text:p>
            </text:list-item>
            <text:list-item>
              <text:p text:style-name="P14"><text:span text:style-name="T11">Wi-Fi finders <text:s/></text:span><text:span text:style-name="T13">(wigle.net, ...</text:span></text:p>
            </text:list-item>
            <text:list-item>
              <text:p text:style-name="P14"><text:span text:style-name="T11">Search engines on social networks <text:s/></text:span><text:span text:style-name="T13">(sherlock, ..</text:span></text:p>
            </text:list-item>
            <text:list-item>
              <text:p text:style-name="P14"><text:span text:style-name="T11">Technological search engines <text:s/></text:span><text:span text:style-name="T13">(Shodan, ..</text:span></text:p>
            </text:list-item>
            <text:list-item>
              <text:p text:style-name="P13"><text:span text:style-name="T11">IP location </text:span></text:p>
            </text:list-item>
            <text:list-item>
              <text:p text:style-name="P13"><text:span text:style-name="T11">and more ………..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office:forms form:automatic-focus="false" form:apply-design-mode="false"/>
        <draw:custom-shape draw:name="object 1" draw:style-name="gr8" draw:text-style-name="P16" draw:layer="layout" svg:width="21.5cm" svg:height="13.223cm" svg:x="1.5cm" svg:y="4cm">
          <text:list text:style-name="L4">
            <text:list-item>
              <text:p text:style-name="P13"><text:span text:style-name="T11">OCR tools </text:span><text:span text:style-name="T12">.</text:span></text:p>
            </text:list-item>
            <text:list-item>
              <text:p text:style-name="P14"><text:span text:style-name="T11">Speech Recognition</text:span><text:span text:style-name="T13">.</text:span></text:p>
            </text:list-item>
            <text:list-item>
              <text:p text:style-name="P14"><text:span text:style-name="T15">Phonerator</text:span></text:p>
            </text:list-item>
            <text:list-item>
              <text:p text:style-name="P14"><text:span text:style-name="T15">Torch <text:s/>( deep web searching )</text:span></text:p>
            </text:list-item>
            <text:list-item>
              <text:p text:style-name="P14"><text:span text:style-name="T15">OSRFramework - Mailfy, usufy, searchfy, domainfy</text:span></text:p>
            </text:list-item>
            <text:list-item>
              <text:p text:style-name="P14"><text:span text:style-name="T15">Shadow simulator (hourly)</text:span></text:p>
            </text:list-item>
            <text:list-item>
              <text:p text:style-name="P14"><text:span text:style-name="T15">Make / Model Recognition (car registration)</text:span></text:p>
            </text:list-item>
            <text:list-item>
              <text:p text:style-name="P14"><text:span text:style-name="T15">County / City / State Recognition (car registration)</text:span></text:p>
            </text:list-item>
            <text:list-item>
              <text:p text:style-name="P14"><text:span text:style-name="T15">Dns recognition tools </text:span></text:p>
            </text:list-item>
            <text:list-item>
              <text:p text:style-name="P14"><text:span text:style-name="T15">Leak tools</text:span></text:p>
            </text:list-item>
            <text:list-item>
              <text:p text:style-name="P14"><text:span text:style-name="T1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19.984cm" svg:height="3.297cm" svg:x="1.5cm" svg:y="3.203cm">
          <draw:image xlink:href="Pictures/100000000000046D000000BBA7475E87.png" xlink:type="simple" xlink:show="embed" xlink:actuate="onLoad" draw:mime-type="image/png">
            <text:p/>
          </draw:image>
        </draw:frame>
        <draw:frame draw:style-name="gr4" draw:text-style-name="P9" draw:layer="layout" svg:width="23.839cm" svg:height="8.397cm" svg:x="0.5cm" svg:y="7.603cm">
          <draw:image xlink:href="Pictures/10000000000005C400000208807408B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8.889cm" svg:height="4.497cm" svg:x="1.5cm" svg:y="3cm">
          <draw:image xlink:href="Pictures/10000000000001F8000000FF02D6F0CA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6.251cm" svg:x="1.5cm" svg:y="10.749cm">
          <draw:image xlink:href="Pictures/100000000000035B000001D316C9DE52.png" xlink:type="simple" xlink:show="embed" xlink:actuate="onLoad" draw:mime-type="image/png">
            <text:p/>
          </draw:image>
        </draw:frame>
        <draw:frame draw:style-name="gr4" draw:text-style-name="P9" draw:layer="layout" svg:width="11.474cm" svg:height="9.625cm" svg:x="13.526cm" svg:y="7.5cm">
          <draw:image xlink:href="Pictures/1000000000000333000002AF9CC6B171.png" xlink:type="simple" xlink:show="embed" xlink:actuate="onLoad" draw:mime-type="image/png">
            <text:p/>
          </draw:image>
        </draw:frame>
        <draw:frame draw:style-name="gr4" draw:text-style-name="P9" draw:layer="layout" svg:width="6cm" svg:height="4.065cm" svg:x="11.5cm" svg:y="2.935cm">
          <draw:image xlink:href="Pictures/100000000000016E000000F8C4128BD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8.829cm" svg:height="3.561cm" svg:x="1.171cm" svg:y="4cm">
          <draw:image xlink:href="Pictures/10000000000002BB0000011A44750DE9.png" xlink:type="simple" xlink:show="embed" xlink:actuate="onLoad" draw:mime-type="image/png">
            <text:p/>
          </draw:image>
        </draw:frame>
        <draw:frame draw:style-name="gr4" draw:text-style-name="P9" draw:layer="layout" svg:width="12.5cm" svg:height="4.259cm" svg:x="1.5cm" svg:y="11cm">
          <draw:image xlink:href="Pictures/10000000000004DF000001A91EEB2DA8.png" xlink:type="simple" xlink:show="embed" xlink:actuate="onLoad" draw:mime-type="image/png">
            <text:p/>
          </draw:image>
        </draw:frame>
        <draw:frame draw:style-name="gr4" draw:text-style-name="P9" draw:layer="layout" svg:width="12.596cm" svg:height="5.512cm" svg:x="12cm" svg:y="3.5cm">
          <draw:image xlink:href="Pictures/10000000000004DB000002206A27347F.png" xlink:type="simple" xlink:show="embed" xlink:actuate="onLoad" draw:mime-type="image/png">
            <text:p/>
          </draw:image>
        </draw:frame>
        <draw:frame draw:style-name="gr9" draw:text-style-name="P17" draw:layer="layout" svg:width="6.5cm" svg:height="5cm" svg:x="18cm" svg:y="12cm">
          <draw:text-box>
            <text:p>+ extensions</text:p>
            <text:p/>
            <text:p>+ aplicacions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frame draw:style-name="gr10" draw:text-style-name="P17" draw:layer="layout" svg:width="9.5cm" svg:height="2cm" svg:x="2cm" svg:y="3.5cm">
          <draw:text-box>
            <text:p>Redes anónimas</text:p>
          </draw:text-box>
        </draw:frame>
        <draw:frame draw:style-name="gr11" draw:text-style-name="P18" draw:layer="layout" svg:width="11.482cm" svg:height="2.609cm" svg:x="0.5cm" svg:y="5.391cm">
          <draw:image xlink:href="Pictures/100000000000028B00000094750068BC.png" xlink:type="simple" xlink:show="embed" xlink:actuate="onLoad" draw:mime-type="image/png">
            <text:p/>
          </draw:image>
        </draw:frame>
        <draw:frame draw:style-name="gr11" draw:text-style-name="P18" draw:layer="layout" svg:width="14.587cm" svg:height="2.521cm" svg:x="4.413cm" svg:y="8.5cm">
          <draw:image xlink:href="Pictures/100000000000033B0000008F97FCD73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frame draw:style-name="gr12" draw:text-style-name="P17" draw:layer="layout" svg:width="8.5cm" svg:height="1.5cm" svg:x="2.5cm" svg:y="3cm">
          <draw:text-box>
            <text:p>Redes sociales</text:p>
          </draw:text-box>
        </draw:frame>
        <draw:frame draw:style-name="gr11" draw:text-style-name="P18" draw:layer="layout" svg:width="12.429cm" svg:height="10.407cm" svg:x="1.071cm" svg:y="4.5cm">
          <draw:image xlink:href="Pictures/10000000000003130000029359FE941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office:forms form:automatic-focus="false" form:apply-design-mode="false"/>
        <draw:frame draw:style-name="gr11" draw:text-style-name="P18" draw:layer="layout" svg:width="21.386cm" svg:height="9.366cm" svg:x="-0.443cm" svg:y="3.134cm">
          <draw:image xlink:href="Pictures/100000000000057300000263B18964A5.png" xlink:type="simple" xlink:show="embed" xlink:actuate="onLoad" draw:mime-type="image/png">
            <text:p/>
          </draw:image>
        </draw:frame>
        <draw:frame draw:style-name="gr13" draw:text-style-name="P20" draw:layer="layout" svg:width="4cm" svg:height="9cm" svg:x="21cm" svg:y="6cm">
          <draw:text-box>
            <text:p text:style-name="P19"><text:span text:style-name="T16">Usufy</text:span></text:p>
            <text:p text:style-name="P19"><text:span text:style-name="T16">Searchfy</text:span></text:p>
            <text:p text:style-name="P19"><text:span text:style-name="T16">Phonefy</text:span></text:p>
            <text:p text:style-name="P19"><text:span text:style-name="T16">Mailfy</text:span></text:p>
            <text:p text:style-name="P19"><text:span text:style-name="T16">Domainfy</text:span></text:p>
            <text:p text:style-name="P19"><text:span text:style-name="T16">Checkfy</text:span></text:p>
            <text:p text:style-name="P19"><text:span text:style-name="T16"/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11">
        <office:forms form:automatic-focus="false" form:apply-design-mode="false"/>
        <draw:frame draw:style-name="gr11" draw:text-style-name="P18" draw:layer="layout" svg:width="14.424cm" svg:height="8.519cm" svg:x="3.076cm" svg:y="4.981cm">
          <draw:image xlink:href="Pictures/10000000000003D600000244EE4E41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11">
        <office:forms form:automatic-focus="false" form:apply-design-mode="false"/>
        <draw:frame draw:style-name="gr11" draw:text-style-name="P18" draw:layer="layout" svg:width="7.284cm" svg:height="11.059cm" svg:x="2.5cm" svg:y="4.066cm">
          <draw:image xlink:href="Pictures/100000000000019D000002733F9FB7FC.png" xlink:type="simple" xlink:show="embed" xlink:actuate="onLoad" draw:mime-type="image/png">
            <text:p/>
          </draw:image>
        </draw:frame>
        <draw:frame draw:style-name="gr11" draw:text-style-name="P18" draw:layer="layout" svg:width="8.871cm" svg:height="11.411cm" svg:x="10cm" svg:y="3.89cm">
          <draw:image xlink:href="Pictures/10000000000001F700000287BF6FD182.png" xlink:type="simple" xlink:show="embed" xlink:actuate="onLoad" draw:mime-type="image/png">
            <text:p/>
          </draw:image>
        </draw:frame>
        <draw:frame draw:style-name="gr11" draw:text-style-name="P18" draw:layer="layout" svg:width="8.818cm" svg:height="5.757cm" svg:x="16.182cm" svg:y="4.243cm">
          <draw:image xlink:href="Pictures/10000000000003B1000002695B3D530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office:forms form:automatic-focus="false" form:apply-design-mode="false"/>
        <draw:frame draw:style-name="gr11" draw:text-style-name="P18" draw:layer="layout" svg:width="16.298cm" svg:height="10.212cm" svg:x="4.636cm" svg:y="4.49cm">
          <draw:image xlink:href="Pictures/100000000000039C0000024309566E5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11">
        <office:forms form:automatic-focus="false" form:apply-design-mode="false"/>
        <draw:frame draw:style-name="gr11" draw:text-style-name="P18" draw:layer="layout" svg:width="6.755cm" svg:height="2.133cm" svg:x="3cm" svg:y="5.367cm">
          <draw:image xlink:href="Pictures/100000000000017F00000079231442C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1">
        <office:forms form:automatic-focus="false" form:apply-design-mode="false"/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11">
        <office:forms form:automatic-focus="false" form:apply-design-mode="false"/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loext:tab-stop-distance="0cm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 loext:decorative="false"/>
    </style:style>
    <style:style style:name="Mgr10" style:family="graphic" style:parent-style-name="standard">
      <style:graphic-properties draw:textarea-vertical-align="middle" fo:min-height="0cm" fo:min-width="0cm" loext:decorative="false"/>
    </style:style>
    <style:style style:name="Mgr11" style:family="graphic" style:parent-style-name="standard">
      <style:graphic-properties draw:stroke="none" draw:fill-color="#f44336" draw:textarea-vertical-align="middle" draw:auto-grow-height="false" fo:min-height="1.111cm" fo:min-width="0.861cm" loext:decorative="false"/>
    </style:style>
    <style:style style:name="Mgr12" style:family="graphic" style:parent-style-name="standard">
      <style:graphic-properties draw:stroke="none" draw:fill="none" draw:fill-color="#ffffff" fo:min-height="11.543cm" loext:decorative="false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 loext:decorative="false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0.779cm" fo:padding-top="0cm" fo:padding-bottom="0cm" fo:padding-left="0cm" fo:padding-right="0cm" fo:wrap-option="no-wrap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MP9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/>
    </style:style>
    <style:style style:name="MP13" style:family="paragraph">
      <style:paragraph-properties fo:margin-left="0.035cm" fo:margin-right="0cm" fo:margin-top="0cm" fo:margin-bottom="0cm" fo:line-height="0.707cm" fo:text-align="start" fo:text-indent="0cm"/>
    </style:style>
    <style:style style:name="MP14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font-independent-line-spacing="false"/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center"/>
    </style:style>
    <style:style style:name="M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</style:style>
    <style:style style:name="MP22" style:family="paragraph">
      <loext:graphic-properties draw:fill-color="#f44336"/>
      <style:paragraph-properties fo:text-align="center"/>
    </style:style>
    <style:style style:name="MP23" style:family="paragraph">
      <style:paragraph-properties fo:text-align="center" style:writing-mode="lr-tb"/>
    </style:style>
    <style:style style:name="MP24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8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9" style:family="text"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T10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5.5cm" svg:height="1.5cm" svg:x="0cm" svg:y="17.5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966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9" draw:layer="backgroundobjects" svg:width="3.67cm" svg:height="1.73cm" svg:x="20.964cm" svg:y="0.524cm">
        <text:p text:style-name="MP7"><text:span text:style-name="MT2">CURS</text:span><text:span text:style-name="MT3"> 23</text:span><text:span text:style-name="MT4">/24</text:span></text:p>
        <text:p text:style-name="MP8"><text:span text:style-name="MT4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2" draw:layer="backgroundobjects" svg:width="12.5cm" svg:height="1.665cm" svg:x="3.142cm" svg:y="0.702cm">
        <draw:text-box>
          <text:p text:style-name="MP10"><text:span text:style-name="MT2">IES</text:span><text:span text:style-name="MT5"> SANT</text:span><text:span text:style-name="MT6"> </text:span><text:span text:style-name="MT5">VICENT FERRER</text:span><text:span text:style-name="MT7"> </text:span><text:span text:style-name="MT2">(ALGEMESÍ)</text:span></text:p>
          <text:p text:style-name="MP11"><text:span text:style-name="MT8">CYBERSECURITY INCIDENTS</text:span></text:p>
        </draw:text-box>
      </draw:frame>
      <draw:frame draw:name="object 19_0" presentation:style-name="Mpr2" draw:text-style-name="MP14" draw:layer="backgroundobjects" svg:width="14.794cm" svg:height="0.779cm" svg:x="9.562cm" svg:y="17.964cm">
        <draw:text-box>
          <text:p text:style-name="MP13"><text:span text:style-name="MT9">UNIT 02 <text:s text:c="2"/>Audit of Cybersecurity Incidents</text:span></text:p>
        </draw:text-box>
      </draw:frame>
      <draw:frame draw:style-name="Mgr6" draw:text-style-name="MP15" draw:layer="backgroundobjects" svg:width="2.459cm" svg:height="2.039cm" svg:x="0.576cm" svg:y="0.528cm">
        <draw:image xlink:href="Pictures/100000000000020E000001B4494AA734.png" xlink:type="simple" xlink:show="embed" xlink:actuate="onLoad" draw:mime-type="image/png">
          <text:p/>
        </draw:image>
      </draw:frame>
      <draw:frame draw:style-name="Mgr7" draw:text-style-name="MP16" draw:layer="backgroundobjects" svg:width="1.551cm" svg:height="0.546cm" svg:x="3.45cm" svg:y="18.334cm">
        <draw:image xlink:href="Pictures/10000001000000580000001F1F6C62EE.png" xlink:type="simple" xlink:show="embed" xlink:actuate="onLoad" draw:mime-type="image/png">
          <text:p/>
        </draw:image>
      </draw:frame>
      <draw:frame draw:style-name="Mgr8" draw:text-style-name="MP17" draw:layer="backgroundobjects" svg:width="7.728cm" svg:height="0.892cm" svg:x="0.272cm" svg:y="17.608cm">
        <draw:text-box>
          <text:p text:style-name="MP16"><text:span text:style-name="MT10">Aquesta obra de Enrique Iborra està subjecta a una llicència de</text:span><text:span text:style-name="MT10"><text:a xlink:href="http://creativecommons.org/licenses/by-sa/4.0/" xlink:type="simple">Reconeixement-CompartirIgual 4.0 Internacional de Creative Commons</text:a></text:span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9" draw:text-style-name="MP18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0" draw:layer="backgroundobjects" svg:width="8.051cm" svg:height="1.312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6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10" draw:text-style-name="MP21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10" draw:text-style-name="MP16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11" draw:text-style-name="MP22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2" draw:text-style-name="MP18" draw:layer="backgroundobjects" svg:width="23.132cm" svg:height="11.793cm" svg:x="0.907cm" svg:y="4.535cm">
        <draw:text-box>
          <text:p/>
        </draw:text-box>
      </draw:frame>
      <draw:custom-shape draw:style-name="Mgr10" draw:text-style-name="MP21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16" draw:layer="backgroundobjects" svg:width="3.175cm" svg:height="1.361cm" svg:x="-0.453cm" svg:y="17.235cm" presentation:class="page-number">
        <draw:text-box>
          <text:p text:style-name="MP23"><text:page-number>&lt;número&gt;</text:page-number></text:p>
        </draw:text-box>
      </draw:frame>
      <draw:frame presentation:style-name="Mpr11" draw:text-style-name="MP15" draw:layer="backgroundobjects" svg:width="16.329cm" svg:height="1.361cm" svg:x="2.267cm" svg:y="17.235cm" presentation:class="footer">
        <draw:text-box>
          <text:p text:style-name="MP23"><presentation:footer/></text:p>
        </draw:text-box>
      </draw:frame>
      <draw:frame presentation:style-name="Mpr10" draw:text-style-name="MP21" draw:layer="backgroundobjects" svg:width="5.896cm" svg:height="1.315cm" svg:x="19.05cm" svg:y="17.235cm" presentation:class="date-time">
        <draw:text-box>
          <text:p text:style-name="MP24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09-17T12:45:34.110000000</meta:creation-date>
    <meta:editing-duration>PT8H9M54S</meta:editing-duration>
    <meta:generator>LibreOffice/24.2.6.2$Windows_X86_64 LibreOffice_project/ef66aa7e36a1bb8e65bfbc63aba53045a14d0871</meta:generator>
    <meta:editing-cycles>70</meta:editing-cycles>
    <dc:date>2024-12-11T18:45:01.720000000</dc:date>
    <meta:print-date>2023-12-01T17:18:46.984000000</meta:print-date>
    <meta:printed-by>Archivos PDF</meta:printed-by>
    <meta:document-statistic meta:object-count="123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