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55743" officeooo:paragraph-rsid="00355743"/>
    </style:style>
    <style:style style:name="P2" style:family="paragraph" style:parent-style-name="Standard">
      <style:text-properties officeooo:rsid="003900ff" officeooo:paragraph-rsid="0042d1b4"/>
    </style:style>
    <style:style style:name="P3" style:family="paragraph" style:parent-style-name="Standard">
      <style:text-properties officeooo:paragraph-rsid="0042d1b4"/>
    </style:style>
    <style:style style:name="P4" style:family="paragraph" style:parent-style-name="Standard">
      <style:text-properties officeooo:rsid="00355743" officeooo:paragraph-rsid="0042d1b4"/>
    </style:style>
    <style:style style:name="P5" style:family="paragraph" style:parent-style-name="Standard">
      <style:text-properties officeooo:paragraph-rsid="0046dc39"/>
    </style:style>
    <style:style style:name="P6" style:family="paragraph" style:parent-style-name="Standard">
      <style:text-properties officeooo:rsid="003b97d3" officeooo:paragraph-rsid="00482003"/>
    </style:style>
    <style:style style:name="P7" style:family="paragraph" style:parent-style-name="Standard">
      <style:text-properties officeooo:paragraph-rsid="00482003"/>
    </style:style>
    <style:style style:name="P8" style:family="paragraph" style:parent-style-name="Standard">
      <style:text-properties fo:font-style="normal" officeooo:rsid="001ae186" officeooo:paragraph-rsid="00482003" style:font-style-asian="normal" style:font-style-complex="normal"/>
    </style:style>
    <style:style style:name="P9" style:family="paragraph" style:parent-style-name="Standard">
      <style:text-properties officeooo:rsid="0046dc39" officeooo:paragraph-rsid="00482003"/>
    </style:style>
    <style:style style:name="P10" style:family="paragraph" style:parent-style-name="Standard">
      <style:text-properties officeooo:rsid="00482003" officeooo:paragraph-rsid="00482003"/>
    </style:style>
    <style:style style:name="P11" style:family="paragraph" style:parent-style-name="Standard">
      <style:text-properties fo:font-weight="bold" officeooo:rsid="00482003" officeooo:paragraph-rsid="00482003" style:font-weight-asian="bold" style:font-weight-complex="bold"/>
    </style:style>
    <style:style style:name="P12" style:family="paragraph" style:parent-style-name="Standard">
      <style:text-properties officeooo:paragraph-rsid="00438779"/>
    </style:style>
    <style:style style:name="P13" style:family="paragraph" style:parent-style-name="Standard">
      <style:text-properties officeooo:rsid="0046dc39" officeooo:paragraph-rsid="0046dc39"/>
    </style:style>
    <style:style style:name="P14" style:family="paragraph" style:parent-style-name="Standard">
      <style:text-properties fo:font-style="normal" officeooo:rsid="001ae186" officeooo:paragraph-rsid="001ae186" style:font-style-asian="normal" style:font-style-complex="normal"/>
    </style:style>
    <style:style style:name="P15" style:family="paragraph" style:parent-style-name="Standard">
      <style:text-properties fo:color="#158466" loext:opacity="100%" officeooo:rsid="001ed2c4" officeooo:paragraph-rsid="001ed2c4"/>
    </style:style>
    <style:style style:name="P16" style:family="paragraph" style:parent-style-name="Standard">
      <style:text-properties officeooo:paragraph-rsid="00355743"/>
    </style:style>
    <style:style style:name="P17" style:family="paragraph" style:parent-style-name="Standard">
      <style:text-properties officeooo:rsid="0044cd60" officeooo:paragraph-rsid="0044cd60"/>
    </style:style>
    <style:style style:name="P18" style:family="paragraph" style:parent-style-name="Standard">
      <style:text-properties officeooo:rsid="0045f2c8" officeooo:paragraph-rsid="0045f2c8"/>
    </style:style>
    <style:style style:name="P19" style:family="paragraph" style:parent-style-name="Standard">
      <style:text-properties officeooo:rsid="0044cd60" officeooo:paragraph-rsid="0045f2c8"/>
    </style:style>
    <style:style style:name="P20" style:family="paragraph" style:parent-style-name="Standard">
      <style:text-properties officeooo:rsid="00359b45" officeooo:paragraph-rsid="00359b45"/>
    </style:style>
    <style:style style:name="P21" style:family="paragraph" style:parent-style-name="Standard">
      <style:text-properties fo:font-weight="bold" officeooo:rsid="00359b45" officeooo:paragraph-rsid="00359b45" style:font-weight-asian="bold" style:font-weight-complex="bold"/>
    </style:style>
    <style:style style:name="P22" style:family="paragraph" style:parent-style-name="Standard">
      <style:text-properties officeooo:rsid="00414477" officeooo:paragraph-rsid="00414477"/>
    </style:style>
    <style:style style:name="P23" style:family="paragraph" style:parent-style-name="Standard">
      <style:text-properties officeooo:rsid="00414477" officeooo:paragraph-rsid="0041e3ea"/>
    </style:style>
    <style:style style:name="P24" style:family="paragraph" style:parent-style-name="Standard">
      <style:text-properties officeooo:rsid="0041e3ea" officeooo:paragraph-rsid="0041e3ea"/>
    </style:style>
    <style:style style:name="P25" style:family="paragraph" style:parent-style-name="Standard">
      <style:text-properties officeooo:paragraph-rsid="00367364"/>
    </style:style>
    <style:style style:name="P26" style:family="paragraph" style:parent-style-name="Standard">
      <style:text-properties officeooo:paragraph-rsid="00377cf2"/>
    </style:style>
    <style:style style:name="P27" style:family="paragraph" style:parent-style-name="Standard">
      <style:text-properties officeooo:paragraph-rsid="00380fc7"/>
    </style:style>
    <style:style style:name="P28" style:family="paragraph" style:parent-style-name="Standard">
      <style:text-properties officeooo:paragraph-rsid="003900ff"/>
    </style:style>
    <style:style style:name="P29" style:family="paragraph" style:parent-style-name="Standard">
      <style:text-properties officeooo:paragraph-rsid="003a55b0"/>
    </style:style>
    <style:style style:name="P30" style:family="paragraph" style:parent-style-name="Standard">
      <style:text-properties officeooo:rsid="0055611a" officeooo:paragraph-rsid="0055611a"/>
    </style:style>
    <style:style style:name="P31" style:family="paragraph" style:parent-style-name="Standard">
      <style:text-properties officeooo:rsid="00163dca" officeooo:paragraph-rsid="00163dca"/>
    </style:style>
    <style:style style:name="P32" style:family="paragraph" style:parent-style-name="Standard">
      <style:text-properties officeooo:rsid="00177f24" officeooo:paragraph-rsid="00177f24"/>
    </style:style>
    <style:style style:name="P33" style:family="paragraph" style:parent-style-name="Standard">
      <style:text-properties officeooo:rsid="0018cf2d" officeooo:paragraph-rsid="0018cf2d"/>
    </style:style>
    <style:style style:name="P34" style:family="paragraph" style:parent-style-name="Standard">
      <style:text-properties fo:color="#158466" loext:opacity="100%" officeooo:rsid="0018cf2d" officeooo:paragraph-rsid="0018cf2d"/>
    </style:style>
    <style:style style:name="P35" style:family="paragraph" style:parent-style-name="Standard">
      <style:text-properties officeooo:rsid="0018cf2d" officeooo:paragraph-rsid="002977ed"/>
    </style:style>
    <style:style style:name="P36" style:family="paragraph" style:parent-style-name="Standard">
      <style:text-properties fo:color="#158466" loext:opacity="100%" officeooo:rsid="002977ed" officeooo:paragraph-rsid="002977ed"/>
    </style:style>
    <style:style style:name="P37" style:family="paragraph" style:parent-style-name="Standard">
      <style:text-properties officeooo:rsid="001a148a" officeooo:paragraph-rsid="001a148a"/>
    </style:style>
    <style:style style:name="P38" style:family="paragraph" style:parent-style-name="Standard">
      <style:text-properties officeooo:rsid="001a148a" officeooo:paragraph-rsid="00304f8f"/>
    </style:style>
    <style:style style:name="P39" style:family="paragraph" style:parent-style-name="Standard">
      <style:text-properties officeooo:rsid="00304f8f" officeooo:paragraph-rsid="00304f8f"/>
    </style:style>
    <style:style style:name="P40" style:family="paragraph" style:parent-style-name="Standard">
      <style:text-properties fo:font-style="normal" officeooo:rsid="001a148a" officeooo:paragraph-rsid="001a148a" style:font-style-asian="normal" style:font-style-complex="normal"/>
    </style:style>
    <style:style style:name="P41" style:family="paragraph" style:parent-style-name="Standard">
      <style:text-properties fo:font-style="normal" officeooo:rsid="001ae186" officeooo:paragraph-rsid="001a148a" style:font-style-asian="normal" style:font-style-complex="normal"/>
    </style:style>
    <style:style style:name="P42" style:family="paragraph" style:parent-style-name="Standard">
      <style:text-properties fo:color="#158466" loext:opacity="100%" officeooo:rsid="001ed2c4" officeooo:paragraph-rsid="001ae186"/>
    </style:style>
    <style:style style:name="P43" style:family="paragraph" style:parent-style-name="Standard">
      <style:text-properties fo:color="#158466" loext:opacity="100%" officeooo:rsid="0022e4f2" officeooo:paragraph-rsid="0022e4f2"/>
    </style:style>
    <style:style style:name="P44" style:family="paragraph" style:parent-style-name="Standard">
      <style:text-properties fo:color="#158466" loext:opacity="100%" officeooo:rsid="0022e4f2" officeooo:paragraph-rsid="0023f5b4"/>
    </style:style>
    <style:style style:name="P45" style:family="paragraph" style:parent-style-name="Standard">
      <style:text-properties fo:color="#158466" loext:opacity="100%" officeooo:rsid="0023f5b4" officeooo:paragraph-rsid="0023f5b4"/>
    </style:style>
    <style:style style:name="P46" style:family="paragraph" style:parent-style-name="Standard">
      <style:text-properties fo:color="#158466" loext:opacity="100%" officeooo:rsid="0023f5b4" officeooo:paragraph-rsid="0042cf6d"/>
    </style:style>
    <style:style style:name="P47" style:family="paragraph" style:parent-style-name="Standard">
      <style:text-properties fo:color="#158466" loext:opacity="100%" officeooo:rsid="0042cf6d" officeooo:paragraph-rsid="0042cf6d"/>
    </style:style>
    <style:style style:name="P48" style:family="paragraph" style:parent-style-name="Standard">
      <style:text-properties fo:color="#158466" loext:opacity="100%" officeooo:rsid="0048a29f" officeooo:paragraph-rsid="0048a29f"/>
    </style:style>
    <style:style style:name="P49" style:family="paragraph" style:parent-style-name="Standard">
      <style:text-properties fo:color="#158466" loext:opacity="100%" officeooo:rsid="00276bd8" officeooo:paragraph-rsid="00276bd8"/>
    </style:style>
    <style:style style:name="P50" style:family="paragraph" style:parent-style-name="Standard">
      <style:text-properties fo:color="#158466" loext:opacity="100%" officeooo:rsid="0028cb24" officeooo:paragraph-rsid="0028cb24"/>
    </style:style>
    <style:style style:name="P51" style:family="paragraph" style:parent-style-name="Standard">
      <style:text-properties fo:color="#158466" loext:opacity="100%" officeooo:rsid="0028cb24" officeooo:paragraph-rsid="003124c7"/>
    </style:style>
    <style:style style:name="P52" style:family="paragraph" style:parent-style-name="Standard">
      <style:text-properties officeooo:rsid="001a148a" officeooo:paragraph-rsid="002e736b"/>
    </style:style>
    <style:style style:name="P53" style:family="paragraph" style:parent-style-name="Standard">
      <style:text-properties fo:font-style="normal" officeooo:rsid="001ae186" officeooo:paragraph-rsid="002e736b" style:font-style-asian="normal" style:font-style-complex="normal"/>
    </style:style>
    <style:style style:name="P54" style:family="paragraph" style:parent-style-name="Standard">
      <style:text-properties fo:font-style="normal" officeooo:rsid="001ae186" officeooo:paragraph-rsid="00331835" style:font-style-asian="normal" style:font-style-complex="normal"/>
    </style:style>
    <style:style style:name="P55" style:family="paragraph" style:parent-style-name="Standard">
      <style:text-properties fo:font-style="normal" officeooo:rsid="004a3948" officeooo:paragraph-rsid="004a3948" style:font-style-asian="normal" style:font-style-complex="normal"/>
    </style:style>
    <style:style style:name="P56" style:family="paragraph" style:parent-style-name="Standard">
      <style:text-properties fo:font-style="normal" officeooo:rsid="003407e4" officeooo:paragraph-rsid="003407e4" style:font-style-asian="normal" style:font-style-complex="normal"/>
    </style:style>
    <style:style style:name="P57" style:family="paragraph" style:parent-style-name="Standard">
      <style:text-properties fo:font-style="normal" officeooo:rsid="003407e4" officeooo:paragraph-rsid="0042d1b4" style:font-style-asian="normal" style:font-style-complex="normal"/>
    </style:style>
    <style:style style:name="T1" style:family="text">
      <style:text-properties officeooo:rsid="00482003"/>
    </style:style>
    <style:style style:name="T2" style:family="text">
      <style:text-properties officeooo:rsid="00438779"/>
    </style:style>
    <style:style style:name="T3" style:family="text">
      <style:text-properties officeooo:rsid="0043c453"/>
    </style:style>
    <style:style style:name="T4" style:family="text">
      <style:text-properties officeooo:rsid="00355743"/>
    </style:style>
    <style:style style:name="T5" style:family="text">
      <style:text-properties officeooo:rsid="0045f2c8"/>
    </style:style>
    <style:style style:name="T6" style:family="text">
      <style:text-properties officeooo:rsid="00367364"/>
    </style:style>
    <style:style style:name="T7" style:family="text">
      <style:text-properties officeooo:rsid="00377cf2"/>
    </style:style>
    <style:style style:name="T8" style:family="text">
      <style:text-properties officeooo:rsid="003b4522"/>
    </style:style>
    <style:style style:name="T9" style:family="text">
      <style:text-properties officeooo:rsid="003a55b0"/>
    </style:style>
    <style:style style:name="T10" style:family="text">
      <style:text-properties fo:color="#158466" loext:opacity="100%"/>
    </style:style>
    <style:style style:name="T11" style:family="text">
      <style:text-properties officeooo:rsid="001b69dd"/>
    </style:style>
    <style:style style:name="T12" style:family="text">
      <style:text-properties officeooo:rsid="002977ed"/>
    </style:style>
    <style:style style:name="T13" style:family="text">
      <style:text-properties officeooo:rsid="002abb94"/>
    </style:style>
    <style:style style:name="T14" style:family="text">
      <style:text-properties officeooo:rsid="002c48d7"/>
    </style:style>
    <style:style style:name="T15" style:family="text">
      <style:text-properties officeooo:rsid="002dde93"/>
    </style:style>
    <style:style style:name="T16" style:family="text">
      <style:text-properties officeooo:rsid="001a148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1ae18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3f5b4"/>
    </style:style>
    <style:style style:name="T21" style:family="text">
      <style:text-properties officeooo:rsid="003124c7"/>
    </style:style>
    <style:style style:name="T2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2024-25</text:p>
      <text:p text:style-name="P2">DISTRIBUCIONES OSINT <text:a xlink:type="simple" xlink:href="https://odint.net/distros-osint/" text:style-name="Internet_20_link" text:visited-style-name="Visited_20_Internet_20_Link">https://odint.net/distros-osint/</text:a> <text:s/></text:p>
      <text:p text:style-name="P3"><text:a xlink:type="simple" xlink:href="https://athenaos.org/" text:style-name="Internet_20_link" text:visited-style-name="Visited_20_Internet_20_Link">https://athenaos.org/</text:a></text:p>
      <text:p text:style-name="P3"><text:a xlink:type="simple" xlink:href="https://www.sherlock-linux.org/" text:style-name="Internet_20_link" text:visited-style-name="Visited_20_Internet_20_Link">https://www.sherlock-linux.org/</text:a></text:p>
      <text:p text:style-name="P3"><text:a xlink:type="simple" xlink:href="https://tsurugi-linux.org/" text:style-name="Internet_20_link" text:visited-style-name="Visited_20_Internet_20_Link">https://tsurugi-linux.org/</text:a> </text:p>
      <text:p text:style-name="P3"><text:a xlink:type="simple" xlink:href="https://parrotsec.org/" text:style-name="Internet_20_link" text:visited-style-name="Visited_20_Internet_20_Link">https://parrotsec.org/</text:a> </text:p>
      <text:p text:style-name="P3">enfocadas a osint</text:p>
      <text:p text:style-name="P3"><text:a xlink:type="simple" xlink:href="https://downloads.csilinux.com/" text:style-name="Internet_20_link" text:visited-style-name="Visited_20_Internet_20_Link">https://downloads.csilinux.com/</text:a> </text:p>
      <text:p text:style-name="P3"><text:a xlink:type="simple" xlink:href="https://github.com/Cl4r4-5/OriON" text:style-name="Internet_20_link" text:visited-style-name="Visited_20_Internet_20_Link">https://github.com/Cl4r4-5/OriON</text:a> </text:p>
      <text:p text:style-name="P3"><text:a xlink:type="simple" xlink:href="https://www.tracelabs.org/initiatives/osint-vm" text:style-name="Internet_20_link" text:visited-style-name="Visited_20_Internet_20_Link">https://www.tracelabs.org/initiatives/osint-vm</text:a> </text:p>
      <text:p text:style-name="P3"><text:a xlink:type="simple" xlink:href="https://github.com/Pr3ventor/Camaleon" text:style-name="Internet_20_link" text:visited-style-name="Visited_20_Internet_20_Link">https://github.com/Pr3ventor/Camaleon</text:a> </text:p>
      <text:p text:style-name="P3"><text:a xlink:type="simple" xlink:href="https://github.com/pingu165/MAED" text:style-name="Internet_20_link" text:visited-style-name="Visited_20_Internet_20_Link">https://github.com/pingu165/MAED</text:a> </text:p>
      <text:p text:style-name="P4"/>
      <text:p text:style-name="P5"/>
      <text:p text:style-name="P6"><text:span text:style-name="T1">Pag con </text:span>Retos <text:s/><text:span text:style-name="T1">Osint</text:span></text:p>
      <text:p text:style-name="P7"><text:a xlink:type="simple" xlink:href="https://challenge.bellingcat.com/" text:style-name="Internet_20_link" text:visited-style-name="Visited_20_Internet_20_Link">https://challenge.bellingcat.com/</text:a></text:p>
      <text:p text:style-name="P8"><text:a xlink:type="simple" xlink:href="https://www.osint4fun.eu/" text:style-name="Internet_20_link" text:visited-style-name="Visited_20_Internet_20_Link">https://www.osint4fun.eu/</text:a> </text:p>
      <text:p text:style-name="P8"><text:a xlink:type="simple" xlink:href="https://www.osint4fun.eu/advent2024/en/" text:style-name="Internet_20_link" text:visited-style-name="Visited_20_Internet_20_Link">https://www.osint4fun.eu/advent2024/en/</text:a> </text:p>
      <text:p text:style-name="P8"><text:a xlink:type="simple" xlink:href="https://osintswitzerland.ch/" text:style-name="Internet_20_link" text:visited-style-name="Visited_20_Internet_20_Link">https://osintswitzerland.ch/</text:a> </text:p>
      <text:p text:style-name="P9"><text:a xlink:type="simple" xlink:href="https://geodetective.io/" text:style-name="Internet_20_link" text:visited-style-name="Visited_20_Internet_20_Link">https://geodetective.io/</text:a></text:p>
      <text:p text:style-name="P9"/>
      <text:p text:style-name="P10">Noticies osint</text:p>
      <text:p text:style-name="P1"><text:a xlink:type="simple" xlink:href="https://osint.com.ar/" text:style-name="Internet_20_link" text:visited-style-name="Visited_20_Internet_20_Link">https://osint.com.ar/</text:a></text:p>
      <text:p text:style-name="P9"/>
      <text:p text:style-name="P11">Geolocalització</text:p>
      <text:p text:style-name="P12"><text:span text:style-name="T2">App</text:span><text:span text:style-name="T3">s</text:span><text:span text:style-name="T2"> con IA que saca coordenadas desde una imagen</text:span></text:p>
      <text:p text:style-name="Standard"><text:a xlink:type="simple" xlink:href="https://geospy.ai/" text:style-name="Internet_20_link" text:visited-style-name="Visited_20_Internet_20_Link">https://geospy.ai/</text:a></text:p>
      <text:p text:style-name="P10"><text:a xlink:type="simple" xlink:href="https://picarta.ai/" text:style-name="Internet_20_link" text:visited-style-name="Visited_20_Internet_20_Link">https://picarta.ai/</text:a></text:p>
      <text:p text:style-name="P13"><text:a xlink:type="simple" xlink:href="https://medium.com/@ronkaminskyy/geolocating-pictures-via-osint-ai-187117e773ea" text:style-name="Internet_20_link" text:visited-style-name="Visited_20_Internet_20_Link">https://medium.com/@ronkaminskyy/geolocating-pictures-via-osint-ai-187117e773ea</text:a></text:p>
      <text:p text:style-name="Standard">GeoSpy AI can identify the country where a photo was taken not only by the landscape or interior, but also by people's clothes and faces. <text:s/><text:a xlink:type="simple" xlink:href="https://geospy.web.app/" text:style-name="Internet_20_link" text:visited-style-name="Visited_20_Internet_20_Link">https://geospy.web.app/</text:a></text:p>
      <text:p text:style-name="P14">Herramientas de información cartográfica</text:p>
      <text:p text:style-name="P14">QGIS</text:p>
      <text:p text:style-name="P15">Generador de mapas</text:p>
      <text:p text:style-name="P15">Simulador de sombras por horas ( de edificios en mapas)</text:p>
      <text:p text:style-name="P15"><text:a xlink:type="simple" xlink:href="https://cercaliaint.nexusgeografics.com/pisos3d/demo/example2.html" text:style-name="Internet_20_link" text:visited-style-name="Visited_20_Internet_20_Link">https://cercaliaint.nexusgeografics.com/pisos3d/demo/example2.html</text:a></text:p>
      <text:p text:style-name="P15"><text:a xlink:type="simple" xlink:href="https://app.shadowmap.org/" text:style-name="Internet_20_link" text:visited-style-name="Visited_20_Internet_20_Link">https://app.shadowmap.org/</text:a></text:p>
      <text:p text:style-name="P15"><text:a xlink:type="simple" xlink:href="https://www.suncalc.org/" text:style-name="Internet_20_link" text:visited-style-name="Visited_20_Internet_20_Link">https://www.suncalc.org/</text:a></text:p>
      <text:p text:style-name="P13"/>
      <text:p text:style-name="P13"/>
      <text:p text:style-name="P13">Recopilacion herramientas <text:s/>osint.</text:p>
      <text:p text:style-name="P13"><text:a xlink:type="simple" xlink:href="https://start.me/p/y9A6AD/osint" text:style-name="Internet_20_link" text:visited-style-name="Visited_20_Internet_20_Link">https://start.me/p/y9A6AD/osint</text:a></text:p>
      <text:p text:style-name="P13"><text:a xlink:type="simple" xlink:href="https://start.me/p/0NDoEe/dark-web" text:style-name="Internet_20_link" text:visited-style-name="Visited_20_Internet_20_Link">https://start.me/p/0NDoEe/dark-web</text:a></text:p>
      <text:p text:style-name="P13"><text:a xlink:type="simple" xlink:href="https://github.com/wddadk/OSINT-for-countries" text:style-name="Internet_20_link" text:visited-style-name="Visited_20_Internet_20_Link">https://github.com/wddadk/OSINT-for-countries</text:a></text:p>
      <text:p text:style-name="P13"/>
      <text:p text:style-name="P13"/>
      <text:p text:style-name="P1">de pago effectgroup! o Pipl</text:p>
      <text:p text:style-name="Standard">Epieos y osint.industries </text:p>
      <text:p text:style-name="Standard"><text:a xlink:type="simple" xlink:href="https://github.com/Minotaur-OPSEC/OSINTMachineGuide" text:style-name="Internet_20_link" text:visited-style-name="Visited_20_Internet_20_Link">https://github.com/Minotaur-OPSEC/OSINTMachineGuide</text:a></text:p>
      <text:p text:style-name="Standard"/>
      <text:p text:style-name="Standard"><text:span text:style-name="T4">Matriculas: </text:span>Automatic License Plate Recognition - High Accuracy ALPR <text:a xlink:type="simple" xlink:href="https://platerecognizer.com/" text:style-name="Internet_20_link" text:visited-style-name="Visited_20_Internet_20_Link">https://platerecognizer.com/</text:a> </text:p>
      <text:p text:style-name="Standard"><text:soft-page-break/></text:p>
      <text:p text:style-name="P16"><text:span text:style-name="T4">telefonos: <text:s/></text:span><text:s/>truecaller, lampyre, maltego, ciertos dorks...</text:p>
      <text:p text:style-name="Standard"><text:a xlink:type="simple" xlink:href="https://www.patreon.com/posts/que-hago-con-un-94774272" text:style-name="Internet_20_link" text:visited-style-name="Visited_20_Internet_20_Link">https://www.patreon.com/posts/que-hago-con-un-94774272</text:a></text:p>
      <text:p text:style-name="Standard"><text:a xlink:type="simple" xlink:href="https://www.numlookup.com/" text:style-name="Internet_20_link" text:visited-style-name="Visited_20_Internet_20_Link">https://www.numlookup.com/</text:a> </text:p>
      <text:p text:style-name="Standard"/>
      <text:p text:style-name="Standard">Lopseg | OSINT <text:s/><text:a xlink:type="simple" xlink:href="https://www.lopseg.com.br/osint" text:style-name="Internet_20_link" text:visited-style-name="Visited_20_Internet_20_Link">https://www.lopseg.com.br/osint</text:a></text:p>
      <text:p text:style-name="Standard"/>
      <text:p text:style-name="Standard"/>
      <text:p text:style-name="P17">Clonar voz con IA</text:p>
      <text:p text:style-name="P17">F5-TTS <text:a xlink:type="simple" xlink:href="https://github.com/SWivid/F5-TTS" text:style-name="Internet_20_link" text:visited-style-name="Visited_20_Internet_20_Link">https://github.com/SWivid/F5-TTS</text:a> <text:span text:style-name="T5">(ingles)</text:span></text:p>
      <text:p text:style-name="P18">Juan pablo gallego. Entrena el modelo en castellano. <text:s/>SPANISH-F5</text:p>
      <text:p text:style-name="P18"><text:a xlink:type="simple" xlink:href="https://www.youtube.com/watch?v=PmHDuLePaeU" text:style-name="Internet_20_link" text:visited-style-name="Visited_20_Internet_20_Link">https://www.youtube.com/watch?v=PmHDuLePaeU</text:a> <text:s/>(en nuestro ordenador)</text:p>
      <text:p text:style-name="P19"/>
      <text:p text:style-name="Standard"/>
      <text:p text:style-name="P1">Calcular hora de una imagen</text:p>
      <text:p text:style-name="Standard"><text:a xlink:type="simple" xlink:href="https://www.suncalc.org/#/27.6936,-97.5195,3/2024.12.11/15:35/1/3" text:style-name="Internet_20_link" text:visited-style-name="Visited_20_Internet_20_Link">https://www.suncalc.org/#/27.6936,-97.5195,3/2024.12.11/15:35/1/3</text:a></text:p>
      <text:p text:style-name="Standard"/>
      <text:p text:style-name="P1">facial <text:s text:c="2"/>pimeyes y facecheck</text:p>
      <text:p text:style-name="P16"/>
      <text:p text:style-name="Standard"/>
      <text:p text:style-name="Standard">Maltego – Investigaciones Vía Gráficos Java</text:p>
      <text:p text:style-name="Standard">SEON – Lo Mejor para Comprobaciones de Señales Sociales y Digitales</text:p>
      <text:p text:style-name="Standard">Lampyre – Diligencia Debida e Inteligencia de Ciberamenazas</text:p>
      <text:p text:style-name="Standard">Google/Bing Dorks – OSINT Gratis ( Si Sabes Como Usarlo)</text:p>
      <text:p text:style-name="Standard">Recon-ng – Marco OSINT de Código Abierto</text:p>
      <text:p text:style-name="Standard">SpiderFoot – Inteligencia de Ciberseguridad</text:p>
      <text:p text:style-name="Standard">Spokeo – Comprobación de Registros de Ciudadanos Estadounidenses</text:p>
      <text:p text:style-name="Standard">Have I Been Pwnd? – El Recurso para las Filtraciones de Datos</text:p>
      <text:p text:style-name="Standard">PhoneInfoga – Búsqueda de Teléfonos Basada en Python</text:p>
      <text:p text:style-name="Standard">Email Hippo – Comprobación de Registros MX para la Búsqueda de Correo Electrónico</text:p>
      <text:p text:style-name="Standard"/>
      <text:p text:style-name="Standard"><text:a xlink:type="simple" xlink:href="https://www.elladodelmal.com/2024/01/whatsapp-int-como-buscar-y-encontrar.html?m=1" text:style-name="Internet_20_link" text:visited-style-name="Visited_20_Internet_20_Link">https://www.elladodelmal.com/2024/01/whatsapp-int-como-buscar-y-encontrar.html?m=1</text:a></text:p>
      <text:p text:style-name="Standard"/>
      <text:p text:style-name="P20">cuentas de correo</text:p>
      <text:p text:style-name="P20">Holehe y Seon</text:p>
      <text:p text:style-name="P20"/>
      <text:p text:style-name="P20"><text:a xlink:type="simple" xlink:href="https://simtonet.com/" text:style-name="Internet_20_link" text:visited-style-name="Visited_20_Internet_20_Link">https://simtonet.com</text:a> </text:p>
      <text:p text:style-name="P20"><text:a xlink:type="simple" xlink:href="https://www.blacktel.io/" text:style-name="Internet_20_link" text:visited-style-name="Visited_20_Internet_20_Link">https://www.blacktel.io/</text:a> </text:p>
      <text:p text:style-name="P20"/>
      <text:p text:style-name="P20">Blacktel (<text:a xlink:type="simple" xlink:href="https://www.blacktel.io/" text:style-name="Internet_20_link" text:visited-style-name="Visited_20_Internet_20_Link">https://www.blacktel.io/</text:a> ) Buy phone number for SMS and Calls Virtual phone » Buy phone number for verification with text and calls from USA, UK, Canada. You can buy with crypto such as Bitcoin and Ether</text:p>
      <text:p text:style-name="Standard"/>
      <text:p text:style-name="Standard"><text:a xlink:type="simple" xlink:href="https://ciberninjas.com/emploleaks-herramienta-osint-detectar-miembros-credenciales-filtradas/" text:style-name="Internet_20_link" text:visited-style-name="Visited_20_Internet_20_Link">https://ciberninjas.com/emploleaks-herramienta-osint-detectar-miembros-credenciales-filtradas/</text:a></text:p>
      <text:p text:style-name="Standard"/>
      <text:p text:style-name="P21">tik-tok</text:p>
      <text:p text:style-name="P20">1. TikTok Scraper - Herramienta para raspar datos de TikTok.</text:p>
      <text:p text:style-name="P20"><text:s text:c="3"/>[Usar TikTok Scraper](https://apify.com/clockworks/tiktok-scraper#how-to-scrape-tiktok-tutorial-and-video-guide)</text:p>
      <text:p text:style-name="P20">2. Bellingcat TikTok Hashtag Analysis - Herramienta de GitHub para analizar hashtags en TikTok.</text:p>
      <text:p text:style-name="P20"><text:s text:c="3"/>[Explorar Bellingcat](https://github.com/bellingcat/tiktok-hashtag-analysis)</text:p>
      <text:p text:style-name="P20">3. MusicalDown - Descarga videos de TikTok sin marca de agua.</text:p>
      <text:p text:style-name="P20"><text:soft-page-break/><text:s text:c="3"/>[Descargar con MusicalDown](https://musicaldown.com/en)</text:p>
      <text:p text:style-name="P20">4. SnapTik - Otra herramienta para descargar videos de TikTok.</text:p>
      <text:p text:style-name="P20"><text:s text:c="3"/>[Usar SnapTik](https://snaptik.app/es)</text:p>
      <text:p text:style-name="P20">5. Export Comments - Extrae comentarios de videos de TikTok para análisis.</text:p>
      <text:p text:style-name="P20"><text:s text:c="3"/>[Exportar Comentarios](https://exportcomments.com/)</text:p>
      <text:p text:style-name="P20">6. Google Custom Search Engine - Busca específicamente contenido relacionado con TikTok.</text:p>
      <text:p text:style-name="P20"><text:s text:c="3"/>[Buscar en TikTok con Google CSE](https://cse.google.com/cse?cx=011444696387487602669:aqf7d9w73om#gsc.tab=0)</text:p>
      <text:p text:style-name="P20">7. TikTok Hashtags - Analiza y encuentra los hashtags más populares en TikTok.</text:p>
      <text:p text:style-name="P20"><text:s text:c="3"/>[Ver Hashtags Populares](https://tiktokhashtags.com/)</text:p>
      <text:p text:style-name="P20">8. TTDown - Otra opción para descargar videos de TikTok.</text:p>
      <text:p text:style-name="P20"><text:s text:c="3"/>[Descargar Videos con TTDown](https://ttdown.org/)</text:p>
      <text:p text:style-name="P20">9. OSINT Combine TikTok Quick Search - Realiza búsquedas rápidas en TikTok.</text:p>
      <text:p text:style-name="P20"><text:s text:c="3"/>[Búsqueda Rápida en TikTok](https://www.osintcombine.com/tiktok-quick-search)</text:p>
      <text:p text:style-name="P20">10. Search4Faces - Busca rostros específicos en videos de TikTok.</text:p>
      <text:p text:style-name="P20"><text:s text:c="4"/>[Buscar Rostros en TikTok](https://search4faces.com/en/index.html)</text:p>
      <text:p text:style-name="Standard"/>
      <text:p text:style-name="Standard"/>
      <text:p text:style-name="P20">bbdd con usuarios filtrados</text:p>
      <text:p text:style-name="P20"><text:a xlink:type="simple" xlink:href="https://search.0t.rocks/" text:style-name="Internet_20_link" text:visited-style-name="Visited_20_Internet_20_Link">https://search.0t.rocks</text:a></text:p>
      <text:p text:style-name="P20"/>
      <text:p text:style-name="Standard"/>
      <text:p text:style-name="Standard">MW Metadata <text:a xlink:type="simple" xlink:href="https://mattw.io/youtube-metadata/" text:style-name="Internet_20_link" text:visited-style-name="Visited_20_Internet_20_Link">https://mattw.io/youtube-metadata/</text:a> </text:p>
      <text:p text:style-name="Standard">Quickly gather all the metadata about a video, playlist, or channel from the YouTube API. Reverse image search thumbnails, geolocate in google maps, and translate ISO count</text:p>
      <text:p text:style-name="Standard"/>
      <text:p text:style-name="Standard">OSINT-mindset/lingolens: Search in Google Lens in lingo! Multi language search of image with export in HTML report <text:s text:c="2"/><text:a xlink:type="simple" xlink:href="https://github.com/OSINT-mindset/lingolens" text:style-name="Internet_20_link" text:visited-style-name="Visited_20_Internet_20_Link">https://github.com/OSINT-mindset/lingolens</text:a></text:p>
      <text:p text:style-name="Standard"/>
      <text:p text:style-name="Standard"/>
      <text:p text:style-name="Standard">Que puede saber una IA de una foto</text:p>
      <text:p text:style-name="Standard"><text:a xlink:type="simple" xlink:href="https://theyseeyourphotos.com/" text:style-name="Internet_20_link" text:visited-style-name="Visited_20_Internet_20_Link">https://theyseeyourphotos.com/</text:a></text:p>
      <text:p text:style-name="Standard"/>
      <text:p text:style-name="P22">Varias herramientas osint – redes sociales</text:p>
      <text:p text:style-name="P22"><text:a xlink:type="simple" xlink:href="https://www.instagram.com/reel/DDRppR3J4g0/?igsh=X25SbUo1aXc2" text:style-name="Internet_20_link" text:visited-style-name="Visited_20_Internet_20_Link">https://www.instagram.com/reel/DDRppR3J4g0/?igsh=X25SbUo1aXc2</text:a></text:p>
      <text:p text:style-name="P22"><text:a xlink:type="simple" xlink:href="https://www.instagram.com/p/DBqsiwMsydA/?igsh=MWo0eGhneGlzMDh3bw%3D%3D&amp;img_index=1" text:style-name="Internet_20_link" text:visited-style-name="Visited_20_Internet_20_Link">https://www.instagram.com/p/DBqsiwMsydA/?igsh=MWo0eGhneGlzMDh3bw%3D%3D&amp;img_index=1</text:a></text:p>
      <text:p text:style-name="P23"><text:a xlink:type="simple" xlink:href="https://www.instagram.com/reel/C9xZ8suuWaO/?igsh=MWtseXBhZHh6MGI5ZA%3D%3D" text:style-name="Internet_20_link" text:visited-style-name="Visited_20_Internet_20_Link"/></text:p>
      <text:p text:style-name="P24">email</text:p>
      <text:p text:style-name="P22"><text:a xlink:type="simple" xlink:href="https://www.instagram.com/reel/C9xZ8suuWaO/?igsh=MWtseXBhZHh6MGI5ZA%3D%3D" text:style-name="Internet_20_link" text:visited-style-name="Visited_20_Internet_20_Link">https://www.instagram.com/reel/C9xZ8suuWaO/?igsh=MWtseXBhZHh6MGI5ZA%3D%3D</text:a></text:p>
      <text:p text:style-name="P22"><text:a xlink:type="simple" xlink:href="https://www.instagram.com/reel/DAtTDk1OXkl/?igsh=MWc4Znp3NmR3MXcyYg%3D%3D" text:style-name="Internet_20_link" text:visited-style-name="Visited_20_Internet_20_Link">https://www.instagram.com/reel/DAtTDk1OXkl/?igsh=MWc4Znp3NmR3MXcyYg%3D%3D</text:a></text:p>
      <text:p text:style-name="P22"/>
      <text:p text:style-name="P22"><text:a xlink:type="simple" xlink:href="https://www.social-searcher.com/" text:style-name="Internet_20_link" text:visited-style-name="Visited_20_Internet_20_Link">https://www.social-searcher.com/</text:a></text:p>
      <text:p text:style-name="P22"/>
      <text:p text:style-name="Standard"/>
      <text:p text:style-name="Standard"/>
      <text:p text:style-name="Standard">NAMINT <text:s/><text:a xlink:type="simple" xlink:href="https://seintpl.github.io/NAMINT/" text:style-name="Internet_20_link" text:visited-style-name="Visited_20_Internet_20_Link">https://seintpl.github.io/NAMINT/</text:a></text:p>
      <text:p text:style-name="Standard"/>
      <text:p text:style-name="Standard"><text:a xlink:type="simple" xlink:href="https://github.com/TheBurnsy/Vehicle-OSINT-Collection" text:style-name="Internet_20_link" text:visited-style-name="Visited_20_Internet_20_Link">https://github.com/TheBurnsy/Vehicle-OSINT-Collection</text:a> <text:s text:c="2"/><text:span text:style-name="T6">web de herramientas</text:span></text:p>
      <text:p text:style-name="Standard"/>
      <text:p text:style-name="Standard"/>
      <text:p text:style-name="Standard"/>
      <text:p text:style-name="Standard"><text:soft-page-break/>View accounts without logging in.</text:p>
      <text:p text:style-name="Standard">Instagram: <text:s text:c="2"/>imginn.com</text:p>
      <text:p text:style-name="Standard">picuki.com</text:p>
      <text:p text:style-name="Standard">greatfon.com</text:p>
      <text:p text:style-name="Standard">TikTok: <text:s/>urlebird.com</text:p>
      <text:p text:style-name="Standard">tiktokstalk.com</text:p>
      <text:p text:style-name="Standard">tiker.cc/en</text:p>
      <text:p text:style-name="Standard"/>
      <text:p text:style-name="Standard">OSINT investigation platform | SL Crimewall <text:s text:c="2"/><text:a xlink:type="simple" xlink:href="https://sociallinks.io/products/sl-crimewall" text:style-name="Internet_20_link" text:visited-style-name="Visited_20_Internet_20_Link">https://sociallinks.io/products/sl-crimewall</text:a></text:p>
      <text:p text:style-name="Standard"/>
      <text:p text:style-name="P25">A collection of several hundred online tools for OSINT <text:a xlink:type="simple" xlink:href="https://github.com/cipher387/osint_stuff_tool_collection" text:style-name="Internet_20_link" text:visited-style-name="Visited_20_Internet_20_Link">https://github.com/cipher387/osint_stuff_tool_collection</text:a> </text:p>
      <text:p text:style-name="Standard"/>
      <text:p text:style-name="P26">OSINT #1 Más de 200 Search Tools - Álvaro Chirou <text:s/></text:p>
      <text:p text:style-name="P26"><text:a xlink:type="simple" xlink:href="https://achirou.com/mas-de-200-search-tools-para-osint/" text:style-name="Internet_20_link" text:visited-style-name="Visited_20_Internet_20_Link">https://achirou.com/mas-de-200-search-tools-para-osint/</text:a> </text:p>
      <text:p text:style-name="Standard">OSINT #2 Más de 200 Social Media Tools - Álvaro Chirou</text:p>
      <text:p text:style-name="Standard"><text:a xlink:type="simple" xlink:href="https://achirou.com/osint-2-mas-de-200-social-media-tools/" text:style-name="Internet_20_link" text:visited-style-name="Visited_20_Internet_20_Link">https://achirou.com/osint-2-mas-de-200-social-media-tools/</text:a></text:p>
      <text:p text:style-name="Standard">OSINT #3 Más de 100 Twitter Tools - Álvaro Chirou</text:p>
      <text:p text:style-name="Standard"><text:a xlink:type="simple" xlink:href="https://achirou.com/osint-3-mas-de-100-twitter-tools/" text:style-name="Internet_20_link" text:visited-style-name="Visited_20_Internet_20_Link">https://achirou.com/osint-3-mas-de-100-twitter-tools/</text:a></text:p>
      <text:p text:style-name="Standard">OSINT #4 Facebook - Álvaro Chirou</text:p>
      <text:p text:style-name="Standard"><text:a xlink:type="simple" xlink:href="https://achirou.com/osint-4-facebook/#¿Te_gustaria_enterarte_de_cuando_lanzamos_descuentos_y_nuevos_cursos" text:style-name="Internet_20_link" text:visited-style-name="Visited_20_Internet_20_Link">https://achirou.com/osint-4-facebook/#%C2%BFTe_gustaria_enterarte_de_cuando_lanzamos_descuentos_y_nuevos_cursos</text:a></text:p>
      <text:p text:style-name="Standard"/>
      <text:p text:style-name="P26"><text:span text:style-name="T7">Enumerar subdominios <text:s/></text:span><text:a xlink:type="simple" xlink:href="https://crt.sh/" text:style-name="Internet_20_link" text:visited-style-name="Visited_20_Internet_20_Link">https://crt.sh/</text:a></text:p>
      <text:p text:style-name="Standard">Comparativa de herramientas de enumeración de subdominios</text:p>
      <text:p text:style-name="Standard"><text:a xlink:type="simple" xlink:href="https://www.hackplayers.com/2020/02/comparativa-tools-subdominios.html" text:style-name="Internet_20_link" text:visited-style-name="Visited_20_Internet_20_Link">https://www.hackplayers.com/2020/02/comparativa-tools-subdominios.html</text:a></text:p>
      <text:p text:style-name="Standard"/>
      <text:p text:style-name="Standard">Goosint – Goosint focused on the most popular web-based Open Source Intelligence and Cybersecurity Tools. The goal is to help you find free cybersecurity, Threat Intelligence and OSINT resources.</text:p>
      <text:p text:style-name="Standard"><text:a xlink:type="simple" xlink:href="https://goosint.com/" text:style-name="Internet_20_link" text:visited-style-name="Visited_20_Internet_20_Link">https://goosint.com/</text:a></text:p>
      <text:p text:style-name="Standard"/>
      <text:p text:style-name="P26"><text:span text:style-name="T7">multi wayback machine <text:s text:c="2"/></text:span><text:a xlink:type="simple" xlink:href="https://cachedview.nl/" text:style-name="Internet_20_link" text:visited-style-name="Visited_20_Internet_20_Link">https://cachedview.nl/</text:a> </text:p>
      <text:p text:style-name="Standard"/>
      <text:p text:style-name="P27">TUTORIAL OSINT PHUNTER &amp; TRAXOSINT </text:p>
      <text:p text:style-name="P27"><text:a xlink:type="simple" xlink:href="https://www.youtube.com/watch?v=bMxxBSjt5iU" text:style-name="Internet_20_link" text:visited-style-name="Visited_20_Internet_20_Link">https://www.youtube.com/watch?v=bMxxBSjt5iU</text:a> </text:p>
      <text:p text:style-name="Standard"/>
      <text:p text:style-name="Standard"/>
      <text:p text:style-name="Standard"><text:a xlink:type="simple" xlink:href="https://achirou.com/osint-33-300-herramientas-para-realizar-informes-osint/" text:style-name="Internet_20_link" text:visited-style-name="Visited_20_Internet_20_Link">https://achirou.com/osint-33-300-herramientas-para-realizar-informes-osint/</text:a></text:p>
      <text:p text:style-name="Standard"/>
      <text:p text:style-name="Standard"><text:a xlink:type="simple" xlink:href="https://achirou.com/osint-8-telefono-comunicacion-y-colaboracion/" text:style-name="Internet_20_link" text:visited-style-name="Visited_20_Internet_20_Link">https://achirou.com/osint-8-telefono-comunicacion-y-colaboracion/</text:a></text:p>
      <text:p text:style-name="Standard"/>
      <text:p text:style-name="Standard">Aquí puedes aprender lo relativo a auditoría web y burpsuite de manera gratuita. Muy recomendable <text:s text:c="2"/><text:a xlink:type="simple" xlink:href="https://portswigger.net/web-security" text:style-name="Internet_20_link" text:visited-style-name="Visited_20_Internet_20_Link">https://portswigger.net/web-security</text:a> </text:p>
      <text:p text:style-name="Standard"/>
      <text:p text:style-name="Standard">GitHub - cqcore/Telegram-OSINT: In-depth repository of Telegram OSINT resources covering, tools, techniques &amp; tradecraft. <text:s/><text:a xlink:type="simple" xlink:href="https://github.com/cqcore/Telegram-OSINT" text:style-name="Internet_20_link" text:visited-style-name="Visited_20_Internet_20_Link">https://github.com/cqcore/Telegram-OSINT</text:a></text:p>
      <text:p text:style-name="Standard"/>
      <text:p text:style-name="Standard"/>
      <text:p text:style-name="P28"/>
      <text:p text:style-name="Standard"/>
      <text:p text:style-name="Standard">Reconocimiento de rostro <text:s/>Para detectar <text:s/>estafadores o perfiles falsos, delincuentes sexuales y <text:soft-page-break/>policías encubierto <text:s/><text:a xlink:type="simple" xlink:href="https://facecheck.id/" text:style-name="Internet_20_link" text:visited-style-name="Visited_20_Internet_20_Link">https://facecheck.id/</text:a> </text:p>
      <text:p text:style-name="Standard"/>
      <text:p text:style-name="Standard">¿Quieres detectar campañas de phishing? Aquí te muestro cómo hacerlo con Python y la API de urlscan <text:s/></text:p>
      <text:p text:style-name="Standard"/>
      <text:p text:style-name="Standard">"Herramientas para detectar deepfakes y combatir la desinformación" <text:a xlink:type="simple" xlink:href="https://www.welivesecurity.com/es/seguridad-digital/herramientas-para-detectar-deepfakes-combatir-desinformacion/" text:style-name="Internet_20_link" text:visited-style-name="Visited_20_Internet_20_Link">https://www.welivesecurity.com/es/seguridad-digital/herramientas-para-detectar-deepfakes-combatir-desinformacion/</text:a> <text:s/></text:p>
      <text:p text:style-name="Standard"/>
      <text:p text:style-name="Standard">🛠 Sentinel <text:a xlink:type="simple" xlink:href="https://thesentinel.ai/" text:style-name="Internet_20_link" text:visited-style-name="Visited_20_Internet_20_Link">https://thesentinel.ai/</text:a> </text:p>
      <text:p text:style-name="Standard">🛠 Sensity <text:a xlink:type="simple" xlink:href="https://sensity.ai/" text:style-name="Internet_20_link" text:visited-style-name="Visited_20_Internet_20_Link">https://sensity.ai/</text:a> </text:p>
      <text:p text:style-name="Standard">🛠 Oz Liveness <text:a xlink:type="simple" xlink:href="https://ozforensics.com/es/" text:style-name="Internet_20_link" text:visited-style-name="Visited_20_Internet_20_Link">https://ozforensics.com/es/</text:a> </text:p>
      <text:p text:style-name="Standard">🛠 WeVerify <text:a xlink:type="simple" xlink:href="https://weverify.eu/tools/deepfake-detector/" text:style-name="Internet_20_link" text:visited-style-name="Visited_20_Internet_20_Link">https://weverify.eu/tools/deepfake-detector/</text:a> </text:p>
      <text:p text:style-name="Standard">🛠 HyperVerge <text:a xlink:type="simple" xlink:href="https://hyperverge.co/use-cases/deepfake-detection/" text:style-name="Internet_20_link" text:visited-style-name="Visited_20_Internet_20_Link">https://hyperverge.co/use-cases/deepfake-detection/</text:a> </text:p>
      <text:p text:style-name="Standard">🛠 FakeCatcher de Intel <text:a xlink:type="simple" xlink:href="https://www.intel.la/content/www/xl/es/newsroom/news/intel-introduces-real-time-deepfake-detector.html" text:style-name="Internet_20_link" text:visited-style-name="Visited_20_Internet_20_Link">https://www.intel.la/content/www/xl/es/newsroom/news/intel-introduces-real-time-deepfake-detector.html</text:a> </text:p>
      <text:p text:style-name="Standard">🛠 Microsoft Video AI Authenticator <text:a xlink:type="simple" xlink:href="https://news.microsoft.com/es-xl/nuevos-pasos-para-combatir-la-desinformacion/" text:style-name="Internet_20_link" text:visited-style-name="Visited_20_Internet_20_Link">https://news.microsoft.com/es-xl/nuevos-pasos-para-combatir-la-desinformacion/</text:a> </text:p>
      <text:p text:style-name="Standard">🛠 Deepware <text:a xlink:type="simple" xlink:href="https://deepware.ai/" text:style-name="Internet_20_link" text:visited-style-name="Visited_20_Internet_20_Link">https://deepware.ai/</text:a> </text:p>
      <text:p text:style-name="Standard">🛠 Phoneme-Viseme Mismatch <text:a xlink:type="simple" xlink:href="https://openaccess.thecvf.com/content_CVPRW_2020/papers/w39/Agarwal_Detecting_Deep-Fake_Videos_From_Phoneme-Viseme_Mismatches_CVPRW_2020_paper.pdf" text:style-name="Internet_20_link" text:visited-style-name="Visited_20_Internet_20_Link">https://openaccess.thecvf.com/content_CVPRW_2020/papers/w39/Agarwal_Detecting_Deep-Fake_Videos_From_Phoneme-Viseme_Mismatches_CVPRW_2020_paper.pdf</text:a> </text:p>
      <text:p text:style-name="Standard">🛠 DuckDuckGoose <text:a xlink:type="simple" xlink:href="https://www.duckduckgoose.ai/" text:style-name="Internet_20_link" text:visited-style-name="Visited_20_Internet_20_Link">https://www.duckduckgoose.ai/</text:a> </text:p>
      <text:p text:style-name="Standard">🛠 <text:s/>MediaInfo https://mediaarea.net/es/MediaInfo ExifTool <text:a xlink:type="simple" xlink:href="https://exiftool.org/" text:style-name="Internet_20_link" text:visited-style-name="Visited_20_Internet_20_Link">https://exiftool.org/</text:a> </text:p>
      <text:p text:style-name="Standard">🛠 FaceForensics http://www.faceforensics.com/ Audio Fingerprinting <text:a xlink:type="simple" xlink:href="https://github.com/AddictedCS/soundfingerprinting?tab=readme-ov-file" text:style-name="Internet_20_link" text:visited-style-name="Visited_20_Internet_20_Link">https://github.com/AddictedCS/soundfingerprinting?tab=readme-ov-file</text:a> </text:p>
      <text:p text:style-name="Standard"/>
      <text:p text:style-name="Standard"/>
      <text:p text:style-name="Standard"/>
      <text:p text:style-name="P29">Godork, <text:s text:c="2"/>El escáner de dorks más rápido escrito en Go.</text:p>
      <text:p text:style-name="P29">sherlock <text:s text:c="2"/>Sherlock, la herramienta OSINT <text:span text:style-name="T8">de moda</text:span></text:p>
      <text:p text:style-name="P29">ghun<text:span text:style-name="T9">t <text:s text:c="3"/>excelente herramienta OSINT para investigar cuentas de Google</text:span></text:p>
      <text:p text:style-name="Standard">Maigret: Recopilar Expediente de Persona por Nombre de Usuario</text:p>
      <text:p text:style-name="Standard"/>
      <text:p text:style-name="Standard">Web con 6 herramientas de osint que puedes usar directamente</text:p>
      <text:p text:style-name="Standard"><text:a xlink:type="simple" xlink:href="https://osint.rocks/" text:style-name="Internet_20_link" text:visited-style-name="Visited_20_Internet_20_Link">https://osint.rocks/</text:a> </text:p>
      <text:p text:style-name="Standard"/>
      <text:p text:style-name="Standard"><text:a xlink:type="simple" xlink:href="https://medium.com/@omrpps/quiero-ese-fichero-una-herramienta-curiosa-para-la-búsqueda-y-descarga-de-documentos-en-la-web-16143ac208a9" text:style-name="Internet_20_link" text:visited-style-name="Visited_20_Internet_20_Link">https://medium.com/@omrpps/quiero-ese-fichero-una-herramienta-curiosa-para-la-b%C3%BAsqueda-y-descarga-de-documentos-en-la-web-16143ac208a9</text:a></text:p>
      <text:p text:style-name="Standard"/>
      <text:p text:style-name="P30">Eliminar blur i despixelar imagenes</text:p>
      <text:p text:style-name="P30"><text:a xlink:type="simple" xlink:href="https://imageamigo.com/deblur/" text:style-name="Internet_20_link" text:visited-style-name="Visited_20_Internet_20_Link">https://imageamigo.com/deblur/</text:a> <text:s text:c="2"/></text:p>
      <text:p text:style-name="P30"><text:a xlink:type="simple" xlink:href="https://github.com/spipm/Depixelization_poc" text:style-name="Internet_20_link" text:visited-style-name="Visited_20_Internet_20_Link">https://github.com/spipm/Depixelization_poc</text:a> </text:p>
      <text:p text:style-name="P30"><text:a xlink:type="simple" xlink:href="https://github.com/Vincentqyw/image-matching-webui" text:style-name="Internet_20_link" text:visited-style-name="Visited_20_Internet_20_Link">https://github.com/Vincentqyw/image-matching-webui</text:a> </text:p>
      <text:p text:style-name="P30"><text:a xlink:type="simple" xlink:href="https://mever.iti.gr/forensics/" text:style-name="Internet_20_link" text:visited-style-name="Visited_20_Internet_20_Link">https://mever.iti.gr/forensics/</text:a> <text:s text:c="2"/></text:p>
      <text:p text:style-name="P30"><text:a xlink:type="simple" xlink:href="https://www.stolencamerafinder.com/" text:style-name="Internet_20_link" text:visited-style-name="Visited_20_Internet_20_Link">https://www.stolencamerafinder.com/</text:a> </text:p>
      <text:p text:style-name="P30"><text:a xlink:type="simple" xlink:href="https://www.imageidentify.com/" text:style-name="Internet_20_link" text:visited-style-name="Visited_20_Internet_20_Link">https://www.imageidentify.com/</text:a> </text:p>
      <text:p text:style-name="P30"><text:a xlink:type="simple" xlink:href="https://stylesuxx.github.io/steganography/" text:style-name="Internet_20_link" text:visited-style-name="Visited_20_Internet_20_Link">https://stylesuxx.github.io/steganography/</text:a> </text:p>
      <text:p text:style-name="P30"><text:a xlink:type="simple" xlink:href="https://huggingface.co/google/maxim-s3-deblurring-gopro" text:style-name="Internet_20_link" text:visited-style-name="Visited_20_Internet_20_Link">https://huggingface.co/google/maxim-s3-deblurring-gopro</text:a> </text:p>
      <text:p text:style-name="P30"><text:a xlink:type="simple" xlink:href="https://29a.ch/photo-forensics/#forensic-magnifier" text:style-name="Internet_20_link" text:visited-style-name="Visited_20_Internet_20_Link">https://29a.ch/photo-forensics/#forensic-magnifier</text:a> </text:p>
      <text:p text:style-name="Standard"><text:a xlink:type="simple" xlink:href="https://fotoforensics.com/" text:style-name="Internet_20_link" text:visited-style-name="Visited_20_Internet_20_Link">https://fotoforensics.com/</text:a> 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>============================2022-23</text:p>
      <text:p text:style-name="P31">Fuentes</text:p>
      <text:p text:style-name="P31">Libro: Manual de ciberinvestigación en fuentes abiertas: OSINT para analistas (2019)</text:p>
      <text:p text:style-name="P31">de Félix Brezo Fernández (Autor), Yaiza Rubio Viñuela (Autor)</text:p>
      <text:p text:style-name="P31">Canal Discord: https://discord.gg/stgd27my</text:p>
      <text:p text:style-name="P31"/>
      <text:p text:style-name="P31">---------------------</text:p>
      <text:p text:style-name="P31"/>
      <text:p text:style-name="P31">Inteligencia.</text:p>
      <text:p text:style-name="P31">Tipos.</text:p>
      <text:p text:style-name="P31">Desinformación: CCN-CERT BP/13</text:p>
      <text:p text:style-name="P31"><text:a xlink:type="simple" xlink:href="https://www.dsn.gob.es/sites/dsn/files/CCN-CERT_BP_13_Desinformación%20en%20el%20Ciberespacio.pdf" text:style-name="Internet_20_link" text:visited-style-name="Visited_20_Internet_20_Link">https://www.dsn.gob.es/sites/dsn/files/CCN-CERT_BP_13_Desinformaci%C3%B3n%20en%20el%20Ciberespacio.pdf</text:a></text:p>
      <text:p text:style-name="P31">Evaluación de fuentes</text:p>
      <text:p text:style-name="P31">Archivado y gestión de información</text:p>
      <text:p text:style-name="P31">-ZOTERO</text:p>
      <text:p text:style-name="P31">-WAYBACK MACHINE</text:p>
      <text:p text:style-name="P31">-Archive.is</text:p>
      <text:p text:style-name="P31">-Egarante</text:p>
      <text:p text:style-name="P31"/>
      <text:p text:style-name="P31">Naturaleza de la información</text:p>
      <text:p text:style-name="P31">-formato de texto. ASCII, Unicode, base63, json, XML, CSV</text:p>
      <text:p text:style-name="P31">-expresiones regulares</text:p>
      <text:p text:style-name="P31">-busquedas con egrep</text:p>
      <text:p text:style-name="P31">-extracción de entidades con expresiones regulares</text:p>
      <text:p text:style-name="P31"><text:a xlink:type="simple" xlink:href="https://www.martinvigo.com/tools/phonerator/" text:style-name="Internet_20_link" text:visited-style-name="Visited_20_Internet_20_Link"><text:span text:style-name="T10">https://www.martinvigo.com/tools/phonerator/</text:span></text:a></text:p>
      <text:p text:style-name="P31"/>
      <text:p text:style-name="P31"/>
      <text:p text:style-name="P32">Analisis de ficheros y extraccion de metadatos.</text:p>
      <text:p text:style-name="P32">-Identificacion de formatos .. hexdump -C ... | head</text:p>
      <text:p text:style-name="P32">-extraccion de texto de ficheros ofimaticos. <text:s text:c="2"/>Abiword</text:p>
      <text:p text:style-name="P32">-Reconocimiento optico (OCR)</text:p>
      <text:p text:style-name="P32">tesseract</text:p>
      <text:p text:style-name="P32">GOCR</text:p>
      <text:p text:style-name="P32">-procesamiento de voz</text:p>
      <text:p text:style-name="P32">espeak + <text:s/>pyttsx3 (+python)</text:p>
      <text:p text:style-name="P32">SpeechRecognition ( pip3 ) + python</text:p>
      <text:p text:style-name="P32"/>
      <text:p text:style-name="P32">Analisis de metadatos</text:p>
      <text:p text:style-name="P32">Exiftool</text:p>
      <text:p text:style-name="P32">FOCA</text:p>
      <text:p text:style-name="P32"><text:tab/>Enumeración de activos de un dominio.</text:p>
      <text:p text:style-name="P32">Analisis forense de imágenes</text:p>
      <text:p text:style-name="P32">-Fotoforensics</text:p>
      <text:p text:style-name="P32">-Forensicaly</text:p>
      <text:p text:style-name="P32">-Error Level Analysis <text:s/>(ELA)</text:p>
      <text:p text:style-name="P32"><text:soft-page-break/></text:p>
      <text:p text:style-name="P33">Usos avanzados de herramientas de busqueda</text:p>
      <text:p text:style-name="P33">Buscadores generalistas</text:p>
      <text:p text:style-name="P33">-google</text:p>
      <text:p text:style-name="P33">-bing</text:p>
      <text:p text:style-name="P33">-Baidu</text:p>
      <text:p text:style-name="P33">-Yandex</text:p>
      <text:p text:style-name="P33">-Duckduckgo</text:p>
      <text:p text:style-name="P33">busquedas personalizadas</text:p>
      <text:p text:style-name="P33">-dorks de google</text:p>
      <text:p text:style-name="P33">-custom search de google</text:p>
      <text:p text:style-name="P33">-searX. Metabuscador en varias plataformas</text:p>
      <text:p text:style-name="P33">-Buscadores de imagenes</text:p>
      <text:p text:style-name="P33"><text:tab/>google imagenes</text:p>
      <text:p text:style-name="P33"><text:tab/>yandex imagenes</text:p>
      <text:p text:style-name="P33"><text:tab/>tineye</text:p>
      <text:p text:style-name="P33"><text:tab/>extensiones de navegador</text:p>
      <text:p text:style-name="P34"><text:tab/><text:span text:style-name="T11">Google Lens</text:span></text:p>
      <text:p text:style-name="P34"><text:tab/><text:a xlink:type="simple" xlink:href="https://smallseotools.com/es/reverse-image-search/" text:style-name="Internet_20_link" text:visited-style-name="Visited_20_Internet_20_Link">https://smallseotools.com/es/reverse-image-search/</text:a></text:p>
      <text:p text:style-name="P35"/>
      <text:p text:style-name="P35">buscador de redes WIFI, <text:span text:style-name="T12">mac, BSSID, </text:span><text:span text:style-name="T13">SSID</text:span></text:p>
      <text:p text:style-name="P36"><text:tab/><text:a xlink:type="simple" xlink:href="https://wigle.net/" text:style-name="Internet_20_link" text:visited-style-name="Visited_20_Internet_20_Link">https://wigle.net/</text:a> <text:s/><text:span text:style-name="T13">(requiere registro , con email ) </text:span><text:span text:style-name="T14">pots usar un emai temporal</text:span></text:p>
      <text:p text:style-name="P36"/>
      <text:p text:style-name="P33">buscadores en redes anonimas</text:p>
      <text:p text:style-name="P33"><text:tab/>ahmia.fi</text:p>
      <text:p text:style-name="P33"><text:tab/>Torch</text:p>
      <text:p text:style-name="P33"/>
      <text:p text:style-name="P33">buscadores en redes sociales</text:p>
      <text:p text:style-name="P33"><text:tab/><text:span text:style-name="T15">sherlock <text:s/>( consola )</text:span></text:p>
      <text:p text:style-name="P33"/>
      <text:p text:style-name="P33"/>
      <text:p text:style-name="P33">Atribución</text:p>
      <text:p text:style-name="P33">OSRFramework</text:p>
      <text:p text:style-name="P33"><text:tab/>usufy</text:p>
      <text:p text:style-name="P33"><text:tab/>alias_generator</text:p>
      <text:p text:style-name="P33"><text:tab/><text:span text:style-name="T16">mailfy</text:span></text:p>
      <text:p text:style-name="P33"><text:tab/><text:span text:style-name="T16">searchfy</text:span></text:p>
      <text:p text:style-name="P33"><text:tab/><text:span text:style-name="T16">domainfy</text:span></text:p>
      <text:p text:style-name="P37">Tinfoleak</text:p>
      <text:p text:style-name="P37">Recon-ng</text:p>
      <text:p text:style-name="P37">TheHarvester</text:p>
      <text:p text:style-name="P37">Maltego</text:p>
      <text:p text:style-name="P37">Namechk</text:p>
      <text:p text:style-name="P37">Socialbearing (twiter)</text:p>
      <text:p text:style-name="P37">Geosocial footprint</text:p>
      <text:p text:style-name="P37"><text:a xlink:type="simple" xlink:href="https://www.brigadaosint.com/sacando-id-de-linkedin/" text:style-name="Internet_20_link" text:visited-style-name="Visited_20_Internet_20_Link"><text:span text:style-name="T10">https://www.brigadaosint.com/sacando-id-de-linkedin/</text:span></text:a></text:p>
      <text:p text:style-name="P37"/>
      <text:p text:style-name="P38">email2phonenumber </text:p>
      <text:p text:style-name="P39">(A OSINT tool to obtain a target's phone number just by having his email address)</text:p>
      <text:p text:style-name="P37"><text:a xlink:type="simple" xlink:href="https://github.com/martinvigo/email2phonenumber" text:style-name="Internet_20_link" text:visited-style-name="Visited_20_Internet_20_Link">https://github.com/martinvigo/email2phonenumber</text:a></text:p>
      <text:p text:style-name="P37"/>
      <text:p text:style-name="P37">Buscadores tecnologicos</text:p>
      <text:p text:style-name="P37"><text:soft-page-break/>Shodan</text:p>
      <text:p text:style-name="P37">Zoomeye</text:p>
      <text:p text:style-name="P37">Censys</text:p>
      <text:p text:style-name="P37">Whois</text:p>
      <text:p text:style-name="P37"><text:tab/>domaintools</text:p>
      <text:p text:style-name="P37"><text:tab/>viewdns</text:p>
      <text:p text:style-name="P37">WhoisHistory</text:p>
      <text:p text:style-name="P37">Passive DNS</text:p>
      <text:p text:style-name="P37">Reverse whois</text:p>
      <text:p text:style-name="P37"/>
      <text:p text:style-name="P37">Localización IP <text:s/>(ip2location.com)</text:p>
      <text:p text:style-name="P37">ip-api.com</text:p>
      <text:p text:style-name="P37">Reverse <text:span text:style-name="T17">IP</text:span></text:p>
      <text:p text:style-name="P40">IP address blacklist</text:p>
      <text:p text:style-name="P40">sandboxing de ficheros</text:p>
      <text:p text:style-name="P40"><text:tab/>Virustotal</text:p>
      <text:p text:style-name="P40"><text:tab/>Hybrid Analysis</text:p>
      <text:p text:style-name="P40"><text:tab/>OTX</text:p>
      <text:p text:style-name="P40">Investigación sobre criptomonedas</text:p>
      <text:p text:style-name="P40"><text:tab/>Dirección, bloque, carteras, transaccion</text:p>
      <text:p text:style-name="P40"><text:tab/>Bitcoin, Ethereum, Monero, </text:p>
      <text:p text:style-name="P40"><text:tab/>PoW, PoS, Fork, </text:p>
      <text:p text:style-name="P40"><text:tab/><text:span text:style-name="T18">Blockseer</text:span></text:p>
      <text:p text:style-name="P40"><text:tab/><text:span text:style-name="T18">eXploration Tool</text:span></text:p>
      <text:p text:style-name="P40"><text:tab/><text:span text:style-name="T18">Criptomonedas con anonimato</text:span></text:p>
      <text:p text:style-name="P41"/>
      <text:p text:style-name="P14"/>
      <text:p text:style-name="P42"/>
      <text:p text:style-name="P15"/>
      <text:p text:style-name="P43">Reconocer el modelo y año de un coche con la cámara de un móvil. <text:span text:style-name="T19">Blippar</text:span></text:p>
      <text:p text:style-name="P44">Reconocer el modelo y año de un coche <text:span text:style-name="T20">subiendo foto a web <text:s/></text:span><text:a xlink:type="simple" xlink:href="https://carnet.ai/" text:style-name="Internet_20_link" text:visited-style-name="Visited_20_Internet_20_Link"><text:span text:style-name="T20">https://carnet.ai/</text:span></text:a></text:p>
      <text:p text:style-name="P45">Reconocer pais, provincia con letras de matricula</text:p>
      <text:p text:style-name="P45"/>
      <text:p text:style-name="P45">Maritime OSINT Tutorial: Track Vessels in the Deep Sea</text:p>
      <text:p text:style-name="P46"><text:a xlink:type="simple" xlink:href="https://www.youtube.com/watch?v=dl4v7d0wuVE" text:style-name="Internet_20_link" text:visited-style-name="Visited_20_Internet_20_Link">https://www.youtube.com/watch?v=dl4v7d0wuVE</text:a></text:p>
      <text:p text:style-name="P45"><text:a xlink:type="simple" xlink:href="https://www.marinetraffic.com/en/ais/home/centerx:2.4/centery:35.0/zoom:5" text:style-name="Internet_20_link" text:visited-style-name="Visited_20_Internet_20_Link">https://www.marinetraffic.com/en/ais/home/centerx:2.4/centery:35.0/zoom:5</text:a></text:p>
      <text:p text:style-name="P47">busca nom barco + myship.com</text:p>
      <text:p text:style-name="P45"/>
      <text:p text:style-name="P45"><text:a xlink:type="simple" xlink:href="https://www.timeanddate.com/" text:style-name="Internet_20_link" text:visited-style-name="Visited_20_Internet_20_Link">https://www.timeanddate.com/</text:a></text:p>
      <text:p text:style-name="P45"/>
      <text:p text:style-name="P45">verify content on social networks</text:p>
      <text:p text:style-name="P45"><text:a xlink:type="simple" xlink:href="https://www.invid-project.eu/tools-and-services/invid-verification-plugin/" text:style-name="Internet_20_link" text:visited-style-name="Visited_20_Internet_20_Link">https://www.invid-project.eu/tools-and-services/invid-verification-plugin/</text:a></text:p>
      <text:p text:style-name="P45"><text:a xlink:type="simple" xlink:href="https://droidmaze.com/how-to-find-name-and-username-history-on-telegram/" text:style-name="Internet_20_link" text:visited-style-name="Visited_20_Internet_20_Link"/></text:p>
      <text:p text:style-name="P45"><text:a xlink:type="simple" xlink:href="https://droidmaze.com/how-to-find-name-and-username-history-on-telegram/" text:style-name="Internet_20_link" text:visited-style-name="Visited_20_Internet_20_Link">https://droidmaze.com/how-to-find-name-and-username-history-on-telegram/</text:a></text:p>
      <text:p text:style-name="P45"/>
      <text:p text:style-name="P45"/>
      <text:p text:style-name="P48">Camaras decodifican matriculas</text:p>
      <text:p text:style-name="P45">https://deflock.me/map#map=9/39.213103/-0.095285</text:p>
      <text:p text:style-name="P49">(31-3-22)</text:p>
      <text:p text:style-name="P49"/>
      <text:p text:style-name="P50">Curso OSINT gratuito</text:p>
      <text:p text:style-name="P50"><text:a xlink:type="simple" xlink:href="https://ciberpatrulla.com/afi-curso-osint-gratuito/?ref=V85308312D" text:style-name="Internet_20_link" text:visited-style-name="Visited_20_Internet_20_Link">https://ciberpatrulla.com/afi-curso-osint-gratuito/?ref=V85308312D</text:a></text:p>
      <text:p text:style-name="P50"><text:a xlink:type="simple" xlink:href="https://ciberpatrulla.com/" text:style-name="Internet_20_link" text:visited-style-name="Visited_20_Internet_20_Link"><text:soft-page-break/>https://ciberpatrulla.com/</text:a></text:p>
      <text:p text:style-name="P50"><text:a xlink:type="simple" xlink:href="https://ciberpatrulla.com/academia-em/" text:style-name="Internet_20_link" text:visited-style-name="Visited_20_Internet_20_Link">https://ciberpatrulla.com/academia-em/</text:a></text:p>
      <text:p text:style-name="P50"/>
      <text:p text:style-name="P50"><text:a xlink:type="simple" xlink:href="https://openwebinars.net/cursos/osint-tecnicas-fuentes-abiertas/" text:style-name="Internet_20_link" text:visited-style-name="Visited_20_Internet_20_Link">https://openwebinars.net/cursos/osint-tecnicas-fuentes-abiertas/</text:a></text:p>
      <text:p text:style-name="P50"><text:a xlink:type="simple" xlink:href="https://www.ciberriesgos.com/curso-osint-gratis/" text:style-name="Internet_20_link" text:visited-style-name="Visited_20_Internet_20_Link">https://www.ciberriesgos.com/curso-osint-gratis/</text:a></text:p>
      <text:p text:style-name="P50"><text:a xlink:type="simple" xlink:href="https://www.ciberaprende.com/curso-osint-gratuito/" text:style-name="Internet_20_link" text:visited-style-name="Visited_20_Internet_20_Link">https://www.ciberaprende.com/curso-osint-gratuito/</text:a></text:p>
      <text:p text:style-name="P50"><text:a xlink:type="simple" xlink:href="https://i-intelligence.eu/es/courses/open-source-intelligence" text:style-name="Internet_20_link" text:visited-style-name="Visited_20_Internet_20_Link">https://i-intelligence.eu/es/courses/open-source-intelligence</text:a></text:p>
      <text:p text:style-name="P50"><text:a xlink:type="simple" xlink:href="https://odysee.com/@RTP:9/🔎-osint-maltego-tutorial-for:c" text:style-name="Internet_20_link" text:visited-style-name="Visited_20_Internet_20_Link">https://odysee.com/@RTP:9/%F0%9F%94%8E-osint-maltego-tutorial-for:c</text:a></text:p>
      <text:p text:style-name="P50"><text:a xlink:type="simple" xlink:href="https://odysee.com/@Ethical-tutoriales:d/osint-matriculas:a" text:style-name="Internet_20_link" text:visited-style-name="Visited_20_Internet_20_Link">https://odysee.com/@Ethical-tutoriales:d/osint-matriculas:a</text:a></text:p>
      <text:p text:style-name="P50"><text:a xlink:type="simple" xlink:href="https://www.osintdojo.com/diagrams/main" text:style-name="Internet_20_link" text:visited-style-name="Visited_20_Internet_20_Link">https://www.osintdojo.com/diagrams/main</text:a></text:p>
      <text:p text:style-name="P50"><text:a xlink:type="simple" xlink:href="https://www.youtube.com/watch?v=p9uyawVdq6o" text:style-name="Internet_20_link" text:visited-style-name="Visited_20_Internet_20_Link">https://www.youtube.com/watch?v=p9uyawVdq6o</text:a></text:p>
      <text:p text:style-name="P50"><text:a xlink:type="simple" xlink:href="https://www.youtube.com/watch?v=u4t25XJiXZY" text:style-name="Internet_20_link" text:visited-style-name="Visited_20_Internet_20_Link">https://www.youtube.com/watch?v=u4t25XJiXZY</text:a></text:p>
      <text:p text:style-name="P50">Les pongo las referencias de las que se habla en el vídeo.</text:p>
      <text:p text:style-name="P50">https://www.bellingcat.com/</text:p>
      <text:p text:style-name="P50">https://www.brigadaosint.com/</text:p>
      <text:p text:style-name="P50">https://www.tracelabs.org/resources</text:p>
      <text:p text:style-name="P50"><text:a xlink:type="simple" xlink:href="https://www.myosint.training/" text:style-name="Internet_20_link" text:visited-style-name="Visited_20_Internet_20_Link">https://www.myosint.training/</text:a></text:p>
      <text:p text:style-name="P50"/>
      <text:p text:style-name="P50"><text:a xlink:type="simple" xlink:href="https://cm-ca.github.io/posts/LAS-GAFAS/" text:style-name="Internet_20_link" text:visited-style-name="Visited_20_Internet_20_Link">https://cm-ca.github.io/posts/LAS-GAFAS/</text:a></text:p>
      <text:p text:style-name="P50"><text:a xlink:type="simple" xlink:href="https://www.osintteam.com/resources/" text:style-name="Internet_20_link" text:visited-style-name="Visited_20_Internet_20_Link">https://www.osintteam.com/resources/</text:a></text:p>
      <text:p text:style-name="P50"><text:a xlink:type="simple" xlink:href="https://www.youtube.com/watch?v=EOmz-PITRVc" text:style-name="Internet_20_link" text:visited-style-name="Visited_20_Internet_20_Link">https://www.youtube.com/watch?v=EOmz-PITRVc</text:a></text:p>
      <text:p text:style-name="P50"><text:a xlink:type="simple" xlink:href="https://defsec.noblogs.org/privacidad-avanzada-en-navegadores-firefox/" text:style-name="Internet_20_link" text:visited-style-name="Visited_20_Internet_20_Link">https://defsec.noblogs.org/privacidad-avanzada-en-navegadores-firefox/</text:a></text:p>
      <text:p text:style-name="P50"/>
      <text:p text:style-name="P50"/>
      <text:p text:style-name="P50"/>
      <text:p text:style-name="P51"><text:span text:style-name="T21">Herramientas </text:span>OSINT <text:span text:style-name="T21">ONLINE</text:span></text:p>
      <text:p text:style-name="P52"><text:a xlink:type="simple" xlink:href="https://osint.rocks/" text:style-name="Internet_20_link" text:visited-style-name="Visited_20_Internet_20_Link"><text:span text:style-name="T22">https://osint.rocks/</text:span></text:a><text:span text:style-name="T22"> <text:s text:c="2"/></text:span><text:a xlink:type="simple" xlink:href="https://www.instagram.com/reel/C_51cQ-N5l-/?igsh=dXllc3Boazl0bHhx" text:style-name="Internet_20_link" text:visited-style-name="Visited_20_Internet_20_Link"><text:span text:style-name="T22">https://www.instagram.com/reel/C_51cQ-N5l-/?igsh=dXllc3Boazl0bHhx</text:span></text:a></text:p>
      <text:p text:style-name="P52"><text:span text:style-name="T22"/></text:p>
      <text:p text:style-name="P53"/>
      <text:p text:style-name="P54"/>
      <text:p text:style-name="P55">Canales de <text:span text:style-name="T19">discord</text:span> OSINT</text:p>
      <text:p text:style-name="P55">Brigada OSINT - <text:a xlink:type="simple" xlink:href="https://discord.gg/brigada-osint-688790821293654169" text:style-name="Internet_20_link" text:visited-style-name="Visited_20_Internet_20_Link">https://discord.gg/brigada-osint-688790821293654169</text:a></text:p>
      <text:p text:style-name="P55">OSINT FR - <text:a xlink:type="simple" xlink:href="https://osintfr.com/en/home/" text:style-name="Internet_20_link" text:visited-style-name="Visited_20_Internet_20_Link">https://osintfr.com/en/home/</text:a></text:p>
      <text:p text:style-name="P55">OSINT France - <text:a xlink:type="simple" xlink:href="https://discord.gg/HaNbBFV7" text:style-name="Internet_20_link" text:visited-style-name="Visited_20_Internet_20_Link">https://discord.gg/HaNbBFV7</text:a></text:p>
      <text:p text:style-name="P55">Oryon’s OSINT Hub - <text:a xlink:type="simple" xlink:href="https://discord.gg/cysawfTR" text:style-name="Internet_20_link" text:visited-style-name="Visited_20_Internet_20_Link">https://discord.gg/cysawfTR</text:a></text:p>
      <text:p text:style-name="P55">The OSINTion - <text:a xlink:type="simple" xlink:href="https://discord.gg/g8u4hMtj" text:style-name="Internet_20_link" text:visited-style-name="Visited_20_Internet_20_Link">https://discord.gg/g8u4hMtj</text:a></text:p>
      <text:p text:style-name="P55">Project FOX - <text:a xlink:type="simple" xlink:href="https://discord.gg/projet-fox-775480337727225879" text:style-name="Internet_20_link" text:visited-style-name="Visited_20_Internet_20_Link">https://discord.gg/projet-fox-775480337727225879</text:a></text:p>
      <text:p text:style-name="P55">Project Owl - <text:a xlink:type="simple" xlink:href="https://discord.gg/projectowl" text:style-name="Internet_20_link" text:visited-style-name="Visited_20_Internet_20_Link">https://discord.gg/projectowl</text:a></text:p>
      <text:p text:style-name="P55">Kase - <text:a xlink:type="simple" xlink:href="https://discord.gg/mdjdNfe3" text:style-name="Internet_20_link" text:visited-style-name="Visited_20_Internet_20_Link">https://discord.gg/mdjdNfe3</text:a></text:p>
      <text:p text:style-name="P55">Bellingcat - <text:a xlink:type="simple" xlink:href="https://discord.gg/5U6EudKS" text:style-name="Internet_20_link" text:visited-style-name="Visited_20_Internet_20_Link">https://discord.gg/5U6EudKS</text:a></text:p>
      <text:p text:style-name="P55">Trace Labs - <text:a xlink:type="simple" xlink:href="https://www.tracelabs.org/get-involved" text:style-name="Internet_20_link" text:visited-style-name="Visited_20_Internet_20_Link">https://www.tracelabs.org/get-involved</text:a></text:p>
      <text:p text:style-name="P55">Hack the Box - <text:a xlink:type="simple" xlink:href="https://discord.gg/hackthebox" text:style-name="Internet_20_link" text:visited-style-name="Visited_20_Internet_20_Link">https://discord.gg/hackthebox</text:a></text:p>
      <text:p text:style-name="P55">r/ChatGPT - <text:a xlink:type="simple" xlink:href="https://discord.gg/r-chatgpt-1050422060352024636" text:style-name="Internet_20_link" text:visited-style-name="Visited_20_Internet_20_Link">https://discord.gg/r-chatgpt-1050422060352024636</text:a></text:p>
      <text:p text:style-name="P55">Perplexity - <text:a xlink:type="simple" xlink:href="https://discord.gg/perplexity-ai" text:style-name="Internet_20_link" text:visited-style-name="Visited_20_Internet_20_Link">https://discord.gg/perplexity-ai</text:a></text:p>
      <text:p text:style-name="P55">ChatGPT Community - <text:a xlink:type="simple" xlink:href="https://discord.gg/RWrtftFC" text:style-name="Internet_20_link" text:visited-style-name="Visited_20_Internet_20_Link">https://discord.gg/RWrtftFC</text:a></text:p>
      <text:p text:style-name="P55">GeoSpy - <text:a xlink:type="simple" xlink:href="https://discord.gg/BST8hPFJ" text:style-name="Internet_20_link" text:visited-style-name="Visited_20_Internet_20_Link">https://discord.gg/BST8hPFJ</text:a></text:p>
      <text:p text:style-name="P55">Hack4you - <text:a xlink:type="simple" xlink:href="https://discord.gg/hack4u" text:style-name="Internet_20_link" text:visited-style-name="Visited_20_Internet_20_Link">https://discord.gg/hack4u</text:a></text:p>
      <text:p text:style-name="P55">El Pingüino de Mario - <text:a xlink:type="simple" xlink:href="https://discord.gg/6SpnRBzd" text:style-name="Internet_20_link" text:visited-style-name="Visited_20_Internet_20_Link">https://discord.gg/6SpnRBzd</text:a></text:p>
      <text:p text:style-name="P55">Athena - <text:a xlink:type="simple" xlink:href="https://discord.gg/ns9e6DxC" text:style-name="Internet_20_link" text:visited-style-name="Visited_20_Internet_20_Link">https://discord.gg/ns9e6DxC</text:a></text:p>
      <text:p text:style-name="P55">Syndicate by Frontsight - <text:a xlink:type="simple" xlink:href="https://discord.gg/overt-operator-967221648635871283" text:style-name="Internet_20_link" text:visited-style-name="Visited_20_Internet_20_Link">https://discord.gg/overt-operator-967221648635871283</text:a></text:p>
      <text:p text:style-name="P55">UK Defence Community - <text:a xlink:type="simple" xlink:href="https://discord.gg/ukdefencecommunity" text:style-name="Internet_20_link" text:visited-style-name="Visited_20_Internet_20_Link">https://discord.gg/ukdefencecommunity</text:a></text:p>
      <text:p text:style-name="P55">Global News Watch - <text:a xlink:type="simple" xlink:href="https://discord.com/invite/5pmK4TU" text:style-name="Internet_20_link" text:visited-style-name="Visited_20_Internet_20_Link">https://discord.com/invite/5pmK4TU</text:a></text:p>
      <text:p text:style-name="P55"><text:soft-page-break/>Digital Forensics - <text:a xlink:type="simple" xlink:href="https://discord.gg/digitalforensics" text:style-name="Internet_20_link" text:visited-style-name="Visited_20_Internet_20_Link">https://discord.gg/digitalforensics</text:a></text:p>
      <text:p text:style-name="P56"/>
      <text:p text:style-name="P56">conferencias ciberseguridad</text:p>
      <text:p text:style-name="P56">Actualización de una lista que tengo sobre conferencias, jornadas, congresos de ciberseguridad:<text:line-break/>Algunas de ellas las pueden ver sus grabaciones en Youtube. <text:line-break/><text:line-break/>RootedCON<text:line-break/>IntelCon<text:line-break/>OpenExpo Europe<text:line-break/>Navaja Negra<text:line-break/>Osintomatico<text:line-break/>Incibe<text:line-break/>Hack-en<text:line-break/>Hackfiis<text:line-break/>HackConRD<text:line-break/>UNIR - Jornada de ciberseguridad <text:line-break/>Congreso de ciberseguridad de andalucia<text:line-break/>CCN- CERT jornadas<text:line-break/>MorterueloCON<text:line-break/>Mundo hacker<text:line-break/>T3chFest<text:line-break/>Policia nacional cyberwall ponencia<text:line-break/>Ekoparty Security Conference<text:line-break/>Asturcontech<text:line-break/>Dragon jar<text:line-break/>Dev / Null<text:line-break/>BugCon<text:line-break/>HTB meetups<text:line-break/>Fluid Attacks<text:line-break/>Bishop Fox<text:line-break/>DC11506<text:line-break/>Hackron en Tenerife<text:line-break/>BSides LATAM<text:line-break/>8.8 en Chile<text:line-break/>FAQin<text:line-break/>NoConName<text:line-break/>Hcon<text:line-break/>NotPinkCon<text:line-break/>MorterueloCon<text:line-break/>Raices Cyber Org<text:line-break/>Vetcon<text:line-break/>Issa Puerto Rico Cibercurity Conference<text:line-break/>Summit Ciberseguridad - CITTDuocUC<text:line-break/>Cascamorrascon<text:line-break/>Open Hacking Guatemala<text:line-break/>PwnedCR<text:line-break/>HoneyCon<text:line-break/>UAD360<text:line-break/>HackOn<text:line-break/>Hackron<text:line-break/>Euskalhack<text:line-break/>No cON Name<text:line-break/><text:soft-page-break/>Cyber Security World Madrid<text:line-break/>SecAdmin<text:line-break/>HackGDL<text:line-break/>Mundial de Ciberseguridad - ciberseguridadenlinea<text:line-break/>Posadev<text:line-break/>Defcon<text:line-break/>Black Hat<text:line-break/>x33fcon</text:p>
      <text:p text:style-name="P56"/>
      <text:p text:style-name="P56"/>
      <text:p text:style-name="P56"/>
      <text:p text:style-name="P56"/>
      <text:p text:style-name="P3"/>
      <text:p text:style-name="P3">MOTORES PARA PENTESTERS </text:p>
      <text:p text:style-name="P3">01. http://shodan.io —&gt; (Servidor , Vulnerabilidades)</text:p>
      <text:p text:style-name="P3">02. http://google.com —&gt; (Tontos)</text:p>
      <text:p text:style-name="P3">03. http://wigle.net —&gt; (Redes Wifi)</text:p>
      <text:p text:style-name="P3">04. http://grep.app —&gt; (Búsqueda de códigos)</text:p>
      <text:p text:style-name="P3">05. http://app.binaryedge.io —&gt; (Inteligencia de amenazas)</text:p>
      <text:p text:style-name="P3">06. http://onyphe.io —&gt; (Servidor)</text:p>
      <text:p text:style-name="P3">07. http://viz.greynoise.io —&gt; (Inteligencia de amenazas)</text:p>
      <text:p text:style-name="P3">08. http://censys.io —&gt; (Servidor)</text:p>
      <text:p text:style-name="P3">09. http://hunter.io —&gt; (Direcciones de correo electrónico)</text:p>
      <text:p text:style-name="P3">10. http://fofa.info —&gt; (Inteligencia de amenazas)</text:p>
      <text:p text:style-name="P3">11. http://zoomeye.org —&gt; (Inteligencia de amenazas)</text:p>
      <text:p text:style-name="P3">12. http://leakix.net —&gt; (Inteligencia de amenazas)</text:p>
      <text:p text:style-name="P3">13. http://intelx.io —&gt; (OSINT)</text:p>
      <text:p text:style-name="P3">14. http://app.netlas.io —&gt; (Superficie de ataque) </text:p>
      <text:p text:style-name="P3">15. http://searchcode.com —&gt; (Búsqueda de código) </text:p>
      <text:p text:style-name="P3">16. http://urlscan.io —&gt; (Inteligencia de amenazas) </text:p>
      <text:p text:style-name="P3">17. http://publicwww.com —&gt; (Búsqueda de código) </text:p>
      <text:p text:style-name="P3">18. http://fullhunt.io —&gt; (Superficie de ataque) </text:p>
      <text:p text:style-name="P3">19. http://socradar.io —&gt; (Inteligencia de amenazas) </text:p>
      <text:p text:style-name="P3">20. http://binaryedge.io —&gt; (Superficie de ataque) </text:p>
      <text:p text:style-name="P3">21. http://ivre.rocks —&gt; (Servidor)</text:p>
      <text:p text:style-name="P3">22. http://crt.sh —&gt; (Búsqueda de certificados) </text:p>
      <text:p text:style-name="P3">23. http://vulners.com —&gt; (Vulnerabilidades) </text:p>
      <text:p text:style-name="P3">24. http://pulsedive.com —&gt; (Inteligencia de amenazas</text:p>
      <text:p text:style-name="P3"/>
      <text:p text:style-name="P57">-----------------------</text:p>
      <text:p text:style-name="P57"/>
      <text:p text:style-name="P57">Lista con las principales MV para la ciberseguridad, el análisis forense digital y la privacidad:</text:p>
      <text:p text:style-name="P57"/>
      <text:p text:style-name="P57">🛠 Kali Purple (SOC-en-una-caja): https://www.kali.org/get-kali/#kali-installer-images</text:p>
      <text:p text:style-name="P57">🛠 Kali Linux (Pentesting): https://www.kali.org/get-kali/#kali-virtual-machines</text:p>
      <text:p text:style-name="P57">🛠 Predator-OS (Pentesting): https://predator-os.ir/</text:p>
      <text:p text:style-name="P57">🛠 BlackArch Linux (Pentesting): https://blackarch.org/index.html</text:p>
      <text:p text:style-name="P57">🛠 BackBox (Pentesting): https://www.backbox.org/</text:p>
      <text:p text:style-name="P57">🛠 Kookarai (Pentesting): https://kookarai.idocker.hacking-lab.com/</text:p>
      <text:p text:style-name="P57">🛠 ParrotOS (operación del Equipo Rojo y Azul): https://parrotsec.org/</text:p>
      <text:p text:style-name="P57">🛠 Commando VM (Pentesting/Red Teaming basado en Windows): https://github.com/mandiant/commando-vm</text:p>
      <text:p text:style-name="P57"><text:soft-page-break/>🛠 Whonix (Privacidad y anonimato): https://www.whonix.org/wiki/Download</text:p>
      <text:p text:style-name="P57">🛠 Tails (Privacidad y anonimato): https://tails.net/</text:p>
      <text:p text:style-name="P57">🛠 Qubes OS (hipervisor): https://www.qubes-os.org/</text:p>
      <text:p text:style-name="P57">🛠 Mandiant Threat Pursuit (inteligencia de amenazas y búsqueda basadas en Windows): https://github.com/mandiant/ThreatPursuit-VM</text:p>
      <text:p text:style-name="P57">🛠 Tsurugi Linux (Digital Forensics y OSINT): https://tsurugi-linux.org/downloads.php</text:p>
      <text:p text:style-name="P57">🛠 Estación de trabajo SIFT (análisis forense digital): https://www.sans.org/tools/sift-workstation/</text:p>
      <text:p text:style-name="P57">🛠 CSI Linux (Análisis forense digital): https://csilinux.com/</text:p>
      <text:p text:style-name="P57">🛠 CAINE (Análisis Forense Digital): https://www.caine-live.net/page5/page5.html</text:p>
      <text:p text:style-name="P57">🛠 RedHunt-OS Linux (Emulación de adversarios y caza de amenazas): https://github.com/redhuntlabs/RedHunt-OS</text:p>
      <text:p text:style-name="P57">🛠 FLARE-VM (Ingeniería inversa): https://github.com/mandiant/flare-vm</text:p>
      <text:p text:style-name="P57">🛠 REMnux (Ingeniería Inversa/Análisis de Malware): https://remnux.org/</text:p>
      <text:p text:style-name="P57">🛠 Trace Labs OSINT VM (OSINT para encontrar personas desaparecidas): https://www.tracelabs.org/initiatives/osint-vm</text:p>
      <text:p text:style-name="P57">🛠 Security Onion (búsqueda de amenazas, supervisión de la seguridad de la red y gestión de registros): <text:a xlink:type="simple" xlink:href="https://github.com/Security-Onion-Solutions/securityonion/blob/2.4/main/DOWNLOAD_AND_VERIFY_ISO.md" text:style-name="Internet_20_link" text:visited-style-name="Visited_20_Internet_20_Link">https://github.com/Security-Onion-Solutions/securityonion/blob/2.4/main/DOWNLOAD_AND_VERIFY_ISO.md</text:a></text:p>
      <text:p text:style-name="P57"/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style:rfc-language-tag="ca-ES-valencia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9T08:32:09.840000000</dc:date>
    <meta:editing-duration>PT9H36M7S</meta:editing-duration>
    <meta:editing-cycles>50</meta:editing-cycles>
    <meta:generator>LibreOffice/24.8.5.2$Windows_X86_64 LibreOffice_project/fddf2685c70b461e7832239a0162a77216259f22</meta:generator>
    <meta:document-statistic meta:table-count="0" meta:image-count="0" meta:object-count="0" meta:page-count="12" meta:paragraph-count="386" meta:word-count="1731" meta:character-count="18814" meta:non-whitespace-character-count="17278"/>
  </office:meta>
</office:document-meta>
</file>