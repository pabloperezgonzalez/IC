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wiss" style:font-pitch="variable"/>
    <style:font-face style:name="StarSymbol" svg:font-family="Star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7.586cm" fo:margin-left="0cm" table:align="left"/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16.792cm"/>
    </style:style>
    <style:style style:name="Tabla1.A1" style:family="table-cell">
      <style:table-cell-properties fo:background-color="#77bc65" fo:padding="0.097cm" fo:border="0.5pt solid #000000" style:writing-mode="lr-tb">
        <style:background-image/>
      </style:table-cell-properties>
    </style:style>
    <style:style style:name="Tabla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1.A3" style:family="table-cell">
      <style:table-cell-properties fo:background-color="#77bc65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1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1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1.B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1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ffffff" loext:opacity="100%" fo:language="es" fo:country="ES"/>
    </style:style>
    <style:style style:name="P3" style:family="paragraph" style:parent-style-name="Pa12">
      <style:paragraph-properties fo:margin-left="1.27cm" fo:line-height="100%">
        <style:tab-stops/>
      </style:paragraph-properties>
      <style:text-properties fo:language="es" fo:country="ES" style:font-name-asian="NSimSun" style:font-name-complex="Lucida Sans" style:font-weight-complex="bold"/>
    </style:style>
    <style:style style:name="P4" style:family="paragraph" style:parent-style-name="Pa6">
      <style:paragraph-properties fo:line-height="100%" fo:text-align="justify" style:justify-single-word="false"/>
      <style:text-properties fo:language="es" fo:country="ES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ES" style:font-name-asian="NSimSun" style:font-name-complex="Lucida Sans" style:font-weight-complex="bold"/>
    </style:style>
    <style:style style:name="P6" style:family="paragraph" style:parent-style-name="Pa12">
      <style:paragraph-properties fo:line-height="100%" fo:text-align="justify" style:justify-single-word="false"/>
      <style:text-properties fo:language="es" fo:country="ES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line-height="200%"/>
      <style:text-properties style:font-name="Arial"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Pa20">
      <style:paragraph-properties fo:margin-top="0cm" fo:margin-bottom="0cm" style:contextual-spacing="false" fo:line-height="100%" fo:text-align="justify" style:justify-single-word="false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Pa18" style:list-style-name="L1" style:master-page-name="">
      <loext:graphic-properties draw:fill="none"/>
      <style:paragraph-properties fo:line-height="100%" fo:text-align="justify" style:justify-single-word="false" style:page-number="auto" fo:background-color="transparent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Pa18" style:list-style-name="L1">
      <loext:graphic-properties draw:fill="none"/>
      <style:paragraph-properties fo:line-height="100%" fo:text-align="justify" style:justify-single-word="false" fo:background-color="transparent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Pa18" style:list-style-name="L1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>
        <style:tab-stops>
          <style:tab-stop style:position="1.192cm"/>
        </style:tab-stops>
      </style:paragraph-properties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Pa20">
      <style:paragraph-properties fo:line-height="100%" fo:text-align="justify" style:justify-single-word="false"/>
      <style:text-properties style:font-name="Calibri" fo:font-size="10pt" fo:language="es" fo:country="ES" fo:font-weight="bold" officeooo:paragraph-rsid="000b29e3" style:font-size-asian="10pt" style:font-weight-asian="bold" style:font-size-complex="10pt" style:font-weight-complex="bold"/>
    </style:style>
    <style:style style:name="P14" style:family="paragraph" style:parent-style-name="Standard" style:list-style-name="L2">
      <style:paragraph-properties fo:line-height="100%" fo:text-align="justify" style:justify-single-word="false"/>
      <style:text-properties style:font-name="Calibri" fo:font-size="10pt" fo:language="es" fo:country="ES" fo:font-weight="bold" officeooo:paragraph-rsid="000b29e3" style:font-size-asian="10pt" style:font-weight-asian="bold" style:font-size-complex="10pt" style:font-weight-complex="bold"/>
    </style:style>
    <style:style style:name="P15" style:family="paragraph" style:parent-style-name="Pa18" style:list-style-name="L2">
      <style:paragraph-properties fo:line-height="100%" fo:text-align="justify" style:justify-single-word="false"/>
      <style:text-properties style:font-name="Calibri" fo:font-size="10pt" fo:language="es" fo:country="ES" fo:font-weight="bold" officeooo:paragraph-rsid="000b29e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style:shadow="none"/>
      <style:text-properties style:font-name="Calibri" fo:font-size="10pt" officeooo:paragraph-rsid="000b29e3" style:font-size-asian="10pt" style:font-size-complex="10pt"/>
    </style:style>
    <style:style style:name="P17" style:family="paragraph" style:parent-style-name="Pa18" style:list-style-name="L3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18" style:family="paragraph" style:parent-style-name="Pa18" style:list-style-name="L3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19" style:family="paragraph" style:parent-style-name="Pa18" style:list-style-name="L3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20" style:family="paragraph" style:parent-style-name="Pa20">
      <style:paragraph-properties fo:line-height="100%" fo:text-align="justify" style:justify-single-word="fals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21" style:family="paragraph" style:parent-style-name="Pa18" style:list-style-name="L4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22" style:family="paragraph" style:parent-style-name="Pa18" style:list-style-name="L4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23" style:family="paragraph" style:parent-style-name="Pa18" style:list-style-name="L4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24" style:family="paragraph" style:parent-style-name="Pa20" style:master-page-name="">
      <style:paragraph-properties fo:line-height="100%" fo:text-align="justify" style:justify-single-word="false" style:page-number="auto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25" style:family="paragraph" style:parent-style-name="Pa18" style:list-style-name="L5" style:master-page-name="">
      <loext:graphic-properties draw:fill="none"/>
      <style:paragraph-properties fo:line-height="100%" fo:text-align="justify" style:justify-single-word="false" style:page-number="auto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26" style:family="paragraph" style:parent-style-name="Pa18" style:list-style-name="L5">
      <loext:graphic-properties draw:fill="none"/>
      <style:paragraph-properties fo:line-height="100%" fo:text-align="justify" style:justify-single-word="false" fo:background-color="transparent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27" style:family="paragraph" style:parent-style-name="Standard" style:list-style-name="L5">
      <loext:graphic-properties draw:fill="none"/>
      <style:paragraph-properties fo:margin-top="0cm" fo:margin-bottom="0cm" style:contextual-spacing="false" fo:line-height="100%" fo:text-align="justify" style:justify-single-word="false" fo:background-color="transparent" style:shadow="none"/>
      <style:text-properties fo:color="#000000" loext:opacity="100%" style:text-line-through-style="none" style:text-line-through-type="none" style:font-name="Calibri" fo:font-size="10pt" fo:language="es" fo:country="ES" fo:font-style="normal" style:text-underline-style="none" fo:font-weight="normal" officeooo:rsid="0015ed1a" officeooo:paragraph-rsid="000b29e3" style:font-size-asian="10pt" style:font-style-asian="normal" style:font-weight-asian="normal" style:font-size-complex="10pt" style:font-style-complex="normal"/>
    </style:style>
    <style:style style:name="P28" style:family="paragraph" style:parent-style-name="Text_20_body">
      <style:paragraph-properties fo:margin-top="0cm" fo:margin-bottom="0cm" style:contextual-spacing="false" fo:line-height="200%"/>
      <style:text-properties fo:language="es" fo:country="ES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fo:language="es" fo:country="ES"/>
    </style:style>
    <style:style style:name="P30" style:family="paragraph" style:parent-style-name="Text_20_body">
      <style:paragraph-properties fo:margin-top="0cm" fo:margin-bottom="0cm" style:contextual-spacing="false" fo:line-height="100%"/>
    </style:style>
    <style:style style:name="P31" style:family="paragraph" style:parent-style-name="Standard">
      <style:text-properties officeooo:rsid="000cff5a" officeooo:paragraph-rsid="000b9bf7"/>
    </style:style>
    <style:style style:name="P32" style:family="paragraph" style:parent-style-name="Standard">
      <style:text-properties officeooo:rsid="0048a1a3" officeooo:paragraph-rsid="000b9bf7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fo:language="es" fo:country="ES" officeooo:rsid="000452a6" officeooo:paragraph-rsid="000452a6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fo:language="es" fo:country="ES" officeooo:rsid="000989d6" officeooo:paragraph-rsid="000989d6"/>
    </style:style>
    <style:style style:name="T1" style:family="text">
      <style:text-properties style:font-name="Arial" fo:language="es" fo:country="ES" style:font-name-asian="NSimSun" style:font-name-complex="Lucida Sans" style:font-weight-complex="bold"/>
    </style:style>
    <style:style style:name="T2" style:family="text">
      <style:text-properties style:font-name="Arial" fo:language="es" fo:country="ES" fo:font-style="italic" style:font-name-asian="NSimSun" style:font-style-asian="italic" style:font-name-complex="Lucida Sans" style:font-weight-complex="bold"/>
    </style:style>
    <style:style style:name="T3" style:family="text">
      <style:text-properties officeooo:rsid="003b914b"/>
    </style:style>
    <style:style style:name="T4" style:family="text">
      <style:text-properties officeooo:rsid="000b29e3"/>
    </style:style>
    <style:style style:name="T5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03afdb9" style:font-style-asian="normal" style:font-weight-asian="normal" style:font-style-complex="normal"/>
    </style:style>
    <style:style style:name="T6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2829701" style:font-style-asian="normal" style:font-weight-asian="normal" style:font-style-complex="normal"/>
    </style:style>
    <style:style style:name="T7" style:family="text">
      <style:text-properties fo:color="#000000" loext:opacity="100%" style:text-line-through-style="none" style:text-line-through-type="none" fo:language="es" fo:country="ES" fo:font-style="normal" style:text-underline-style="none" fo:font-weight="normal" officeooo:rsid="0015ed1a" style:font-style-asian="normal" style:font-weight-asian="normal" style:font-style-complex="normal"/>
    </style:style>
    <style:style style:name="T8" style:family="text">
      <style:text-properties officeooo:rsid="00160a44"/>
    </style:style>
    <style:style style:name="T9" style:family="text">
      <style:text-properties officeooo:rsid="005197e9"/>
    </style:style>
    <style:style style:name="T10" style:family="text">
      <style:text-properties officeooo:rsid="002bcaea"/>
    </style:style>
    <style:style style:name="T11" style:family="text">
      <style:text-properties fo:language="es" fo:country="ES"/>
    </style:style>
    <style:style style:name="T12" style:family="text">
      <style:text-properties fo:language="es" fo:country="ES" fo:font-weight="bold" style:font-weight-asian="bold" style:font-weight-complex="bol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cm" fo:margin-left="1.799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  <style:text-properties style:font-name="StarSymbol"/>
      </text:list-level-style-bullet>
    </text:list-style>
    <text:list-style style:name="L2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Resultados de Aprendizaje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>2. Analiza incidentes de ciberseguridad utilizando herramientas, mecanismos de detección y alertas de seguridad.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2">Criterios de evaluación</text:p>
          </table:table-cell>
          <table:covered-table-cell/>
        </table:table-row>
        <table:table-row>
          <table:table-cell table:style-name="Tabla1.A4" office:value-type="string">
            <text:p text:style-name="P4">2a</text:p>
          </table:table-cell>
          <table:table-cell table:style-name="Tabla1.B4" office:value-type="string">
            <text:p text:style-name="P5">Se ha clasificado y definido la taxonomía de incidentes de ciberseguridad que pueden afectar a la organización</text:p>
          </table:table-cell>
        </table:table-row>
        <table:table-row>
          <table:table-cell table:style-name="Tabla1.A5" office:value-type="string">
            <text:p text:style-name="P6">2b</text:p>
          </table:table-cell>
          <table:table-cell table:style-name="Tabla1.B5" office:value-type="string">
            <text:p text:style-name="P5">Se han establecido controles, herramientas y mecanismos de monitorización, identificación, detección y alerta de incidentes</text:p>
          </table:table-cell>
        </table:table-row>
        <table:table-row>
          <table:table-cell table:style-name="Tabla1.A6" office:value-type="string">
            <text:p text:style-name="P4">2c</text:p>
          </table:table-cell>
          <table:table-cell table:style-name="Tabla1.B6" office:value-type="string">
            <text:p text:style-name="P5">Se han establecido controles y mecanismos de detección e identificación de incidentes de seguridad física</text:p>
          </table:table-cell>
        </table:table-row>
        <table:table-row>
          <table:table-cell table:style-name="Tabla1.A7" office:value-type="string">
            <text:p text:style-name="P4">2d</text:p>
          </table:table-cell>
          <table:table-cell table:style-name="Tabla1.B7" office:value-type="string">
            <text:p text:style-name="P7"><text:span text:style-name="Fuente_20_de_20_párrafo_20_predeter."><text:span text:style-name="T1">Se han establecido controles, herramientas y mecanismos de monitorización, identificación, detección y alerta de incidentes a través de la investigación en fuentes abiertas (</text:span></text:span><text:span text:style-name="Fuente_20_de_20_párrafo_20_predeter."><text:span text:style-name="T2">OSINT: Open Source Intelligence</text:span></text:span><text:span text:style-name="Fuente_20_de_20_párrafo_20_predeter."><text:span text:style-name="T1">)</text:span></text:span></text:p>
          </table:table-cell>
        </table:table-row>
        <table:table-row>
          <table:table-cell table:style-name="Tabla1.A8" office:value-type="string">
            <text:p text:style-name="P4">2e</text:p>
          </table:table-cell>
          <table:table-cell table:style-name="Tabla1.B8" office:value-type="string">
            <text:p text:style-name="P5">Se ha realizado una clasificación, valoración, documentación y seguimiento de los incidentes detectados dentro de la organización</text:p>
          </table:table-cell>
        </table:table-row>
      </table:table>
      <text:p text:style-name="P8">Contenidos:</text:p>
      <text:p text:style-name="P9"><text:span text:style-name="T3">1. </text:span>Desarrollo de planes de prevención y concienciación en ciberseguridad:</text:p>
      <text:list text:style-name="L1">
        <text:list-item>
          <text:p text:style-name="P10">− Principios generales en materia de ciberseguridad.</text:p>
        </text:list-item>
        <text:list-item>
          <text:p text:style-name="P11">− Normativa de protección del puesto del trabajo.</text:p>
        </text:list-item>
        <text:list-item>
          <text:p text:style-name="P11">− Plan de formación y concienciación en materia de ciberseguridad.</text:p>
        </text:list-item>
        <text:list-item>
          <text:p text:style-name="P11">− Materiales de formación y concienciación.</text:p>
        </text:list-item>
        <text:list-item>
          <text:p text:style-name="P12">− Auditorías internas de cumplimiento en materia de prevención.</text:p>
        </text:list-item>
      </text:list>
      <text:p text:style-name="P13"><text:span text:style-name="T4">2. </text:span>Auditoría de incidentes de ciberseguridad:</text:p>
      <text:list text:style-name="L2">
        <text:list-item>
          <text:list>
            <text:list-item>
              <text:p text:style-name="P14">− Taxonomía de incidentes de ciberseguridad.</text:p>
            </text:list-item>
            <text:list-item>
              <text:p text:style-name="P15">− Controles, herramientas y mecanismos de monitorización, identificación, detección y alerta de incidentes: tipos y fuentes</text:p>
            </text:list-item>
            <text:list-item>
              <text:p text:style-name="P15">− Controles, herramientas y mecanismos de detección e identificación de incidentes de seguridad física.</text:p>
            </text:list-item>
            <text:list-item>
              <text:p text:style-name="P15">− Controles, herramientas y mecanismos de monitorización, identificación, detección y alerta de incidentes a través de la investigación en fuentes abiertas (OSINT).</text:p>
            </text:list-item>
            <text:list-item>
              <text:p text:style-name="P14">− Clasificación, valoración, documentación, seguimiento inicial de incidentes de ciberseguridad.</text:p>
            </text:list-item>
          </text:list>
        </text:list-item>
      </text:list>
      <text:p text:style-name="P16"><text:span text:style-name="T5">3. </text:span><text:span text:style-name="T6">I</text:span><text:span text:style-name="T7">nvestigación de los incidentes de ciberseguridad:</text:span></text:p>
      <text:list text:style-name="L3">
        <text:list-item>
          <text:p text:style-name="P17">− Recopilación de evidencias. <text:span text:style-name="T8">(y almacenado de forma segura)</text:span></text:p>
        </text:list-item>
        <text:list-item>
          <text:p text:style-name="P18">− Análisis de evidencias.</text:p>
        </text:list-item>
        <text:list-item>
          <text:p text:style-name="P18">− Investigación del incidente</text:p>
        </text:list-item>
        <text:list-item>
          <text:p text:style-name="P18">− Intercambio de información del incidente con proveedores u organismos competentes.</text:p>
        </text:list-item>
        <text:list-item>
          <text:p text:style-name="P19">− Medidas de contención de incidentes.</text:p>
        </text:list-item>
      </text:list>
      <text:p text:style-name="P20"/>
      <text:p text:style-name="P20"><text:span text:style-name="T9">4. </text:span>Implementación de medidas de ciberseguridad:</text:p>
      <text:list text:style-name="L4">
        <text:list-item>
          <text:p text:style-name="P21">− Desarrollar procedimientos de actuación detallados para dar respuesta, mitigar, eliminar o contener los tipos de incidentes.</text:p>
        </text:list-item>
        <text:list-item>
          <text:p text:style-name="P22">− Implantar capacidades de ciberresiliencia.</text:p>
        </text:list-item>
        <text:list-item>
          <text:p text:style-name="P22">− Establecer flujos de toma de decisiones y escalado interno y/o externo adecuados.</text:p>
        </text:list-item>
        <text:list-item>
          <text:p text:style-name="P22">− Tareas para restablecer los servicios afectados por incidentes.</text:p>
        </text:list-item>
        <text:list-item>
          <text:p text:style-name="P22">− Documentación</text:p>
        </text:list-item>
        <text:list-item>
          <text:p text:style-name="P23">− Seguimiento de incidentes para evitar una situación similar.</text:p>
        </text:list-item>
      </text:list>
      <text:p text:style-name="P24"><text:span text:style-name="T10">5. </text:span>Detección y documentación de incidentes de ciberseguridad:</text:p>
      <text:list text:style-name="L5">
        <text:list-item>
          <text:list>
            <text:list-item>
              <text:p text:style-name="P25">− Desarrollar procedimientos de actuación para la notificación de incidentes.</text:p>
            </text:list-item>
            <text:list-item>
              <text:p text:style-name="P26">− Notificación interna de incidentes.</text:p>
            </text:list-item>
            <text:list-item>
              <text:p text:style-name="P27">− Notificación de incidentes a quienes corresponda.</text:p>
            </text:list-item>
          </text:list>
        </text:list-item>
      </text:list>
      <text:p text:style-name="P28"/>
      <text:p text:style-name="P29"><text:soft-page-break/></text:p>
      <text:p text:style-name="P29"/>
      <text:p text:style-name="P29"/>
      <text:p text:style-name="P29"/>
      <text:p text:style-name="P29"/>
      <text:p text:style-name="P29">Glances: herramienta monitorizar servidores Windows o Linux</text:p>
      <text:p text:style-name="P30"><text:a xlink:type="simple" xlink:href="https://blog.elhacker.net/2022/01/glances-herramienta-monitorizar-servidores-linux-windows-python.html" office:target-frame-name="_top" xlink:show="replace" text:style-name="Internet_20_link" text:visited-style-name="Visited_20_Internet_20_Link"><text:span text:style-name="Fuente_20_de_20_párrafo_20_predeter."><text:span text:style-name="T11">https://blog.elhacker.net/2022/01/glances-herramienta-monitorizar-servidores-linux-windows-python.html</text:span></text:span></text:a></text:p>
      <text:p text:style-name="P29"/>
      <text:p text:style-name="P29">MONITORIZAR EL RENDIMIENTO DE NUESTROS CONTENEDORES CON CTOP</text:p>
      <text:p text:style-name="P30"><text:a xlink:type="simple" xlink:href="https://geekland.eu/monitorizar-el-rendimiento-de-contenedores-docker/" office:target-frame-name="_top" xlink:show="replace" text:style-name="Internet_20_link" text:visited-style-name="Visited_20_Internet_20_Link"><text:span text:style-name="Fuente_20_de_20_párrafo_20_predeter."><text:span text:style-name="T11">https://geekland.eu/monitorizar-el-rendimiento-de-contenedores-docker/</text:span></text:span></text:a></text:p>
      <text:p text:style-name="P29"/>
      <text:p text:style-name="P29">¿Tu ordenador va mal? Descubre si hay algún proceso malicioso</text:p>
      <text:p text:style-name="P30"><text:a xlink:type="simple" xlink:href="https://www.osi.es/es/actualidad/blog/2022/05/11/tu-ordenador-va-mal-descubre-si-hay-algun-proceso-malicioso" office:target-frame-name="_top" xlink:show="replace" text:style-name="Internet_20_link" text:visited-style-name="Visited_20_Internet_20_Link"><text:span text:style-name="Fuente_20_de_20_párrafo_20_predeter."><text:span text:style-name="T11">https://www.osi.es/es/actualidad/blog/2022/05/11/tu-ordenador-va-mal-descubre-si-hay-algun-proceso-malicioso</text:span></text:span></text:a></text:p>
      <text:p text:style-name="P30"><text:a xlink:type="simple" xlink:href="https://blog.elhacker.net/2022/01/glances-herramienta-monitorizar-servidores-linux-windows-python.html" office:target-frame-name="_top" xlink:show="replace" text:style-name="Internet_20_link" text:visited-style-name="Visited_20_Internet_20_Link"><text:span text:style-name="Hipervínculo">https://blog.elhacker.net/2022/01/glances-herramienta-monitorizar-servidores-linux-windows-python.html</text:span></text:a></text:p>
      <text:p text:style-name="P29"/>
      <text:p text:style-name="P29">Webinar Día a día en el equipo de Respuesta a Ciberemergencias de Deloitte 1h 16min</text:p>
      <text:p text:style-name="P30"><text:a xlink:type="simple" xlink:href="https://www.youtube.com/watch?v=PzDa429Da1A" office:target-frame-name="_top" xlink:show="replace" text:style-name="Internet_20_link" text:visited-style-name="Visited_20_Internet_20_Link"><text:span text:style-name="Fuente_20_de_20_párrafo_20_predeter."><text:span text:style-name="T11">https://www.youtube.com/watch?v=PzDa429Da1A</text:span></text:span></text:a></text:p>
      <text:p text:style-name="P29"/>
      <text:p text:style-name="P29"><text:s/>El IEC 62443-4-2, la necesidad de securizar los componentes</text:p>
      <text:p text:style-name="P30"><text:a xlink:type="simple" xlink:href="https://www.incibe-cert.es/blog/el-iec-62443-4-2-necesidad-securizar-los-componentes" office:target-frame-name="_top" xlink:show="replace" text:style-name="Internet_20_link" text:visited-style-name="Visited_20_Internet_20_Link"><text:span text:style-name="Fuente_20_de_20_párrafo_20_predeter."><text:span text:style-name="T11">https://www.incibe-cert.es/blog/el-iec-62443-4-2-necesidad-securizar-los-componentes</text:span></text:span></text:a></text:p>
      <text:p text:style-name="P29"/>
      <text:p text:style-name="P29">Monitorización de eventos en Linux</text:p>
      <text:p text:style-name="P30"><text:a xlink:type="simple" xlink:href="https://elbinario.net/2022/03/18/monitorizacion-de-eventos-en-linux/" office:target-frame-name="_top" xlink:show="replace" text:style-name="Internet_20_link" text:visited-style-name="Visited_20_Internet_20_Link"><text:span text:style-name="Fuente_20_de_20_párrafo_20_predeter."><text:span text:style-name="T11">https://elbinario.net/2022/03/18/monitorizacion-de-eventos-en-linux/</text:span></text:span></text:a></text:p>
      <text:p text:style-name="P30"><text:a xlink:type="simple" xlink:href="https://www.linuxadictos.com/mejores-ids-linux.html" office:target-frame-name="_top" xlink:show="replace" text:style-name="Internet_20_link" text:visited-style-name="Visited_20_Internet_20_Link"><text:span text:style-name="Hipervínculo">https://www.linuxadictos.com/mejores-ids-linux.html</text:span></text:a></text:p>
      <text:p text:style-name="P29">Mejores IDS para linux</text:p>
      <text:p text:style-name="P30"><text:a xlink:type="simple" xlink:href="https://www.linuxadictos.com/mejores-ids-linux.html" office:target-frame-name="_top" xlink:show="replace" text:style-name="Internet_20_link" text:visited-style-name="Visited_20_Internet_20_Link"><text:span text:style-name="Fuente_20_de_20_párrafo_20_predeter."><text:span text:style-name="T11">https://www.linuxadictos.com/mejores-ids-linux.html</text:span></text:span></text:a></text:p>
      <text:p text:style-name="P29"/>
      <text:p text:style-name="P29">Las 7 fases de un ciberataque</text:p>
      <text:p text:style-name="P30"><text:a xlink:type="simple" xlink:href="https://www.incibe.es/protege-tu-empresa/blog/las-7-fases-ciberataque-las-conoces" office:target-frame-name="_top" xlink:show="replace" text:style-name="Internet_20_link" text:visited-style-name="Visited_20_Internet_20_Link"><text:span text:style-name="Fuente_20_de_20_párrafo_20_predeter."><text:span text:style-name="T11">https://www.incibe.es/protege-tu-empresa/blog/las-7-fases-ciberataque-las-conoces</text:span></text:span></text:a></text:p>
      <text:p text:style-name="P29"/>
      <text:p text:style-name="P29">SOC as a Service</text:p>
      <text:p text:style-name="P30"><text:a xlink:type="simple" xlink:href="https://www.redeszone.net/tutoriales/seguridad/que-es-soc-as-a-service/" office:target-frame-name="_top" xlink:show="replace" text:style-name="Internet_20_link" text:visited-style-name="Visited_20_Internet_20_Link"><text:span text:style-name="Fuente_20_de_20_párrafo_20_predeter."><text:span text:style-name="T11">https://www.redeszone.net/tutoriales/seguridad/que-es-soc-as-a-service/</text:span></text:span></text:a></text:p>
      <text:p text:style-name="P29"/>
      <text:p text:style-name="P29">Threat Hunting: la práctica de detectar amenazas ocultas en nuestra red</text:p>
      <text:p text:style-name="P30"><text:a xlink:type="simple" xlink:href="https://www.welivesecurity.com/la-es/2021/08/24/threat-hunting-que-es-practica-detectar-amenazas-ocultas-la-red/" office:target-frame-name="_top" xlink:show="replace" text:style-name="Internet_20_link" text:visited-style-name="Visited_20_Internet_20_Link"><text:span text:style-name="Fuente_20_de_20_párrafo_20_predeter."><text:span text:style-name="T11">https://www.welivesecurity.com/la-es/2021/08/24/threat-hunting-que-es-practica-detectar-amenazas-ocultas-la-red/</text:span></text:span></text:a></text:p>
      <text:p text:style-name="P29"/>
      <text:p text:style-name="P29">OSINT lisa institute (english)</text:p>
      <text:p text:style-name="P30"><text:a xlink:type="simple" xlink:href="https://www.sans.org/blog/what-is-open-source-intelligence/" office:target-frame-name="_top" xlink:show="replace" text:style-name="Internet_20_link" text:visited-style-name="Visited_20_Internet_20_Link"><text:span text:style-name="Fuente_20_de_20_párrafo_20_predeter."><text:span text:style-name="T11">https://www.sans.org/blog/what-is-open-source-intelligence/</text:span></text:span></text:a></text:p>
      <text:p text:style-name="P29"/>
      <text:p text:style-name="P29">OSINT</text:p>
      <text:p text:style-name="P29">Caso djokovic <text:s/>(pag retirada !! )</text:p>
      <text:p text:style-name="P30"><text:a xlink:type="simple" xlink:href="https://www.brigadaosint.com/caso-djokovic-desde-el-punto-de-vista-osint/" office:target-frame-name="_top" xlink:show="replace" text:style-name="Internet_20_link" text:visited-style-name="Visited_20_Internet_20_Link"><text:span text:style-name="Fuente_20_de_20_párrafo_20_predeter."><text:span text:style-name="T11">https://www.brigadaosint.com/caso-djokovic-desde-el-punto-de-vista-osint/</text:span></text:span></text:a></text:p>
      <text:p text:style-name="P29"/>
      <text:p text:style-name="P29">osint tools, osint blogs . <text:s/>Osint-ctf</text:p>
      <text:p text:style-name="P30"><text:a xlink:type="simple" xlink:href="https://hacktoria.com/" office:target-frame-name="_top" xlink:show="replace" text:style-name="Internet_20_link" text:visited-style-name="Visited_20_Internet_20_Link"><text:span text:style-name="Fuente_20_de_20_párrafo_20_predeter."><text:span text:style-name="T11">https://hacktoria.com/</text:span></text:span></text:a></text:p>
      <text:p text:style-name="P29"/>
      <text:p text:style-name="P29">How to find information on anyone: The best OSINT tools for people search</text:p>
      <text:p text:style-name="P29"><text:a xlink:type="simple" xlink:href="https://molfar.com/en/blog/how-to-find-information-on-anyone-the-best-osint-tools-for-people-search" text:style-name="Internet_20_link" text:visited-style-name="Visited_20_Internet_20_Link">https://molfar.com/en/blog/how-to-find-information-on-anyone-the-best-osint-tools-for-<text:soft-page-break/>people-search</text:a></text:p>
      <text:p text:style-name="P29"/>
      <text:p text:style-name="P29"/>
      <text:p text:style-name="P29">Basics of OSINT Essay</text:p>
      <text:p text:style-name="P29"><text:a xlink:type="simple" xlink:href="https://osintteam.blog/basics-of-osint-essay-d011c6ac2042" text:style-name="Internet_20_link" text:visited-style-name="Visited_20_Internet_20_Link">https://osintteam.blog/basics-of-osint-essay-d011c6ac2042</text:a></text:p>
      <text:p text:style-name="P29"/>
      <text:p text:style-name="P29">Ataque de Desinformación</text:p>
      <text:p text:style-name="P30"><text:a xlink:type="simple" xlink:href="https://www.lisainstitute.com/blogs/blog/ataques-desinformacion-que-son-como-evitarlos" office:target-frame-name="_top" xlink:show="replace" text:style-name="Internet_20_link" text:visited-style-name="Visited_20_Internet_20_Link"><text:span text:style-name="Fuente_20_de_20_párrafo_20_predeter."><text:span text:style-name="T11">https://www.lisainstitute.com/blogs/blog/ataques-desinformacion-que-son-como-evitarlos</text:span></text:span></text:a></text:p>
      <text:p text:style-name="P29"/>
      <text:p text:style-name="P29">OSINT)? Herramientas y ejemplos 2024</text:p>
      <text:p text:style-name="P29"><text:a xlink:type="simple" xlink:href="https://es.gridinsoft.com/osint#osint-tools" text:style-name="Internet_20_link" text:visited-style-name="Visited_20_Internet_20_Link">https://es.gridinsoft.com/osint#osint-tools</text:a></text:p>
      <text:p text:style-name="P29"/>
      <text:p text:style-name="P31">Osint <text:s text:c="3"/>5 herramientas para detectar typosquatting</text:p>
      <text:p text:style-name="P31"><text:a xlink:type="simple" xlink:href="https://derechodelared.com/typosquatting-herramienta-para-detectar/" text:style-name="Internet_20_link" text:visited-style-name="Visited_20_Internet_20_Link">https://derechodelared.com/typosquatting-herramienta-para-detectar/</text:a></text:p>
      <text:p text:style-name="P31"/>
      <text:p text:style-name="P32">osint - BUSQUE A CUALQUIER PERSONA EN 299 SITIOS WEB DE REDES SOCIALES CON SOLO UN COMANDO</text:p>
      <text:p text:style-name="P32"><text:a xlink:type="simple" xlink:href="https://noticiasseguridad.com/tutoriales/busque-a-cualquier-persona-en-299-sitios-web-de-redes-sociales-con-solo-un-comando/" text:style-name="Internet_20_link" text:visited-style-name="Visited_20_Internet_20_Link">https://noticiasseguridad.com/tutoriales/busque-a-cualquier-persona-en-299-sitios-web-de-redes-sociales-con-solo-un-comando/</text:a></text:p>
      <text:p text:style-name="P32"/>
      <text:p text:style-name="P29"/>
      <text:p text:style-name="P29"/>
      <text:p text:style-name="P29"/>
      <text:p text:style-name="P29">"Enemigo oculto": el drama de una odontóloga que le robaron la identidad para atacar a su familia</text:p>
      <text:p text:style-name="P30"><text:a xlink:type="simple" xlink:href="https://www.perfil.com/noticias/sociedad/enemigo-oculto-el-drama-de-una-odontologa-que-le-robaron-la-identidad-para-atacar-a-su-familia.phtml" office:target-frame-name="_top" xlink:show="replace" text:style-name="Internet_20_link" text:visited-style-name="Visited_20_Internet_20_Link"><text:span text:style-name="Fuente_20_de_20_párrafo_20_predeter."><text:span text:style-name="T11">https://www.perfil.com/noticias/sociedad/enemigo-oculto-el-drama-de-una-odontologa-que-le-robaron-la-identidad-para-atacar-a-su-familia.phtml</text:span></text:span></text:a></text:p>
      <text:p text:style-name="P29">Detenido al capo Gioacchino Gammino</text:p>
      <text:p text:style-name="P30"><text:a xlink:type="simple" xlink:href="https://www.brigadaosint.com/detenido-al-capo-gioacchino-gammin-osinto/" office:target-frame-name="_top" xlink:show="replace" text:style-name="Internet_20_link" text:visited-style-name="Visited_20_Internet_20_Link"><text:span text:style-name="Fuente_20_de_20_párrafo_20_predeter."><text:span text:style-name="T11">https://www.brigadaosint.com/detenido-al-capo-gioacchino-gammin-osinto/</text:span></text:span></text:a></text:p>
      <text:p text:style-name="P29">[video] Cyberwar: Stuxnet, el arma digital</text:p>
      <text:p text:style-name="P30"><text:a xlink:type="simple" xlink:href="https://video.vice.com/es/video/stuxnet-the-digital-weapon-1-347/5aaf9759f1cdb3183131b741" office:target-frame-name="_top" xlink:show="replace" text:style-name="Internet_20_link" text:visited-style-name="Visited_20_Internet_20_Link"><text:span text:style-name="Fuente_20_de_20_párrafo_20_predeter."><text:span text:style-name="T11">https://video.vice.com/es/video/stuxnet-the-digital-weapon-1-347/5aaf9759f1cdb3183131b741</text:span></text:span></text:a></text:p>
      <text:p text:style-name="P29"/>
      <text:p text:style-name="P33">Qué es MITRE ATT&amp;CK™</text:p>
      <text:p text:style-name="P33"><text:a xlink:type="simple" xlink:href="https://attack.mitre.org/" text:style-name="Internet_20_link" text:visited-style-name="Visited_20_Internet_20_Link">https://attack.mitre.org/</text:a></text:p>
      <text:p text:style-name="P33"><text:a xlink:type="simple" xlink:href="https://www.anomali.com/es/resources/what-is-mitre-attack-and-how-is-it-useful" text:style-name="Internet_20_link" text:visited-style-name="Visited_20_Internet_20_Link">https://www.anomali.com/es/resources/what-is-mitre-attack-and-how-is-it-useful</text:a></text:p>
      <text:p text:style-name="P33"/>
      <text:p text:style-name="P33">El modelo diamante vs MITRE ATT&amp;CK</text:p>
      <text:p text:style-name="P33"><text:a xlink:type="simple" xlink:href="https://blog.segu-info.com.ar/2023/11/el-modelo-diamante-vs-mitre-att.html" text:style-name="Internet_20_link" text:visited-style-name="Visited_20_Internet_20_Link">https://blog.segu-info.com.ar/2023/11/el-modelo-diamante-vs-mitre-att.html</text:a></text:p>
      <text:p text:style-name="P33"/>
      <text:p text:style-name="P29"/>
      <text:p text:style-name="P29">Cuando te hackean la cuenta de AWS para minar criptomonedas y no te enteras hasta que te llega una factura de 45.000 dólares</text:p>
      <text:p text:style-name="P30"><text:a xlink:type="simple" xlink:href="https://www.genbeta.com/actualidad/cuando-te-hackean-cuenta-aws-para-minar-criptomonedas-no-te-enteras-que-te-llega-factura-45-000-dolares" office:target-frame-name="_top" xlink:show="replace" text:style-name="Internet_20_link" text:visited-style-name="Visited_20_Internet_20_Link"><text:span text:style-name="Fuente_20_de_20_párrafo_20_predeter."><text:span text:style-name="T11">https://www.genbeta.com/actualidad/cuando-te-hackean-cuenta-aws-para-minar-criptomonedas-no-te-enteras-que-te-llega-factura-45-000-dolares</text:span></text:span></text:a></text:p>
      <text:p text:style-name="P29"/>
      <text:p text:style-name="P29"/>
      <text:p text:style-name="P30"><text:span text:style-name="Fuente_20_de_20_párrafo_20_predeter."><text:span text:style-name="T11">¿Necesitas auditar redes? </text:span></text:span><text:span text:style-name="Fuente_20_de_20_párrafo_20_predeter."><text:span text:style-name="T12">Security Onion</text:span></text:span><text:span text:style-name="Fuente_20_de_20_párrafo_20_predeter."><text:span text:style-name="T11"> es la suite más completa</text:span></text:span></text:p>
      <text:p text:style-name="P30"><text:a xlink:type="simple" xlink:href="https://www.redeszone.net/tutoriales/seguridad/security-onion-linux-auditorias-redes/" office:target-frame-name="_top" xlink:show="replace" text:style-name="Internet_20_link" text:visited-style-name="Visited_20_Internet_20_Link"><text:span text:style-name="Fuente_20_de_20_párrafo_20_predeter."><text:span text:style-name="T11">https://www.redeszone.net/tutoriales/seguridad/security-onion-linux-auditorias-redes/</text:span></text:span></text:a></text:p>
      <text:p text:style-name="P29"/>
      <text:p text:style-name="P29">whids: un EDR de código abierto</text:p>
      <text:p text:style-name="P30"><text:a xlink:type="simple" xlink:href="https://www.hackplayers.com/2022/08/whids-un-edr-de-codigo-abierto.html" office:target-frame-name="_top" xlink:show="replace" text:style-name="Internet_20_link" text:visited-style-name="Visited_20_Internet_20_Link"><text:span text:style-name="Fuente_20_de_20_párrafo_20_predeter."><text:span text:style-name="T11">https://www.hackplayers.com/2022/08/whids-un-edr-de-codigo-abierto.html</text:span></text:span></text:a></text:p>
      <text:p text:style-name="P29"><text:soft-page-break/></text:p>
      <text:p text:style-name="P29"/>
      <text:p text:style-name="P29">8 pasos para la evaluación de riesgos de ciberseguridad de una empresa (parte I) y 2</text:p>
      <text:p text:style-name="P30"><text:a xlink:type="simple" xlink:href="https://www.welivesecurity.com/la-es/2022/12/13/8-pasos-evaluacion-de-riesgos-1/" office:target-frame-name="_top" xlink:show="replace" text:style-name="Internet_20_link" text:visited-style-name="Visited_20_Internet_20_Link"><text:span text:style-name="Fuente_20_de_20_párrafo_20_predeter."><text:span text:style-name="T11">https://www.welivesecurity.com/la-es/2022/12/13/8-pasos-evaluacion-de-riesgos-1/</text:span></text:span></text:a></text:p>
      <text:p text:style-name="P30"><text:a xlink:type="simple" xlink:href="https://www.welivesecurity.com/la-es/2022/12/13/8-pasos-evaluacion-de-riesgos-2/" office:target-frame-name="_top" xlink:show="replace" text:style-name="Internet_20_link" text:visited-style-name="Visited_20_Internet_20_Link"><text:span text:style-name="Fuente_20_de_20_párrafo_20_predeter."><text:span text:style-name="T11">https://www.welivesecurity.com/la-es/2022/12/13/8-pasos-evaluacion-de-riesgos-2/</text:span></text:span></text:a></text:p>
      <text:p text:style-name="P29"/>
      <text:p text:style-name="P29">Masto, una herramienta OSINT que ayuda a encontrar información sobre los usuarios e instancias de mastodon[.]social</text:p>
      <text:p text:style-name="P30"><text:a xlink:type="simple" xlink:href="https://derechodelared.com/masto-herramienta-osint-mastodon/" office:target-frame-name="_top" xlink:show="replace" text:style-name="Internet_20_link" text:visited-style-name="Visited_20_Internet_20_Link"><text:span text:style-name="Fuente_20_de_20_párrafo_20_predeter."><text:span text:style-name="T11">https://derechodelared.com/masto-herramienta-osint-mastodon/</text:span></text:span></text:a></text:p>
      <text:p text:style-name="P29"/>
      <text:p text:style-name="P29">Search Engine Colossus, directorio de motores de búsqueda internacionales</text:p>
      <text:p text:style-name="P30"><text:a xlink:type="simple" xlink:href="https://derechodelared.com/search-engine-colossus-motores-de-busqueda/" office:target-frame-name="_top" xlink:show="replace" text:style-name="Internet_20_link" text:visited-style-name="Visited_20_Internet_20_Link"><text:span text:style-name="Fuente_20_de_20_párrafo_20_predeter."><text:span text:style-name="T11">https://derechodelared.com/search-engine-colossus-motores-de-busqueda/</text:span></text:span></text:a></text:p>
      <text:p text:style-name="P30"><text:a xlink:type="simple" xlink:href="https://www.welivesecurity.com/la-es/2023/02/28/5-herramientas-osint-gratuitas-redes-sociales/" office:target-frame-name="_top" xlink:show="replace" text:style-name="Internet_20_link" text:visited-style-name="Visited_20_Internet_20_Link"><text:span text:style-name="Hipervínculo">https://www.welivesecurity.com/la-es/2023/02/28/5-herramientas-osint-gratuitas-redes-sociales/</text:span></text:a></text:p>
      <text:p text:style-name="P29">5 herramientas OSINT gratuitas para redes sociales</text:p>
      <text:p text:style-name="P30"><text:a xlink:type="simple" xlink:href="https://www.welivesecurity.com/la-es/2023/02/28/5-herramientas-osint-gratuitas-redes-sociales/" office:target-frame-name="_top" xlink:show="replace" text:style-name="Internet_20_link" text:visited-style-name="Visited_20_Internet_20_Link"><text:span text:style-name="Fuente_20_de_20_párrafo_20_predeter."><text:span text:style-name="T11">https://www.welivesecurity.com/la-es/2023/02/28/5-herramientas-osint-gratuitas-redes-sociales/</text:span></text:span></text:a></text:p>
      <text:p text:style-name="P29"/>
      <text:p text:style-name="P29">Informes OSINT</text:p>
      <text:p text:style-name="P30"><text:a xlink:type="simple" xlink:href="https://ciberpatrulla.com/informe-de-inteligencia/" office:target-frame-name="_top" xlink:show="replace" text:style-name="Internet_20_link" text:visited-style-name="Visited_20_Internet_20_Link"><text:span text:style-name="Hipervínculo"><text:span text:style-name="T11">https://ciberpatrulla.com/informe-de-inteligencia/</text:span></text:span></text:a></text:p>
      <text:p text:style-name="P30"><text:a xlink:type="simple" xlink:href="https://www.lisainstitute.com/blogs/blog/informe-inteligencia-consejos-redaccion" office:target-frame-name="_top" xlink:show="replace" text:style-name="Internet_20_link" text:visited-style-name="Visited_20_Internet_20_Link"><text:span text:style-name="Hipervínculo"><text:span text:style-name="T11">https://www.lisainstitute.com/blogs/blog/informe-inteligencia-consejos-redaccion</text:span></text:span></text:a></text:p>
      <text:p text:style-name="P30"><text:a xlink:type="simple" xlink:href="https://www.lisainstitute.com/blogs/blog/3-pasos-previos-redactar-informe-inteligencia" office:target-frame-name="_top" xlink:show="replace" text:style-name="Internet_20_link" text:visited-style-name="Visited_20_Internet_20_Link"><text:span text:style-name="Hipervínculo"><text:span text:style-name="T11">https://www.lisainstitute.com/blogs/blog/3-pasos-previos-redactar-informe-inteligencia</text:span></text:span></text:a></text:p>
      <text:p text:style-name="P30"><text:a xlink:type="simple" xlink:href="https://odint.net/investigar-personas/" office:target-frame-name="_top" xlink:show="replace" text:style-name="Internet_20_link" text:visited-style-name="Visited_20_Internet_20_Link"><text:span text:style-name="Hipervínculo"><text:span text:style-name="T11">https://odint.net/investigar-personas/</text:span></text:span></text:a></text:p>
      <text:p text:style-name="P30"><text:a xlink:type="simple" xlink:href="https://osintteam.blog/basics-of-osint-essay-d011c6ac2042" office:target-frame-name="_top" xlink:show="replace" text:style-name="Internet_20_link" text:visited-style-name="Visited_20_Internet_20_Link"><text:span text:style-name="Hipervínculo"><text:span text:style-name="T11">https://osintteam.blog/basics-of-osint-essay-d011c6ac2042</text:span></text:span></text:a></text:p>
      <text:p text:style-name="P30"><text:a xlink:type="simple" xlink:href="https://cyberprotection-magazine.com/open-source-intelligence-osint-a-practical-example" office:target-frame-name="_top" xlink:show="replace" text:style-name="Internet_20_link" text:visited-style-name="Visited_20_Internet_20_Link"><text:span text:style-name="Hipervínculo"><text:span text:style-name="T11">https://cyberprotection-magazine.com/open-source-intelligence-osint-a-practical-example</text:span></text:span></text:a></text:p>
      <text:p text:style-name="P29"/>
      <text:p text:style-name="P29"/>
      <text:p text:style-name="P30"><text:a xlink:type="simple" xlink:href="https://www.intelligence101.com/the-ultimate-guide-to-writing-intelligence-reports-complete-with-templates-examples/" office:target-frame-name="_top" xlink:show="replace" text:style-name="Internet_20_link" text:visited-style-name="Visited_20_Internet_20_Link"><text:span text:style-name="Hipervínculo"><text:span text:style-name="T11">https://www.intelligence101.com/the-ultimate-guide-to-writing-intelligence-reports-complete-with-templates-examples/</text:span></text:span></text:a></text:p>
      <text:p text:style-name="P29"/>
      <text:p text:style-name="P29"><text:a xlink:type="simple" xlink:href="https://ciberpatrulla.com/articulos-de/herramientas-osint/page/2/" text:style-name="Internet_20_link" text:visited-style-name="Visited_20_Internet_20_Link">https://ciberpatrulla.com/articulos-de/herramientas-osint/page/2/</text:a></text:p>
      <text:p text:style-name="P29"/>
      <text:p text:style-name="P29"/>
      <text:p text:style-name="P29">Physical incidents</text:p>
      <text:p text:style-name="P29"/>
      <text:p text:style-name="P30"><text:a xlink:type="simple" xlink:href="https://www.avigilon.com/blog/physical-security-guide" office:target-frame-name="_top" xlink:show="replace" text:style-name="Internet_20_link" text:visited-style-name="Visited_20_Internet_20_Link"><text:span text:style-name="Fuente_20_de_20_párrafo_20_predeter."><text:span text:style-name="T11">https://www.avigilon.com/blog/physical-security-guide</text:span></text:span></text:a></text:p>
      <text:p text:style-name="P30"><text:a xlink:type="simple" xlink:href="https://www.getkisi.com/blog/types-of-physical-security-threats" office:target-frame-name="_top" xlink:show="replace" text:style-name="Internet_20_link" text:visited-style-name="Visited_20_Internet_20_Link"><text:span text:style-name="Fuente_20_de_20_párrafo_20_predeter."><text:span text:style-name="T11">https://www.getkisi.com/blog/types-of-physical-security-threats</text:span></text:span></text:a></text:p>
      <text:p text:style-name="P30"><text:a xlink:type="simple" xlink:href="https://www.securitymagazine.com/articles/97270-top-5-physical-security-threats-of-2022" office:target-frame-name="_top" xlink:show="replace" text:style-name="Internet_20_link" text:visited-style-name="Visited_20_Internet_20_Link"><text:span text:style-name="Fuente_20_de_20_párrafo_20_predeter."><text:span text:style-name="T11">https://www.securitymagazine.com/articles/97270-top-5-physical-security-threats-of-2022</text:span></text:span></text:a></text:p>
      <text:p text:style-name="P30"><text:a xlink:type="simple" xlink:href="https://bbrss.com/common-physical-security-threats/" office:target-frame-name="_top" xlink:show="replace" text:style-name="Internet_20_link" text:visited-style-name="Visited_20_Internet_20_Link"><text:span text:style-name="Fuente_20_de_20_párrafo_20_predeter."><text:span text:style-name="T11">https://bbrss.com/common-physical-security-threats/</text:span></text:span></text:a></text:p>
      <text:p text:style-name="P29"/>
      <text:p text:style-name="P29"><text:a xlink:type="simple" xlink:href="https://www.genbeta.com/actualidad/centro-datos-se-queda-refrigeracion-sus-servidores-provoca-que-unos-2-5-millones-pagos-no-puedan-completarse" text:style-name="Internet_20_link" text:visited-style-name="Visited_20_Internet_20_Link">https://www.genbeta.com/actualidad/centro-datos-se-queda-refrigeracion-sus-servidores-provoca-que-unos-2-5-millones-pagos-no-puedan-completarse</text:a></text:p>
      <text:p text:style-name="P29"/>
      <text:p text:style-name="P29"/>
      <text:p text:style-name="P29">herramienta-managed-detection-response-mdr/</text:p>
      <text:p text:style-name="P29"><text:a xlink:type="simple" xlink:href="https://www.muyseguridad.net/2023/12/19/ecosistema-herramienta-managed-detection-response-mdr/" text:style-name="Internet_20_link" text:visited-style-name="Visited_20_Internet_20_Link">https://www.muyseguridad.net/2023/12/19/ecosistema-herramienta-managed-detection-response-mdr/</text:a></text:p>
      <text:p text:style-name="P29"/>
      <text:p text:style-name="P29"/>
      <text:p text:style-name="P29">SELKS : Un IDS Suricata vitaminado</text:p>
      <text:p text:style-name="P29"><text:a xlink:type="simple" xlink:href="https://ciberseguridad.blog/selks-un-ids-suricata-vitaminado/" text:style-name="Internet_20_link" text:visited-style-name="Visited_20_Internet_20_Link">https://ciberseguridad.blog/selks-un-ids-suricata-vitaminado/</text:a></text:p>
      <text:p text:style-name="P29"/>
      <text:p text:style-name="P29"><text:soft-page-break/></text:p>
      <text:p text:style-name="P29">GHunt, herramienta OSINT para investigar cuentas de Google con correos electrónicos</text:p>
      <text:p text:style-name="P29"><text:a xlink:type="simple" xlink:href="https://derechodelared.com/ghunt-cuentas-google-email/" text:style-name="Internet_20_link" text:visited-style-name="Visited_20_Internet_20_Link">https://derechodelared.com/ghunt-cuentas-google-email/</text:a></text:p>
      <text:p text:style-name="P29"/>
      <text:p text:style-name="P29">obtención de información en fuentes abiertas en una investigación OSINT</text:p>
      <text:p text:style-name="P29"><text:a xlink:type="simple" xlink:href="https://www.sherlock-linux.org/" text:style-name="Internet_20_link" text:visited-style-name="Visited_20_Internet_20_Link">https://www.sherlock-linux.org/</text:a></text:p>
      <text:p text:style-name="P29"/>
      <text:p text:style-name="P29"/>
      <text:p text:style-name="P34">Tabby.sh. Terminal vitaminada</text:p>
      <text:p text:style-name="P34"><text:a xlink:type="simple" xlink:href="https://tabby.sh/" text:style-name="Internet_20_link" text:visited-style-name="Visited_20_Internet_20_Link">https://tabby.sh/</text:a></text:p>
      <text:p text:style-name="P34"/>
      <text:p text:style-name="P34">Convierte una raspberry en una flipper zero</text:p>
      <text:p text:style-name="P34"><text:a xlink:type="simple" xlink:href="https://blog.elhacker.net/2024/05/raspberry-pi-rp2040-flipper-zero.html" text:style-name="Internet_20_link" text:visited-style-name="Visited_20_Internet_20_Link">https://blog.elhacker.net/2024/05/raspberry-pi-rp2040-flipper-zero.html</text:a>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wiss" style:font-pitch="variable"/>
    <style:font-face style:name="StarSymbol" svg:font-family="Star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12" style:family="paragraph" style:parent-style-name="Default">
      <style:paragraph-properties style:line-height-at-least="0.355cm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6" style:family="paragraph" style:parent-style-name="Default">
      <style:paragraph-properties style:line-height-at-least="0.355cm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20" style:family="paragraph" style:parent-style-name="Default">
      <style:paragraph-properties style:line-height-at-least="0.355cm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18" style:family="paragraph" style:parent-style-name="Default">
      <style:paragraph-properties style:line-height-at-least="0.355cm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Arial" fo:font-family="Arial" style:font-family-generic="swiss" style:font-pitch="variable"/>
    </style:style>
    <style:style style:name="WW_5f_CharLFO1LVL2" style:display-name="WW_CharLFO1LVL2" style:family="text">
      <style:text-properties style:font-name="Arial" fo:font-family="Arial" style:font-family-generic="swiss" style:font-pitch="variable"/>
    </style:style>
    <style:style style:name="WW_5f_CharLFO1LVL3" style:display-name="WW_CharLFO1LVL3" style:family="text">
      <style:text-properties style:font-name="Arial" fo:font-family="Arial" style:font-family-generic="swiss" style:font-pitch="variable"/>
    </style:style>
    <style:style style:name="WW_5f_CharLFO1LVL4" style:display-name="WW_CharLFO1LVL4" style:family="text">
      <style:text-properties style:font-name="Arial" fo:font-family="Arial" style:font-family-generic="swiss" style:font-pitch="variable"/>
    </style:style>
    <style:style style:name="WW_5f_CharLFO1LVL5" style:display-name="WW_CharLFO1LVL5" style:family="text">
      <style:text-properties style:font-name="Arial" fo:font-family="Arial" style:font-family-generic="swiss" style:font-pitch="variable"/>
    </style:style>
    <style:style style:name="WW_5f_CharLFO1LVL6" style:display-name="WW_CharLFO1LVL6" style:family="text">
      <style:text-properties style:font-name="Arial" fo:font-family="Arial" style:font-family-generic="swiss" style:font-pitch="variable"/>
    </style:style>
    <style:style style:name="WW_5f_CharLFO1LVL7" style:display-name="WW_CharLFO1LVL7" style:family="text">
      <style:text-properties style:font-name="Arial" fo:font-family="Arial" style:font-family-generic="swiss" style:font-pitch="variable"/>
    </style:style>
    <style:style style:name="WW_5f_CharLFO1LVL8" style:display-name="WW_CharLFO1LVL8" style:family="text">
      <style:text-properties style:font-name="Arial" fo:font-family="Arial" style:font-family-generic="swiss" style:font-pitch="variable"/>
    </style:style>
    <style:style style:name="WW_5f_CharLFO1LVL9" style:display-name="WW_CharLFO1LVL9" style:family="text">
      <style:text-properties style:font-name="Arial" fo:font-family="Arial" style:font-family-generic="swiss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meta:creation-date>2023-12-04T15:49:00Z</meta:creation-date>
    <dc:date>2024-12-09T18:44:53.321000000</dc:date>
    <meta:editing-cycles>35</meta:editing-cycles>
    <meta:editing-duration>PT43M16S</meta:editing-duration>
    <meta:document-statistic meta:table-count="1" meta:image-count="0" meta:object-count="0" meta:page-count="5" meta:paragraph-count="138" meta:word-count="763" meta:character-count="8907" meta:non-whitespace-character-count="8300"/>
    <meta:template xlink:type="simple" xlink:actuate="onRequest" xlink:title="" xlink:href="Normal.dotm"/>
  </office:meta>
</office:document-meta>
</file>